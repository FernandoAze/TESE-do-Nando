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667in" table:align="left" fo:background-color="transparent">
        <style:background-image/>
      </style:table-properties>
    </style:style>
    <style:style style:name="Table1.A" style:family="table-column">
      <style:table-column-properties style:column-width="1.2889in"/>
    </style:style>
    <style:style style:name="Table1.B" style:family="table-column">
      <style:table-column-properties style:column-width="3.3778in"/>
    </style:style>
    <style:style style:name="Table1.A1" style:family="table-cell">
      <style:table-cell-properties fo:padding="0.0382in" fo:border="0.5pt solid #ffd320"/>
    </style:style>
    <style:style style:name="Table1.A2" style:family="table-cell">
      <style:table-cell-properties fo:padding="0.0382in" fo:border-left="0.5pt solid #ffd320" fo:border-right="none" fo:border-top="none" fo:border-bottom="0.5pt solid #ffd320"/>
    </style:style>
    <style:style style:name="Table1.B2" style:family="table-cell">
      <style:table-cell-properties fo:padding="0.0382in" fo:border-left="0.5pt solid #ffd320" fo:border-right="0.5pt solid #ffd320" fo:border-top="none" fo:border-bottom="0.5pt solid #ffd320"/>
    </style:style>
    <style:style style:name="P1" style:family="paragraph" style:parent-style-name="Comment">
      <style:text-properties officeooo:rsid="001e3807"/>
    </style:style>
    <style:style style:name="P2" style:family="paragraph" style:parent-style-name="Comment">
      <style:text-properties officeooo:rsid="001e3807" officeooo:paragraph-rsid="001e3807"/>
    </style:style>
    <style:style style:name="P3" style:family="paragraph" style:parent-style-name="Comment">
      <style:text-properties officeooo:rsid="0020c3be" officeooo:paragraph-rsid="0020c3be"/>
    </style:style>
    <style:style style:name="P4" style:family="paragraph" style:parent-style-name="Comment">
      <style:paragraph-properties fo:text-align="center" style:justify-single-word="false"/>
      <style:text-properties officeooo:rsid="0020c3be" officeooo:paragraph-rsid="0020c3be"/>
    </style:style>
    <style:style style:name="P5" style:family="paragraph" style:parent-style-name="Comment">
      <style:paragraph-properties fo:text-align="center" style:justify-single-word="false"/>
      <style:text-properties fo:language="pt" fo:country="PT" officeooo:rsid="0020c3be" officeooo:paragraph-rsid="0020c3be"/>
    </style:style>
    <style:style style:name="P6" style:family="paragraph" style:parent-style-name="Comment">
      <style:text-properties fo:language="pt" fo:country="PT"/>
    </style:style>
    <style:style style:name="P7" style:family="paragraph" style:parent-style-name="Comment">
      <style:text-properties fo:language="pt" fo:country="PT" officeooo:rsid="0036e49f" officeooo:paragraph-rsid="0036e49f"/>
    </style:style>
    <style:style style:name="P8" style:family="paragraph" style:parent-style-name="Comment">
      <style:text-properties officeooo:rsid="0024c432" officeooo:paragraph-rsid="0024c432"/>
    </style:style>
    <style:style style:name="P9" style:family="paragraph" style:parent-style-name="Comment">
      <style:text-properties officeooo:rsid="0026fd50" officeooo:paragraph-rsid="0026fd50"/>
    </style:style>
    <style:style style:name="P10" style:family="paragraph" style:parent-style-name="Comment">
      <style:text-properties officeooo:rsid="0026fd50" officeooo:paragraph-rsid="00289dac"/>
    </style:style>
    <style:style style:name="P11" style:family="paragraph" style:parent-style-name="Comment">
      <style:text-properties officeooo:rsid="00289dac" officeooo:paragraph-rsid="00289dac"/>
    </style:style>
    <style:style style:name="P12" style:family="paragraph" style:parent-style-name="Comment">
      <style:text-properties officeooo:rsid="00289dac" officeooo:paragraph-rsid="00291895"/>
    </style:style>
    <style:style style:name="P13" style:family="paragraph" style:parent-style-name="Comment">
      <style:text-properties officeooo:rsid="0029a57e" officeooo:paragraph-rsid="0029a57e"/>
    </style:style>
    <style:style style:name="P14" style:family="paragraph" style:parent-style-name="Comment">
      <style:text-properties officeooo:rsid="002abb2a" officeooo:paragraph-rsid="002d8d41"/>
    </style:style>
    <style:style style:name="P15" style:family="paragraph" style:parent-style-name="Comment">
      <style:text-properties officeooo:rsid="002efe69" officeooo:paragraph-rsid="002efe69"/>
    </style:style>
    <style:style style:name="P16" style:family="paragraph" style:parent-style-name="Comment">
      <style:text-properties officeooo:paragraph-rsid="002efe69"/>
    </style:style>
    <style:style style:name="P17" style:family="paragraph" style:parent-style-name="Comment">
      <style:text-properties officeooo:rsid="003079d6" officeooo:paragraph-rsid="003079d6"/>
    </style:style>
    <style:style style:name="P18" style:family="paragraph" style:parent-style-name="Comment">
      <style:text-properties officeooo:paragraph-rsid="003079d6"/>
    </style:style>
    <style:style style:name="P19" style:family="paragraph" style:parent-style-name="Comment">
      <style:text-properties officeooo:rsid="0032756d" officeooo:paragraph-rsid="0032756d"/>
    </style:style>
    <style:style style:name="P20" style:family="paragraph" style:parent-style-name="Comment">
      <style:text-properties officeooo:paragraph-rsid="0032756d"/>
    </style:style>
    <style:style style:name="P21" style:family="paragraph" style:parent-style-name="Comment">
      <style:text-properties officeooo:rsid="0034643e" officeooo:paragraph-rsid="0034643e"/>
    </style:style>
    <style:style style:name="P22" style:family="paragraph" style:parent-style-name="Comment">
      <style:text-properties fo:font-weight="bold" officeooo:rsid="00352500" officeooo:paragraph-rsid="00352500" style:font-weight-asian="bold" style:font-weight-complex="bold"/>
    </style:style>
    <style:style style:name="P23" style:family="paragraph" style:parent-style-name="Comment">
      <style:text-properties officeooo:rsid="00372fdd" officeooo:paragraph-rsid="00372fdd"/>
    </style:style>
    <style:style style:name="P24" style:family="paragraph" style:parent-style-name="Comment">
      <style:text-properties officeooo:paragraph-rsid="00383d32"/>
    </style:style>
    <style:style style:name="P25" style:family="paragraph" style:parent-style-name="Contents_20_1">
      <style:paragraph-properties>
        <style:tab-stops>
          <style:tab-stop style:position="5.42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5.2256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5.0283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4.8319in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01e036a"/>
    </style:style>
    <style:style style:name="P30" style:family="paragraph" style:parent-style-name="Standard">
      <style:paragraph-properties>
        <style:tab-stops/>
      </style:paragraph-properties>
      <style:text-properties fo:color="#ffd320" loext:opacity="100%" fo:font-size="9pt" officeooo:rsid="001e036a" officeooo:paragraph-rsid="001e3807" style:font-size-asian="9pt" style:font-size-complex="9pt"/>
    </style:style>
    <style:style style:name="P31" style:family="paragraph" style:parent-style-name="Standard">
      <style:paragraph-properties>
        <style:tab-stops/>
      </style:paragraph-properties>
      <style:text-properties fo:color="#ffd320" loext:opacity="100%" fo:font-size="9pt" fo:language="pt" fo:country="PT" officeooo:rsid="001e036a" officeooo:paragraph-rsid="001e3807" style:font-size-asian="9pt" style:font-size-complex="9pt"/>
    </style:style>
    <style:style style:name="P32" style:family="paragraph" style:parent-style-name="Standard">
      <style:text-properties fo:color="#ffd320" loext:opacity="100%" fo:font-size="9pt" fo:language="pt" fo:country="PT" officeooo:rsid="001e3807" officeooo:paragraph-rsid="001e3807" style:font-size-asian="9pt" style:font-size-complex="9pt"/>
    </style:style>
    <style:style style:name="P33" style:family="paragraph" style:parent-style-name="Table_20_Contents">
      <style:text-properties fo:font-size="9pt" style:font-size-asian="10pt" style:font-size-complex="10pt"/>
    </style:style>
    <style:style style:name="P34" style:family="paragraph" style:parent-style-name="Table_20_Contents">
      <style:text-properties fo:font-size="9pt" officeooo:rsid="001fa45a" officeooo:paragraph-rsid="001fa45a" style:font-size-asian="10pt" style:font-size-complex="10pt"/>
    </style:style>
    <style:style style:name="P35" style:family="paragraph" style:parent-style-name="Table_20_Contents">
      <style:text-properties fo:font-size="9pt" officeooo:paragraph-rsid="0020c3be" style:font-size-asian="10pt" style:font-size-complex="10pt"/>
    </style:style>
    <style:style style:name="P36" style:family="paragraph" style:parent-style-name="Comment" style:list-style-name="L1">
      <style:text-properties officeooo:paragraph-rsid="00291895"/>
    </style:style>
    <style:style style:name="P37" style:family="paragraph" style:parent-style-name="Comment" style:list-style-name="L1">
      <style:text-properties officeooo:rsid="002bc9f0" officeooo:paragraph-rsid="002bc9f0"/>
    </style:style>
    <style:style style:name="P38" style:family="paragraph" style:parent-style-name="Comment" style:list-style-name="L2">
      <style:text-properties officeooo:rsid="002d8d41" officeooo:paragraph-rsid="002d8d41"/>
    </style:style>
    <style:style style:name="P39" style:family="paragraph" style:parent-style-name="Comment" style:list-style-name="L3">
      <style:text-properties officeooo:rsid="00295274" officeooo:paragraph-rsid="00295274"/>
    </style:style>
    <style:style style:name="P40" style:family="paragraph" style:parent-style-name="Comment" style:list-style-name="L3">
      <style:text-properties officeooo:rsid="0029a57e" officeooo:paragraph-rsid="0029a57e"/>
    </style:style>
    <style:style style:name="P41" style:family="paragraph" style:parent-style-name="Comment">
      <style:text-properties officeooo:rsid="0029a57e" officeooo:paragraph-rsid="002d8d41"/>
    </style:style>
    <style:style style:name="P42" style:family="paragraph" style:parent-style-name="Comment" style:list-style-name="L4">
      <style:text-properties officeooo:rsid="0029a57e" officeooo:paragraph-rsid="002d8d41"/>
    </style:style>
    <style:style style:name="P43" style:family="paragraph" style:parent-style-name="Comment" style:list-style-name="L4">
      <style:text-properties officeooo:rsid="002abb2a" officeooo:paragraph-rsid="002d8d41"/>
    </style:style>
    <style:style style:name="P44" style:family="paragraph" style:parent-style-name="Comment" style:list-style-name="L5">
      <style:text-properties officeooo:rsid="003079d6" officeooo:paragraph-rsid="003079d6"/>
    </style:style>
    <style:style style:name="P45" style:family="paragraph" style:parent-style-name="Comment" style:list-style-name="L6">
      <style:text-properties officeooo:rsid="0032756d" officeooo:paragraph-rsid="0032756d"/>
    </style:style>
    <style:style style:name="P46" style:family="paragraph" style:parent-style-name="Comment">
      <style:text-properties officeooo:rsid="0032756d" officeooo:paragraph-rsid="0032756d"/>
    </style:style>
    <style:style style:name="P47" style:family="paragraph" style:parent-style-name="Heading_20_2">
      <style:paragraph-properties fo:text-align="justify" style:justify-single-word="false"/>
      <style:text-properties officeooo:rsid="001e036a" officeooo:paragraph-rsid="001e036a"/>
    </style:style>
    <style:style style:name="P48" style:family="paragraph" style:parent-style-name="Heading_20_2">
      <style:text-properties officeooo:rsid="001e036a" officeooo:paragraph-rsid="001e036a"/>
    </style:style>
    <style:style style:name="P49" style:family="paragraph" style:parent-style-name="Heading_20_2">
      <style:text-properties officeooo:rsid="002125ae" officeooo:paragraph-rsid="002125ae"/>
    </style:style>
    <style:style style:name="P50" style:family="paragraph" style:parent-style-name="Heading_20_2">
      <style:text-properties officeooo:rsid="0026fd50" officeooo:paragraph-rsid="0026fd50"/>
    </style:style>
    <style:style style:name="P51" style:family="paragraph" style:parent-style-name="Heading_20_2">
      <style:text-properties officeooo:rsid="0034643e" officeooo:paragraph-rsid="0034643e"/>
    </style:style>
    <style:style style:name="P52" style:family="paragraph" style:parent-style-name="Heading_20_2">
      <style:text-properties officeooo:rsid="00372fdd" officeooo:paragraph-rsid="00372fdd"/>
    </style:style>
    <style:style style:name="P53" style:family="paragraph" style:parent-style-name="Heading_20_2">
      <style:text-properties officeooo:rsid="00383d32" officeooo:paragraph-rsid="00383d32"/>
    </style:style>
    <style:style style:name="P54" style:family="paragraph" style:parent-style-name="Heading_20_3">
      <style:text-properties officeooo:rsid="001e036a" officeooo:paragraph-rsid="001e036a"/>
    </style:style>
    <style:style style:name="P55" style:family="paragraph" style:parent-style-name="Heading_20_3">
      <style:text-properties officeooo:rsid="002125ae" officeooo:paragraph-rsid="002125ae"/>
    </style:style>
    <style:style style:name="P56" style:family="paragraph" style:parent-style-name="Heading_20_3">
      <style:text-properties officeooo:rsid="0024fe31" officeooo:paragraph-rsid="0024fe31"/>
    </style:style>
    <style:style style:name="P57" style:family="paragraph" style:parent-style-name="Heading_20_3">
      <style:text-properties officeooo:rsid="0036e49f" officeooo:paragraph-rsid="0036e49f"/>
    </style:style>
    <style:style style:name="P58" style:family="paragraph" style:parent-style-name="Heading_20_3">
      <style:text-properties officeooo:rsid="00372fdd" officeooo:paragraph-rsid="00372fdd"/>
    </style:style>
    <style:style style:name="P59" style:family="paragraph" style:parent-style-name="Heading_20_3">
      <style:text-properties officeooo:rsid="00383d32" officeooo:paragraph-rsid="00383d32"/>
    </style:style>
    <style:style style:name="P60" style:family="paragraph" style:parent-style-name="Heading_20_4">
      <style:text-properties officeooo:rsid="0026fd50" officeooo:paragraph-rsid="00289dac"/>
    </style:style>
    <style:style style:name="P61" style:family="paragraph" style:parent-style-name="Heading_20_4">
      <style:text-properties officeooo:rsid="0026fd50" officeooo:paragraph-rsid="0026fd50"/>
    </style:style>
    <style:style style:name="T1" style:family="text">
      <style:text-properties fo:color="#ffd320" loext:opacity="100%" fo:language="pt" fo:country="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en" fo:country="US" fo:font-style="italic" style:text-underline-style="none" style:font-style-asian="italic" style:font-style-complex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officeooo:rsid="001fa45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125ae"/>
    </style:style>
    <style:style style:name="T9" style:family="text">
      <style:text-properties style:text-underline-style="solid" style:text-underline-width="auto" style:text-underline-color="font-color" officeooo:rsid="0024c432" fo:background-color="#ff420e" loext:char-shading-value="0"/>
    </style:style>
    <style:style style:name="T10" style:family="text">
      <style:text-properties style:text-underline-style="solid" style:text-underline-width="auto" style:text-underline-color="font-color" officeooo:rsid="0026fd50"/>
    </style:style>
    <style:style style:name="T11" style:family="text">
      <style:text-properties style:text-underline-style="solid" style:text-underline-width="auto" style:text-underline-color="font-color" officeooo:rsid="002abb2a"/>
    </style:style>
    <style:style style:name="T12" style:family="text">
      <style:text-properties style:text-underline-style="solid" style:text-underline-width="auto" style:text-underline-color="font-color" officeooo:rsid="003079d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34643e" style:font-style-asian="italic" style:font-weight-asian="bold" style:font-style-complex="italic" style:font-weight-complex="bold"/>
    </style:style>
    <style:style style:name="T16" style:family="text">
      <style:text-properties officeooo:rsid="001fa45a"/>
    </style:style>
    <style:style style:name="T17" style:family="text">
      <style:text-properties officeooo:rsid="0020c3be"/>
    </style:style>
    <style:style style:name="T18" style:family="text">
      <style:text-properties fo:language="pt" fo:country="PT" fo:font-style="italic" style:font-style-asian="italic" style:font-style-complex="italic"/>
    </style:style>
    <style:style style:name="T19" style:family="text">
      <style:text-properties officeooo:rsid="002125ae"/>
    </style:style>
    <style:style style:name="T20" style:family="text">
      <style:text-properties officeooo:rsid="00223c4e"/>
    </style:style>
    <style:style style:name="T21" style:family="text">
      <style:text-properties officeooo:rsid="00289dac"/>
    </style:style>
    <style:style style:name="T22" style:family="text">
      <style:text-properties officeooo:rsid="0029189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91895" style:font-weight-asian="bold" style:font-weight-complex="bold"/>
    </style:style>
    <style:style style:name="T25" style:family="text">
      <style:text-properties officeooo:rsid="00295274"/>
    </style:style>
    <style:style style:name="T26" style:family="text">
      <style:text-properties officeooo:rsid="0029a57e"/>
    </style:style>
    <style:style style:name="T27" style:family="text">
      <style:text-properties officeooo:rsid="002abb2a"/>
    </style:style>
    <style:style style:name="T28" style:family="text">
      <style:text-properties officeooo:rsid="002d8d41"/>
    </style:style>
    <style:style style:name="T29" style:family="text">
      <style:text-properties officeooo:rsid="002efe6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6e49f" style:font-weight-asian="normal" style:font-weight-complex="normal"/>
    </style:style>
    <style:style style:name="T32" style:family="text">
      <style:text-properties fo:font-style="normal" style:text-underline-style="none" fo:font-weight="normal" officeooo:rsid="002efe69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solid" style:text-underline-width="auto" style:text-underline-color="font-color" fo:font-weight="normal" officeooo:rsid="0034643e" style:font-style-asian="normal" style:font-weight-asian="normal" style:font-style-complex="normal" style:font-weight-complex="normal"/>
    </style:style>
    <style:style style:name="T34" style:family="text">
      <style:text-properties officeooo:rsid="003079d6"/>
    </style:style>
    <style:style style:name="T35" style:family="text">
      <style:text-properties officeooo:rsid="0032756d"/>
    </style:style>
    <style:style style:name="T36" style:family="text">
      <style:text-properties officeooo:rsid="0034643e"/>
    </style:style>
    <style:style style:name="T37" style:family="text">
      <style:text-properties officeooo:rsid="0036e49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2748_2460484131"/>Title<text:bookmark-end text:name="__RefHeading___Toc2748_2460484131"/>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First Page Contents </text:p>
            <text:p text:style-name="P5">(ver modelo <text:span text:style-name="T20">para detalhes de formatação</text:span>)</text:p>
          </table:table-cell>
          <table:covered-table-cell/>
        </table:table-row>
        <table:table-row>
          <table:table-cell table:style-name="Table1.A2" office:value-type="string">
            <text:p text:style-name="Comment">Title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Comment">Subtitle</text:p>
          </table:table-cell>
          <table:table-cell table:style-name="Table1.B2" office:value-type="string">
            <text:p text:style-name="P3">N/A</text:p>
          </table:table-cell>
        </table:table-row>
        <table:table-row>
          <table:table-cell table:style-name="Table1.A2" office:value-type="string">
            <text:p text:style-name="Comment">Author Name</text:p>
          </table:table-cell>
          <table:table-cell table:style-name="Table1.B2" office:value-type="string">
            <text:p text:style-name="P34">Fernando Azeredo</text:p>
          </table:table-cell>
        </table:table-row>
        <table:table-row>
          <table:table-cell table:style-name="Table1.A2" office:value-type="string">
            <text:p text:style-name="Comment">Faculty/Department</text:p>
          </table:table-cell>
          <table:table-cell table:style-name="Table1.B2" office:value-type="string">
            <text:p text:style-name="P33">Mestrado em Multimédia da Universidade do Porto</text:p>
          </table:table-cell>
        </table:table-row>
        <table:table-row>
          <table:table-cell table:style-name="Table1.A2" office:value-type="string">
            <text:p text:style-name="Comment">Orientador</text:p>
          </table:table-cell>
          <table:table-cell table:style-name="Table1.B2" office:value-type="string">
            <text:p text:style-name="P33"><text:s/><text:span text:style-name="T16">António Sá Pinto </text:span><text:span text:style-name="T17">(PhD)</text:span></text:p>
          </table:table-cell>
        </table:table-row>
        <table:table-row>
          <table:table-cell table:style-name="Table1.A2" office:value-type="string">
            <text:p text:style-name="P3">Date</text:p>
          </table:table-cell>
          <table:table-cell table:style-name="Table1.B2" office:value-type="string">
            <text:p text:style-name="P3">July 2026</text:p>
          </table:table-cell>
        </table:table-row>
        <table:table-row>
          <table:table-cell table:style-name="Table1.B2" table:number-columns-spanned="2" office:value-type="string">
            <text:p text:style-name="P4">Second Page</text:p>
          </table:table-cell>
          <table:covered-table-cell/>
        </table:table-row>
        <table:table-row>
          <table:table-cell table:style-name="Table1.A2" office:value-type="string">
            <text:p text:style-name="Comment">Presidente</text:p>
          </table:table-cell>
          <table:table-cell table:style-name="Table1.B2" office:value-type="string">
            <text:p text:style-name="Comment">Nome do Presidente (Título)</text:p>
          </table:table-cell>
        </table:table-row>
        <table:table-row>
          <table:table-cell table:style-name="Table1.A2" office:value-type="string">
            <text:p text:style-name="Comment">Vogal Externo:</text:p>
          </table:table-cell>
          <table:table-cell table:style-name="Table1.B2" office:value-type="string">
            <text:p text:style-name="Comment">Nome do Arguente (Título)</text:p>
          </table:table-cell>
        </table:table-row>
        <table:table-row>
          <table:table-cell table:style-name="Table1.A2" office:value-type="string">
            <text:p text:style-name="Comment">Orientador:</text:p>
          </table:table-cell>
          <table:table-cell table:style-name="Table1.B2" office:value-type="string">
            <text:p text:style-name="P35"><text:s/><text:span text:style-name="T6">António</text:span><text:span text:style-name="T16"> Sá Pinto </text:span><text:span text:style-name="T17">(PhD)</text:span></text:p>
          </table:table-cell>
        </table:table-row>
      </table:table>
      <text:p text:style-name="P2"/>
      <text:p text:style-name="P2"/>
      <text:h text:style-name="Heading_20_2" text:outline-level="2"><text:bookmark-start text:name="__RefHeading___Toc2750_2460484131"/>Summary<text:bookmark-end text:name="__RefHeading___Toc2750_2460484131"/></text:h>
      <text:h text:style-name="P47" text:outline-level="2"><text:bookmark-start text:name="__RefHeading___Toc2752_2460484131"/>Abstract<text:bookmark-end text:name="__RefHeading___Toc2752_2460484131"/></text:h>
      <text:h text:style-name="P48" text:outline-level="2"><text:bookmark-start text:name="__RefHeading___Toc2754_2460484131"/>Acknowledgments<text:bookmark-end text:name="__RefHeading___Toc2754_2460484131"/></text:h>
      <text:h text:style-name="P48" text:outline-level="2"><text:bookmark-start text:name="__RefHeading___Toc2756_2460484131"/>Index<text:bookmark-end text:name="__RefHeading___Toc2756_2460484131"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5"><text:a xlink:type="simple" xlink:href="#__RefHeading___Toc2748_2460484131" text:style-name="Index_20_Link" text:visited-style-name="Index_20_Link">Title<text:tab/>1</text:a></text:p>
          <text:p text:style-name="P26"><text:a xlink:type="simple" xlink:href="#__RefHeading___Toc2750_2460484131" text:style-name="Index_20_Link" text:visited-style-name="Index_20_Link">Summary<text:tab/>1</text:a></text:p>
          <text:p text:style-name="P26"><text:a xlink:type="simple" xlink:href="#__RefHeading___Toc2752_2460484131" text:style-name="Index_20_Link" text:visited-style-name="Index_20_Link">Abstract<text:tab/>1</text:a></text:p>
          <text:p text:style-name="P26"><text:a xlink:type="simple" xlink:href="#__RefHeading___Toc2754_2460484131" text:style-name="Index_20_Link" text:visited-style-name="Index_20_Link">Acknowledgments<text:tab/>1</text:a></text:p>
          <text:p text:style-name="P26"><text:a xlink:type="simple" xlink:href="#__RefHeading___Toc2756_2460484131" text:style-name="Index_20_Link" text:visited-style-name="Index_20_Link">Index<text:tab/>1</text:a></text:p>
          <text:p text:style-name="P26"><text:a xlink:type="simple" xlink:href="#__RefHeading___Toc2758_2460484131" text:style-name="Index_20_Link" text:visited-style-name="Index_20_Link">List of Figures<text:tab/>1</text:a></text:p>
          <text:p text:style-name="P26"><text:a xlink:type="simple" xlink:href="#__RefHeading___Toc2760_2460484131" text:style-name="Index_20_Link" text:visited-style-name="Index_20_Link">List of Tables<text:tab/>1</text:a></text:p>
          <text:p text:style-name="P26"><text:a xlink:type="simple" xlink:href="#__RefHeading___Toc2762_2460484131" text:style-name="Index_20_Link" text:visited-style-name="Index_20_Link">List of Abbreviations<text:tab/>1</text:a></text:p>
          <text:p text:style-name="P26"><text:a xlink:type="simple" xlink:href="#__RefHeading___Toc2764_2460484131" text:style-name="Index_20_Link" text:visited-style-name="Index_20_Link">Introduction<text:tab/>1</text:a></text:p>
          <text:p text:style-name="P27"><text:a xlink:type="simple" xlink:href="#__RefHeading___Toc2766_2460484131" text:style-name="Index_20_Link" text:visited-style-name="Index_20_Link">Motivation<text:tab/>1</text:a></text:p>
          <text:p text:style-name="P27"><text:a xlink:type="simple" xlink:href="#__RefHeading___Toc2768_2460484131" text:style-name="Index_20_Link" text:visited-style-name="Index_20_Link">Problems, Hypothesis and Investigation Objectives<text:tab/>1</text:a></text:p>
          <text:p text:style-name="P27"><text:a xlink:type="simple" xlink:href="#__RefHeading___Toc2770_2460484131" text:style-name="Index_20_Link" text:visited-style-name="Index_20_Link">Methodology<text:tab/>1</text:a></text:p>
          <text:p text:style-name="P27"><text:a xlink:type="simple" xlink:href="#__RefHeading___Toc2772_2460484131" text:style-name="Index_20_Link" text:visited-style-name="Index_20_Link">Dissertation Structure<text:tab/>1</text:a></text:p>
          <text:p text:style-name="P26"><text:a xlink:type="simple" xlink:href="#__RefHeading___Toc2774_2460484131" text:style-name="Index_20_Link" text:visited-style-name="Index_20_Link">Literature Review<text:tab/>1</text:a></text:p>
          <text:p text:style-name="P27"><text:a xlink:type="simple" xlink:href="#__RefHeading___Toc2776_2460484131" text:style-name="Index_20_Link" text:visited-style-name="Index_20_Link">Introduction<text:tab/>1</text:a></text:p>
          <text:p text:style-name="P28"><text:a xlink:type="simple" xlink:href="#__RefHeading___Toc2778_2460484131" text:style-name="Index_20_Link" text:visited-style-name="Index_20_Link">MIR Visualization Tools<text:tab/>1</text:a></text:p>
          <text:p text:style-name="P28"><text:a xlink:type="simple" xlink:href="#__RefHeading___Toc2780_2460484131" text:style-name="Index_20_Link" text:visited-style-name="Index_20_Link">Beat Tracking and Beat Annotation Problem<text:tab/>1</text:a></text:p>
          <text:p text:style-name="P28"><text:a xlink:type="simple" xlink:href="#__RefHeading___Toc2782_2460484131" text:style-name="Index_20_Link" text:visited-style-name="Index_20_Link">Score Formats<text:tab/>1</text:a></text:p>
          <text:p text:style-name="P28"><text:a xlink:type="simple" xlink:href="#__RefHeading___Toc2784_2460484131" text:style-name="Index_20_Link" text:visited-style-name="Index_20_Link">SVG format usage in MIR<text:tab/>1</text:a></text:p>
          <text:p text:style-name="P27"><text:a xlink:type="simple" xlink:href="#__RefHeading___Toc2786_2460484131" text:style-name="Index_20_Link" text:visited-style-name="Index_20_Link">Summary/Conclusions<text:tab/>1</text:a></text:p>
          <text:p text:style-name="P26"><text:a xlink:type="simple" xlink:href="#__RefHeading___Toc2788_2460484131" text:style-name="Index_20_Link" text:visited-style-name="Index_20_Link">Analysis and Proposed Solution<text:tab/>1</text:a></text:p>
          <text:p text:style-name="P26"><text:a xlink:type="simple" xlink:href="#__RefHeading___Toc2790_2460484131" text:style-name="Index_20_Link" text:visited-style-name="Index_20_Link">Implementation<text:tab/>1</text:a></text:p>
          <text:p text:style-name="P27"><text:a xlink:type="simple" xlink:href="#__RefHeading___Toc2792_2460484131" text:style-name="Index_20_Link" text:visited-style-name="Index_20_Link">Developed Iterations<text:tab/>1</text:a></text:p>
          <text:p text:style-name="P27"><text:a xlink:type="simple" xlink:href="#__RefHeading___Toc2794_2460484131" text:style-name="Index_20_Link" text:visited-style-name="Index_20_Link">BeatScoreWarped (ou lá qual for o nome que decidir dar)<text:tab/>1</text:a></text:p>
          <text:p text:style-name="P27"><text:a xlink:type="simple" xlink:href="#__RefHeading___Toc2796_2460484131" text:style-name="Index_20_Link" text:visited-style-name="Index_20_Link">How to Further Customize Visualizations<text:tab/>2</text:a></text:p>
          <text:p text:style-name="P27"><text:a xlink:type="simple" xlink:href="#__RefHeading___Toc2798_2460484131" text:style-name="Index_20_Link" text:visited-style-name="Index_20_Link">Summary<text:tab/>2</text:a></text:p>
          <text:p text:style-name="P26"><text:a xlink:type="simple" xlink:href="#__RefHeading___Toc2800_2460484131" text:style-name="Index_20_Link" text:visited-style-name="Index_20_Link">Conclusion<text:tab/>2</text:a></text:p>
          <text:p text:style-name="P27"><text:a xlink:type="simple" xlink:href="#__RefHeading___Toc2802_2460484131" text:style-name="Index_20_Link" text:visited-style-name="Index_20_Link">Achievements<text:tab/>2</text:a></text:p>
          <text:p text:style-name="P27"><text:a xlink:type="simple" xlink:href="#__RefHeading___Toc2804_2460484131" text:style-name="Index_20_Link" text:visited-style-name="Index_20_Link">Future Work<text:tab/>2</text:a></text:p>
          <text:p text:style-name="P26"><text:a xlink:type="simple" xlink:href="#__RefHeading___Toc2806_2460484131" text:style-name="Index_20_Link" text:visited-style-name="Index_20_Link">References<text:tab/>2</text:a></text:p>
          <text:p text:style-name="P26"><text:a xlink:type="simple" xlink:href="#__RefHeading___Toc2808_2460484131" text:style-name="Index_20_Link" text:visited-style-name="Index_20_Link">Appendix<text:tab/>2</text:a></text:p>
          <text:p text:style-name="P26"><text:a xlink:type="simple" xlink:href="#__RefHeading___Toc2810_2460484131" text:style-name="Index_20_Link" text:visited-style-name="Index_20_Link">Index<text:tab/>2</text:a></text:p>
        </text:index-body>
      </text:table-of-content>
      <text:p text:style-name="P29"/>
      <text:h text:style-name="P49" text:outline-level="2"><text:bookmark-start text:name="__RefHeading___Toc2758_2460484131"/>List of Figures <text:bookmark-end text:name="__RefHeading___Toc2758_2460484131"/></text:h>
      <text:h text:style-name="P49" text:outline-level="2"><text:bookmark-start text:name="__RefHeading___Toc2760_2460484131"/>List of Tables<text:bookmark-end text:name="__RefHeading___Toc2760_2460484131"/></text:h>
      <text:h text:style-name="P50" text:outline-level="2"><text:bookmark-start text:name="__RefHeading___Toc2762_2460484131"/>List of Abbreviations<text:bookmark-end text:name="__RefHeading___Toc2762_2460484131"/></text:h>
      <text:h text:style-name="P48" text:outline-level="2"><text:bookmark-start text:name="__RefHeading___Toc2764_2460484131"/>Introduction<text:bookmark-end text:name="__RefHeading___Toc2764_2460484131"/></text:h>
      <text:p text:style-name="P31">O primeiro capítulo da dissertação deve servir para apresentar o enquadramento e a motivação do trabalho e para identificar e definir os problemas as hipóteses e os objetivos desta dissertação. Deve resumir as metodologias utilizadas no trabalho e termina apresentando um breve resumo de cada um dos capítulos posteriores.</text:p>
      <text:p text:style-name="P30"><text:span text:style-name="T2">“</text:span><text:span text:style-name="T3">Introduction should be written to engage the interest</text:span><text:span text:style-name="T4"> </text:span><text:span text:style-name="T5">of the reader. It should also give the reader an </text:span><text:span text:style-name="T3">idea of how the dissertation is structured</text:span><text:span text:style-name="T5">, and in doing so, </text:span><text:span text:style-name="T3">define the thread of the contents.</text:span><text:span text:style-name="T2">”</text:span></text:p>
      <text:h text:style-name="P54" text:outline-level="3"><text:bookmark-start text:name="__RefHeading___Toc2766_2460484131"/>Motivation<text:bookmark-end text:name="__RefHeading___Toc2766_2460484131"/></text:h>
      <text:p text:style-name="P32">Esta secção descreve a <text:span text:style-name="T7">área em que o trabalho se insere</text:span>.<text:span text:style-name="T19">(…) Deve ainda fazer </text:span><text:span text:style-name="T8">a contextualização e justificação do estudo</text:span><text:span text:style-name="T19"> e a sua i</text:span><text:span text:style-name="T8">mportância/motivação para o investigador e para a comunidade.</text:span></text:p>
      <text:h text:style-name="P55" text:outline-level="3"><text:bookmark-start text:name="__RefHeading___Toc2768_2460484131"/>Pr<text:span text:style-name="T20">oblems, Hypothesis and Investigation Objectives</text:span><text:bookmark-end text:name="__RefHeading___Toc2768_2460484131"/></text:h>
      <text:p text:style-name="P6">Começa por f<text:span text:style-name="T7">ormular o problema e as questões de investigação</text:span>. Seguidamente <text:span text:style-name="T7">identifica as hipóteses que irão dar resposta ao problema e os objetivos propostos para as validar</text:span>.</text:p>
      <text:h text:style-name="Heading_20_3" text:outline-level="3"><text:bookmark-start text:name="__RefHeading___Toc2770_2460484131"/>Methodology<text:bookmark-end text:name="__RefHeading___Toc2770_2460484131"/></text:h>
      <text:p text:style-name="P6"><text:span text:style-name="T7">Descreve a metodologia de investigação utilizada</text:span> para a realização da dissertação e <text:span text:style-name="T7">aborda a natureza do estudo ou classificação da investigação </text:span><text:span text:style-name="T9">(NÃO SEI O QUE ISTO É)</text:span>. Dependendo da natureza da investigação poderá descrever os métodos de recolha de dados/técnicas/instrumentos, a amostra e técnicas de tratamento de dados, bem como <text:span text:style-name="T7">o desenvolvimento e validação de protótipos aplicacionais</text:span>.</text:p>
      <text:h text:style-name="Heading_20_3" text:outline-level="3"><text:bookmark-start text:name="__RefHeading___Toc2772_2460484131"/>Dissertation Structure<text:bookmark-end text:name="__RefHeading___Toc2772_2460484131"/></text:h>
      <text:p text:style-name="P8"><text:span text:style-name="T7">Descrição </text:span><text:span text:style-name="T10">muito </text:span><text:span text:style-name="T7">breve </text:span><text:span text:style-name="T10">e geral </text:span><text:span text:style-name="T7">dos conteudos de cada capítulo.</text:span></text:p>
      <text:h text:style-name="Heading_20_2" text:outline-level="2"><text:bookmark-start text:name="__RefHeading___Toc2774_2460484131"/>Literature Review<text:bookmark-end text:name="__RefHeading___Toc2774_2460484131"/></text:h>
      <text:p text:style-name="P6">Neste capítulo é <text:span text:style-name="T7">descrito o estado da arte</text:span> e são apresentados <text:span text:style-name="T7">trabalhos relacionados</text:span> de forma a <text:span text:style-name="T7">mostrar o que existe no mesmo domínio</text:span> e quais os <text:span text:style-name="T7">problemas encontrados</text:span>. Deve deixar claro que existe uma <text:span text:style-name="T7">oportunidade de desenvolvimento que cobre alguma falha concreta</text:span>.</text:p>
      <text:p text:style-name="P6">O capítulo deve também <text:span text:style-name="T7">efectuar uma revisão tecnológica às principais ferramentas utilizáveis no âmbito do projeto</text:span>, <text:span text:style-name="T7">justificando futuras escolhas.</text:span></text:p>
      <text:h text:style-name="P56" text:outline-level="3"><text:bookmark-start text:name="__RefHeading___Toc2776_2460484131"/>Introduction<text:bookmark-end text:name="__RefHeading___Toc2776_2460484131"/></text:h>
      <text:p text:style-name="P21">Defining MIR research field.<text:line-break/>Defining BT and its importance to MIR reshearch.</text:p>
      <text:h text:style-name="P60" text:outline-level="4"><text:bookmark-start text:name="__RefHeading___Toc2778_2460484131"/>MIR Visualization Tools<text:bookmark-end text:name="__RefHeading___Toc2778_2460484131"/></text:h>
      <text:p text:style-name="P11">What are the main tools for visualization of MIR tasks?</text:p>
      <text:p text:style-name="P10"><text:tab/>Sonic Visualizer, Audacity etc.</text:p>
      <text:p text:style-name="P10"><text:tab/>Matplotlib. Modusa</text:p>
      <text:h text:style-name="P61" text:outline-level="4"><text:bookmark-start text:name="__RefHeading___Toc2780_2460484131"/>Beat Tracking and Beat Annotation Problem<text:bookmark-end text:name="__RefHeading___Toc2780_2460484131"/></text:h>
      <text:p text:style-name="P11">BT and BA relation. </text:p>
      <text:p text:style-name="P11"><text:tab/><text:span text:style-name="T22">What is BA?</text:span></text:p>
      <text:p text:style-name="P11"><text:tab/>Contemporary BT research is focused on applying ML methods.</text:p>
      <text:p text:style-name="P12"><text:tab/><text:tab/><text:span text:style-name="T23">W</text:span><text:span text:style-name="T24">hy?</text:span><text:span text:style-name="T22"> </text:span></text:p>
      <text:list text:style-name="L1">
        <text:list-item>
          <text:p text:style-name="P36"><text:span text:style-name="T22">The musical beat, in some instances, can have non linear solutions. The definition of Beat is determined by human perspective and preference. </text:span><text:span text:style-name="T25">Unless defined by a composer/score then it can assume multiple correct assessments. Because of it’s semi-subjective nature, BT is focused in employing various ML through different techniques try take this subjective nature into account</text:span></text:p>
          <text:p text:style-name="P36"/>
          <text:p text:style-name="P37">Although BT algorithms can detect quite easily the <text:span text:style-name="T13">tactus</text:span> of a musical recording, they can falter when defining the actual beat. The most common BT errors that occur that demonstrate the current BT challenge are:</text:p>
        </text:list-item>
      </text:list>
      <text:list text:style-name="L2">
        <text:list-item>
          <text:list>
            <text:list-item>
              <text:p text:style-name="P38">Half/Double beat detection. </text:p>
            </text:list-item>
            <text:list-item>
              <text:p text:style-name="P38">Duplicate Detection</text:p>
            </text:list-item>
            <text:list-item>
              <text:p text:style-name="P38">False Positives and Negatives</text:p>
            </text:list-item>
          </text:list>
        </text:list-item>
      </text:list>
      <text:p text:style-name="P11"><text:tab/><text:tab/><text:span text:style-name="T23">How?</text:span> </text:p>
      <text:list text:style-name="L3">
        <text:list-item>
          <text:p text:style-name="P39">Because of the ML nature, BT at it’s core, requires increasingly large amounts of human made B<text:span text:style-name="T26">A.</text:span> </text:p>
        </text:list-item>
        <text:list-item>
          <text:p text:style-name="P39">The way each BT algorithm applies these BA datasets can vary a lot (<text:span text:style-name="T14">HingeNet vs ZNSamba vs BeatThis</text:span>).</text:p>
        </text:list-item>
        <text:list-item>
          <text:p text:style-name="P40"><text:s/>For the field <text:s/><text:span text:style-name="T28">to </text:span>evolve there is still a need for accurate human made BA .</text:p>
          <text:p text:style-name="P40"/>
        </text:list-item>
      </text:list>
      <text:p text:style-name="P13"><text:tab/>Even though, BT as a technological field is evolving significantly especially within the last decade there is still room to improve. </text:p>
      <text:p text:style-name="P13"/>
      <text:p text:style-name="P41">BA problem: </text:p>
      <text:list text:style-name="L4">
        <text:list-item>
          <text:p text:style-name="P43">BA Tools and methods:</text:p>
          <text:list>
            <text:list-item>
              <text:p text:style-name="P42">BA manual tools have remain largely the same since the 2000’s (<text:span text:style-name="T18">data que mandei ao calhas</text:span>).</text:p>
            </text:list-item>
            <text:list-item>
              <text:p text:style-name="P42">BA rely on individual methods that vary largely from annotator to annotator. </text:p>
            </text:list-item>
            <text:list-item>
              <text:p text:style-name="P42">Manual BA, is still a time consuming task.</text:p>
            </text:list-item>
            <text:list-item>
              <text:p text:style-name="P42">BT tools can help <text:span text:style-name="T28">in various ways</text:span>, however <text:span text:style-name="T27">obtaining, visualizing and using modern BT solutions can be hard for some non technical annotators to access.</text:span></text:p>
            </text:list-item>
          </text:list>
        </text:list-item>
        <text:list-item>
          <text:p text:style-name="P43">Visualization Problem:</text:p>
          <text:list>
            <text:list-item>
              <text:p text:style-name="P42"><text:span text:style-name="T27">There is a need for tools that help </text:span><text:span text:style-name="T11">visualizing beat related data</text:span><text:span text:style-name="T27">. Scores, BT data, spectral data, onsets etc. </text:span></text:p>
            </text:list-item>
            <text:list-item>
              <text:p text:style-name="P43">Tools to help <text:span text:style-name="T7">visualize more accurately beats</text:span>. With the intent <text:s/>of verifying and comparing different assessments (either from BA and/or BT outputs). <text:span text:style-name="T29">(</text:span><text:span text:style-name="T14">ShiftIfYouCan</text:span><text:span text:style-name="T32">)</text:span></text:p>
              <text:p text:style-name="P43"/>
            </text:list-item>
          </text:list>
        </text:list-item>
      </text:list>
      <text:p text:style-name="P14">Onsets and Beats relation.</text:p>
      <text:p text:style-name="P14"><text:tab/><text:span text:style-name="T29">Onsets: Real time of individual musical events in a given recording/performance.</text:span></text:p>
      <text:p text:style-name="P16"><text:span text:style-name="T27"><text:tab/></text:span><text:span text:style-name="T29">Although these are two different concepts, they interrelated. A lot of times (not always) beats correspond to specific onsets.</text:span></text:p>
      <text:p text:style-name="P15"><text:tab/>Modern onset detection algorithms are reliable, specifically onset to score algorithms. In these cases (music recordings with scores) beat detection can be algorithmically accurately assessed. <text:span text:style-name="T36">(</text:span><text:span text:style-name="T15">Piano Precision</text:span><text:span text:style-name="T33">)</text:span></text:p>
      <text:p text:style-name="P15"/>
      <text:p text:style-name="P18"><text:span text:style-name="T34">Thus there is a clear need for tools that allow to view </text:span><text:span text:style-name="T12">Audio data, Beat data and Score in a unified and aligned manner</text:span><text:span text:style-name="T34">. Such a tool can benefit:</text:span></text:p>
      <text:list text:style-name="L5">
        <text:list-item>
          <text:p text:style-name="P44">Verifying BT and BA assessments.</text:p>
        </text:list-item>
        <text:list-item>
          <text:p text:style-name="P44">Comparing BT ouputs.</text:p>
        </text:list-item>
        <text:list-item>
          <text:p text:style-name="P44">Give relevant visual feedback for human annotators.</text:p>
        </text:list-item>
      </text:list>
      <text:h text:style-name="P61" text:outline-level="4"><text:bookmark-start text:name="__RefHeading___Toc2782_2460484131"/>Score Formats<text:bookmark-end text:name="__RefHeading___Toc2782_2460484131"/></text:h>
      <text:p text:style-name="P9"><text:span text:style-name="T21">Score Formats: </text:span><text:span text:style-name="T35">XML, </text:span><text:span text:style-name="T21"><text:s/></text:span>.<text:span text:style-name="T35">MUSCXML</text:span>, <text:span text:style-name="T35">MEI</text:span></text:p>
      <text:p text:style-name="P10"><text:span text:style-name="T21">V</text:span>erovio</text:p>
      <text:p text:style-name="P11">ScoreWarp</text:p>
      <text:h text:style-name="P61" text:outline-level="4"><text:bookmark-start text:name="__RefHeading___Toc2784_2460484131"/>SVG format usage in MIR<text:bookmark-end text:name="__RefHeading___Toc2784_2460484131"/></text:h>
      <text:p text:style-name="P17">SVG defenition: a XML and vector based image format for two-dimensional graphics.</text:p>
      <text:p text:style-name="P17"/>
      <text:p text:style-name="P19">SVG advantages:</text:p>
      <text:list text:style-name="L6">
        <text:list-item>
          <text:p text:style-name="P45">Easily editable.</text:p>
        </text:list-item>
        <text:list-item>
          <text:p text:style-name="P45">Human readable</text:p>
        </text:list-item>
        <text:list-item>
          <text:p text:style-name="P45">Resolution Independent</text:p>
        </text:list-item>
        <text:list-item>
          <text:p text:style-name="P45">Great integration for browsers and web applications</text:p>
        </text:list-item>
        <text:list-item>
          <text:p text:style-name="P45">Open standard. Meaning, the specification is freely and publicly available to anyone.</text:p>
        </text:list-item>
      </text:list>
      <text:p text:style-name="P20"/>
      <text:p text:style-name="P19">SVG file is at it’s core a plain text markup.</text:p>
      <text:p text:style-name="P20"/>
      <text:p text:style-name="P19">Most music formats are XML based so the integration with SVG format is facilitated. Verovio and ScoreWarp are examples of this correlation. </text:p>
      <text:p text:style-name="P19"/>
      <text:p text:style-name="P21">Because of this (editable, open, resolution independent, etc.) SVG visualization formats are a reliable option for MIR applications. </text:p>
      <text:h text:style-name="P56" text:outline-level="3"><text:bookmark-start text:name="__RefHeading___Toc2786_2460484131"/>Summary/Conclusions<text:bookmark-end text:name="__RefHeading___Toc2786_2460484131"/></text:h>
      <text:h text:style-name="P51" text:outline-level="2"><text:bookmark-start text:name="__RefHeading___Toc2788_2460484131"/>Analysis and Proposed Solution<text:bookmark-end text:name="__RefHeading___Toc2788_2460484131"/></text:h>
      <text:p text:style-name="P6">Este capítulo deve começar por fazer uma apresentação detalhada do problema a resolver1 podendo mesmo, caso se justifique, constituir-se um capítulo separado só com essa finalidade.</text:p>
      <text:p text:style-name="Comment"/>
      <text:p text:style-name="P21"><text:span text:style-name="T23">Defining the problem</text:span>: BT, Spectral and Score aligned visualization.</text:p>
      <text:p text:style-name="P21"><text:span text:style-name="T23">Defining the proposed solution</text:span>: A visualization tool that can present BT and Audio data with an aligned musical score.</text:p>
      <text:p text:style-name="Comment"/>
      <text:p text:style-name="P22">Developed solution: <text:span text:style-name="T30">Tool for generating c</text:span><text:span text:style-name="T31">u</text:span><text:span text:style-name="T30">st</text:span><text:span text:style-name="T31">o</text:span><text:span text:style-name="T30">m visualizations that present beat data, spectrogram and score all aligned. </text:span></text:p>
      <text:p text:style-name="P22"/>
      <text:p text:style-name="P22">System Architecture: <text:span text:style-name="T30">Python based tool, that employs a modular and Object Oriented architecture for generating the visualizations.</text:span></text:p>
      <text:p text:style-name="P22"><text:span text:style-name="T30"/></text:p>
      <text:p text:style-name="P22">Choices made and why</text:p>
      <text:p text:style-name="P22"/>
      <text:h text:style-name="Heading_20_2" text:outline-level="2"><text:bookmark-start text:name="__RefHeading___Toc2790_2460484131"/>Implementation<text:bookmark-end text:name="__RefHeading___Toc2790_2460484131"/></text:h>
      <text:p text:style-name="P6">Este capítulo pode ser dedicado à apresentação de detalhes de nível mais baixo relacionados com o enquadramento e implementação das soluções preconizadas no capítulo anterior. Note-se no entanto que detalhes desnecessários à compreensão do trabalho devem ser remetidos para anexos.</text:p>
      <text:p text:style-name="P6">Dependendo do volume, a avaliação do trabalho realizado pode ser incluída neste capítulo ou pode constituir um capítulo separado.</text:p>
      <text:h text:style-name="P57" text:outline-level="3"><text:bookmark-start text:name="__RefHeading___Toc2792_2460484131"/>Developed Iterations<text:bookmark-end text:name="__RefHeading___Toc2792_2460484131"/></text:h>
      <text:p text:style-name="P7">Aqui abordo as diferentes iterações por que passei e a relevancia que cada uma teve para o projeto. </text:p>
      <text:h text:style-name="P57" text:outline-level="3"><text:bookmark-start text:name="__RefHeading___Toc2794_2460484131"/>BeatScoreWarped <text:span text:style-name="T1">(ou lá qual for o nome que decidir dar)</text:span><text:bookmark-end text:name="__RefHeading___Toc2794_2460484131"/></text:h>
      <text:p text:style-name="P7">Ir em detalhe sobre como a ferramenta foi desenvolvida e como ela funciona.</text:p>
      <text:h text:style-name="Heading_20_3" text:outline-level="3"><text:bookmark-start text:name="__RefHeading___Toc2796_2460484131"/>How to <text:span text:style-name="T37">F</text:span>urther <text:span text:style-name="T37">C</text:span>ustomize Visualizations<text:bookmark-end text:name="__RefHeading___Toc2796_2460484131"/></text:h>
      <text:p text:style-name="P23">Como eu consigo fazer diferentes visualizações alterado o SVG em sí.</text:p>
      <text:h text:style-name="P58" text:outline-level="3"><text:bookmark-start text:name="__RefHeading___Toc2798_2460484131"/>Summary<text:bookmark-end text:name="__RefHeading___Toc2798_2460484131"/></text:h>
      <text:h text:style-name="P52" text:outline-level="2"><text:bookmark-start text:name="__RefHeading___Toc2800_2460484131"/>Conclusion<text:bookmark-end text:name="__RefHeading___Toc2800_2460484131"/></text:h>
      <text:p text:style-name="P24">Este capítulo pode ser dedicado à apresentação de detalhes de nível mais baixo relacionados com o enquadramento e implementação das soluções preconizadas no capítulo anterior. Note-se no entanto que detalhes desnecessários à compreensão do trabalho devem ser remetidos para anexos.</text:p>
      <text:p text:style-name="P24">Dependendo do volume, a avaliação do trabalho realizado pode ser incluída neste capítulo ou pode constituir um capítulo separado.</text:p>
      <text:h text:style-name="P58" text:outline-level="3"><text:bookmark-start text:name="__RefHeading___Toc2802_2460484131"/>Achievements<text:bookmark-end text:name="__RefHeading___Toc2802_2460484131"/></text:h>
      <text:p text:style-name="P24">Concretizações:</text:p>
      <text:p text:style-name="P24"><text:tab/>Provar a necessidade de explorar visualizações que incorporam partituras alinhadas com tempo real de uma performance/gravação.</text:p>
      <text:p text:style-name="P24"><text:tab/>Provar o valor de usar uma ferramenta modular em python.</text:p>
      <text:h text:style-name="P59" text:outline-level="3"><text:bookmark-start text:name="__RefHeading___Toc2804_2460484131"/>Future Work<text:bookmark-end text:name="__RefHeading___Toc2804_2460484131"/></text:h>
      <text:p text:style-name="P23">Problemas da solução:</text:p>
      <text:p text:style-name="P23"><text:tab/>O problema do sistema estar dependente do SVG no formato em que sai do ScoreWarp.</text:p>
      <text:p text:style-name="P23"><text:tab/>Dificuldade em obter os ficheiros correctos (MAPS, MEI, etc)</text:p>
      <text:p text:style-name="P23"><text:tab/>O problema de nao conseguir definir o espaçamento da partitura.</text:p>
      <text:p text:style-name="P23"><text:tab/>O problema da representação do espetrograma como PNG.</text:p>
      <text:p text:style-name="P23">Trabalho Futuro:</text:p>
      <text:p text:style-name="P23"><text:tab/>Integração com um GUI. </text:p>
      <text:p text:style-name="P23"><text:tab/>Problema da paginação</text:p>
      <text:p text:style-name="P23"><text:tab/>Integração para visualização de outros parametros MIR.</text:p>
      <text:p text:style-name="P23"><text:tab/>Integração de metodos para gerar visualizações costumizaveis sem ter de alterar manualmente o SVG.</text:p>
      <text:p text:style-name="P23"/>
      <text:h text:style-name="P53" text:outline-level="2"><text:bookmark-start text:name="__RefHeading___Toc2806_2460484131"/>References<text:bookmark-end text:name="__RefHeading___Toc2806_2460484131"/></text:h>
      <text:h text:style-name="P53" text:outline-level="2"><text:bookmark-start text:name="__RefHeading___Toc2808_2460484131"/>Appendix<text:bookmark-end text:name="__RefHeading___Toc2808_2460484131"/></text:h>
      <text:h text:style-name="P53" text:outline-level="2"><text:bookmark-start text:name="__RefHeading___Toc2810_2460484131"/>Index<text:bookmark-end text:name="__RefHeading___Toc2810_246048413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Citação1" style:family="paragraph" style:parent-style-name="Standard">
      <style:paragraph-properties fo:margin-left="0.3937in" fo:margin-right="0.3937in" fo:margin-top="0.1181in" fo:margin-bottom="0.1181in" style:contextual-spacing="false" fo:text-indent="0in" style:auto-text-indent="false"/>
    </style:style>
    <style:style style:name="Comment" style:family="paragraph" style:parent-style-name="Standard" style:class="extra" style:master-page-name="">
      <style:paragraph-properties style:page-number="auto"/>
      <style:text-properties fo:color="#ffd320" loext:opacity="100%" fo:font-size="9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3:46:15.127766066</meta:creation-date>
    <dc:date>2026-05-27T20:45:45.866211061</dc:date>
    <meta:editing-duration>PT52M1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1" meta:paragraph-count="170" meta:word-count="1413" meta:character-count="9121" meta:non-whitespace-character-count="7858"/>
  </office:meta>
</office:document-meta>
</file>