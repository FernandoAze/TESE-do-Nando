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ef5c" officeooo:paragraph-rsid="001bef5c"/>
    </style:style>
    <style:style style:name="P2" style:family="paragraph" style:parent-style-name="Standard">
      <style:text-properties officeooo:paragraph-rsid="001bef5c"/>
    </style:style>
    <style:style style:name="T1" style:family="text">
      <style:text-properties officeooo:rsid="001bef5c"/>
    </style:style>
    <style:style style:name="T2" style:family="text">
      <style:text-properties fo:font-weight="bold" style:font-weight-asian="bold" style:font-weight-complex="bold"/>
    </style:style>
    <style:style style:name="T3" style:family="text">
      <style:text-properties fo:font-weight="bold" officeooo:rsid="001bef5c" style:font-weight-asian="bold" style:font-weight-complex="bold"/>
    </style:style>
    <style:style style:name="T4" style:family="text">
      <style:text-properties fo:font-weight="bold" officeooo:rsid="001e9d27" style:font-weight-asian="bold" style:font-weight-complex="bold"/>
    </style:style>
    <style:style style:name="T5" style:family="text">
      <style:text-properties officeooo:rsid="001c48cb"/>
    </style:style>
    <style:style style:name="T6" style:family="text">
      <style:text-properties officeooo:rsid="001e9d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S</text:p>
      <text:p text:style-name="P1"/>
      <text:p text:style-name="P1"><text:span text:style-name="T5">(J. </text:span>Jung, <text:span text:style-name="T5">2021)</text:span></text:p>
      <text:p text:style-name="P1"/>
      <text:p text:style-name="P2"><text:span text:style-name="T3">Time-aligned symbolic formats</text:span><text:span text:style-name="T1">: formats where “each note’s onset and offset timing is explicitly provided.”</text:span></text:p>
      <text:p text:style-name="P2"/>
      <text:p text:style-name="P2"><text:span text:style-name="T2">Score Image</text:span>: Sheet music in the form of raw images. <text:s/>Typically scanned from real-world prints or rendered with digital notation software. We cover both synthetic and scanned images while discarding hand-written scores.</text:p>
      <text:p text:style-name="P2"/>
      <text:p text:style-name="P2"><text:span text:style-name="T2">Symbolic Notation</text:span>: Digitized semantic information of <text:s/>sheet music, such as MusicXML (MXL). Along with the pitch and duration of notes, it also includes detailed elements such as slurs, voicing, articulation, and tempo and dynamic markings that are essential to render humanreadable music scores. We employ a modified version of the industry-standard format MusicXML, which we describe further in Section III-B2.</text:p>
      <text:p text:style-name="P2"/>
      <text:p text:style-name="P2"><text:span text:style-name="T2">MIDI</text:span>: Event-based symbolic representation of the performed notes with concrete note onset and offset timings. While notational details such as slurs or articulation are omitted, MIDI is better suited to express human performance with expressive tempo and dynamic changes.</text:p>
      <text:p text:style-name="P2"/>
      <text:p text:style-name="P2"><text:span text:style-name="T2">Audio</text:span>: Recorded from real-world performance or synthesized with virtual instruments.</text:p>
      <text:p text:style-name="P2"/>
      <text:p text:style-name="P2"><text:span text:style-name="T2">Automatic music transcription </text:span>(AMT) is the task of inferring musical notes or notations from audio, and is considered one of the fundamental problems in MIR.</text:p>
      <text:p text:style-name="P2"/>
      <text:p text:style-name="P2"><text:span text:style-name="T4">O</text:span><text:span text:style-name="T2">ptical music recognition</text:span> (OMR) is t<text:span text:style-name="T6">he task of</text:span> transcrib<text:span text:style-name="T6">ing</text:span> music notation from score images. </text:p>
      <text:p text:style-name="P2">A significant bottleneck in OMR research is the limited availability of labeled training data in various styles; while many resources exist for machine-readable symbolic music notation, corresponding real-world scans are relatively scarce. Therefore, much of OMR research relies on synthetic datasets for model trai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1T18:10:46.724094857</meta:creation-date>
    <meta:editing-duration>PT11S</meta:editing-duration>
    <meta:editing-cycles>2</meta:editing-cycles>
    <meta:generator>LibreOffice/24.2.7.2$Linux_X86_64 LibreOffice_project/420$Build-2</meta:generator>
    <dc:date>2026-06-01T18:10:57.210435649</dc:date>
    <meta:document-statistic meta:table-count="0" meta:image-count="0" meta:object-count="0" meta:page-count="1" meta:paragraph-count="10" meta:word-count="242" meta:character-count="1680" meta:non-whitespace-character-count="1445"/>
  </office:meta>
</office:document-meta>
</file>