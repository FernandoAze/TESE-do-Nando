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111" manifest:media-type="application/vnd.sun.star.oleobject"/>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110" manifest:media-type="application/vnd.sun.star.oleobject"/>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106" manifest:media-type="application/vnd.sun.star.oleobject"/>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105" manifest:media-type="application/vnd.sun.star.oleobject"/>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manifest.rdf" manifest:media-type="application/rdf+xml"/>
  <manifest:file-entry manifest:full-path="Obj109" manifest:media-type="application/vnd.sun.star.oleobject"/>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107" manifest:media-type="application/vnd.sun.star.oleobject"/>
  <manifest:file-entry manifest:full-path="Obj108" manifest:media-type="application/vnd.sun.star.oleobjec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102" manifest:media-type="application/vnd.sun.star.oleobject"/>
  <manifest:file-entry manifest:full-path="Obj103" manifest:media-type="application/vnd.sun.star.oleobject"/>
  <manifest:file-entry manifest:full-path="Obj100" manifest:media-type="application/vnd.sun.star.oleobject"/>
  <manifest:file-entry manifest:full-path="Thumbnails/thumbnail.png" manifest:media-type="image/png"/>
  <manifest:file-entry manifest:full-path="settings.xml" manifest:media-type="text/xml"/>
  <manifest:file-entry manifest:full-path="Obj101" manifest:media-type="application/vnd.sun.star.oleobject"/>
  <manifest:file-entry manifest:full-path="Obj104" manifest:media-type="application/vnd.sun.star.oleobject"/>
  <manifest:file-entry manifest:full-path="content.xml" manifest:media-type="text/xml"/>
  <manifest:file-entry manifest:full-path="meta.xml" manifest:media-type="text/xml"/>
  <manifest:file-entry manifest:full-path="Pictures/10000000000001EB000000BFF4667CDF.png" manifest:media-type="image/png"/>
  <manifest:file-entry manifest:full-path="Pictures/1000000100000299000000EAA7755BEC.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imbus Sans L" svg:font-family="'Nimbus Sans L'" style:font-family-generic="system" style:font-pitch="variable"/>
    <style:font-face style:name="PingFang SC" svg:font-family="'PingFang SC'" style:font-family-generic="system" style:font-pitch="variable"/>
    <style:font-face style:name="StarSymbol" svg:font-family="StarSymbol" style:font-family-generic="roman" style:font-pitch="variable"/>
    <style:font-face style:name="StarSymbol1" svg:font-family="Star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9063in" fo:margin-left="0in" fo:margin-top="0in" fo:margin-bottom="0in" table:align="left" style:writing-mode="page"/>
    </style:style>
    <style:style style:name="Table1.A" style:family="table-column">
      <style:table-column-properties style:column-width="0.7882in"/>
    </style:style>
    <style:style style:name="Table1.B" style:family="table-column">
      <style:table-column-properties style:column-width="5.1174in"/>
    </style:style>
    <style:style style:name="Table1.1" style:family="table-row">
      <style:table-row-properties fo:keep-together="auto"/>
    </style:style>
    <style:style style:name="Table1.A1" style:family="table-cell">
      <style:table-cell-properties fo:padding="0in" fo:border="none"/>
    </style:style>
    <style:style style:name="Table1.B1" style:family="table-cell">
      <style:table-cell-properties fo:padding-left="0.0785in" fo:padding-right="0in" fo:padding-top="0in" fo:padding-bottom="0in" fo:border="none"/>
    </style:style>
    <style:style style:name="Table2" style:family="table">
      <style:table-properties style:width="4.8069in" fo:margin-top="0in" fo:margin-bottom="0in" table:align="center" style:writing-mode="page"/>
    </style:style>
    <style:style style:name="Table2.A" style:family="table-column">
      <style:table-column-properties style:column-width="0.4243in"/>
    </style:style>
    <style:style style:name="Table2.B" style:family="table-column">
      <style:table-column-properties style:column-width="1.0625in"/>
    </style:style>
    <style:style style:name="Table2.C" style:family="table-column">
      <style:table-column-properties style:column-width="1.0632in"/>
    </style:style>
    <style:style style:name="Table2.E" style:family="table-column">
      <style:table-column-properties style:column-width="1.1938in"/>
    </style:style>
    <style:style style:name="Table2.1" style:family="table-row">
      <style:table-row-properties fo:keep-together="auto"/>
    </style:style>
    <style:style style:name="Table2.A1" style:family="table-cell">
      <style:table-cell-properties fo:padding-left="0.0785in" fo:padding-right="0.0785in" fo:padding-top="0in" fo:padding-bottom="0in" fo:border-left="0.1pt solid #000000" fo:border-right="0.1pt solid #000000" fo:border-top="0.1pt solid #000000" fo:border-bottom="none"/>
    </style:style>
    <style:style style:name="Table2.A2" style:family="table-cell">
      <style:table-cell-properties style:border-line-width-bottom="0.0014in 0.0014in 0.0014in" fo:padding-left="0.0785in" fo:padding-right="0.0785in" fo:padding-top="0in" fo:padding-bottom="0in" fo:border-left="0.1pt solid #000000" fo:border-right="none" fo:border-top="none" fo:border-bottom="0.3pt double #000000"/>
    </style:style>
    <style:style style:name="Table2.C2" style:family="table-cell">
      <style:table-cell-properties style:border-line-width-bottom="0.0014in 0.0014in 0.0014in" fo:padding-left="0.0785in" fo:padding-right="0.0785in" fo:padding-top="0in" fo:padding-bottom="0in" fo:border-left="none" fo:border-right="none" fo:border-top="none" fo:border-bottom="0.3pt double #000000"/>
    </style:style>
    <style:style style:name="Table2.E2" style:family="table-cell">
      <style:table-cell-properties style:border-line-width-left="0.0014in 0.0014in 0.0014in" style:border-line-width-bottom="0.0014in 0.0014in 0.0014in" fo:padding-left="0.0785in" fo:padding-right="0.0785in" fo:padding-top="0in" fo:padding-bottom="0in" fo:border-left="0.3pt double #000000" fo:border-right="0.1pt solid #000000" fo:border-top="none" fo:border-bottom="0.3pt double #000000"/>
    </style:style>
    <style:style style:name="Table2.A3" style:family="table-cell">
      <style:table-cell-properties fo:padding-left="0.0785in" fo:padding-right="0.0785in" fo:padding-top="0in" fo:padding-bottom="0in" fo:border-left="0.1pt solid #000000" fo:border-right="none" fo:border-top="none" fo:border-bottom="none"/>
    </style:style>
    <style:style style:name="Table2.B3" style:family="table-cell">
      <style:table-cell-properties style:vertical-align="bottom" fo:padding-left="0.0785in" fo:padding-right="0.0785in" fo:padding-top="0in" fo:padding-bottom="0in" fo:border-left="0.1pt solid #000000" fo:border-right="none" fo:border-top="none" fo:border-bottom="none"/>
    </style:style>
    <style:style style:name="Table2.C3" style:family="table-cell">
      <style:table-cell-properties style:vertical-align="bottom" fo:padding-left="0.0785in" fo:padding-right="0.0785in" fo:padding-top="0in" fo:padding-bottom="0in" fo:border="none"/>
    </style:style>
    <style:style style:name="Table2.D3" style:family="table-cell">
      <style:table-cell-properties fo:padding-left="0.0785in" fo:padding-right="0.0785in" fo:padding-top="0in" fo:padding-bottom="0in" fo:border="none"/>
    </style:style>
    <style:style style:name="Table2.E3" style:family="table-cell">
      <style:table-cell-properties style:border-line-width-left="0.0014in 0.0014in 0.0014in" fo:padding-left="0.0785in" fo:padding-right="0.0785in" fo:padding-top="0in" fo:padding-bottom="0in" fo:border-left="0.3pt double #000000" fo:border-right="0.1pt solid #000000" fo:border-top="none" fo:border-bottom="none"/>
    </style:style>
    <style:style style:name="Table2.C4" style:family="table-cell">
      <style:table-cell-properties fo:padding-left="0.0785in" fo:padding-right="0.0785in" fo:padding-top="0in" fo:padding-bottom="0in" fo:border="none"/>
    </style:style>
    <style:style style:name="Table2.D4" style:family="table-cell">
      <style:table-cell-properties fo:padding-left="0.0785in" fo:padding-right="0.0785in" fo:padding-top="0in" fo:padding-bottom="0in" fo:border="none"/>
    </style:style>
    <style:style style:name="Table2.E4" style:family="table-cell">
      <style:table-cell-properties style:border-line-width-left="0.0014in 0.0014in 0.0014in" fo:padding-left="0.0785in" fo:padding-right="0.0785in" fo:padding-top="0in" fo:padding-bottom="0in" fo:border-left="0.3pt double #000000" fo:border-right="0.1pt solid #000000" fo:border-top="none" fo:border-bottom="none"/>
    </style:style>
    <style:style style:name="Table2.C5" style:family="table-cell">
      <style:table-cell-properties fo:padding-left="0.0785in" fo:padding-right="0.0785in" fo:padding-top="0in" fo:padding-bottom="0in" fo:border="none"/>
    </style:style>
    <style:style style:name="Table2.D5" style:family="table-cell">
      <style:table-cell-properties fo:padding-left="0.0785in" fo:padding-right="0.0785in" fo:padding-top="0in" fo:padding-bottom="0in" fo:border="none"/>
    </style:style>
    <style:style style:name="Table2.E5" style:family="table-cell">
      <style:table-cell-properties style:border-line-width-left="0.0014in 0.0014in 0.0014in" fo:padding-left="0.0785in" fo:padding-right="0.0785in" fo:padding-top="0in" fo:padding-bottom="0in" fo:border-left="0.3pt double #000000" fo:border-right="0.1pt solid #000000" fo:border-top="none" fo:border-bottom="none"/>
    </style:style>
    <style:style style:name="Table2.D6" style:family="table-cell">
      <style:table-cell-properties fo:padding-left="0.0785in" fo:padding-right="0.0785in" fo:padding-top="0in" fo:padding-bottom="0in" fo:border="none"/>
    </style:style>
    <style:style style:name="Table2.E6" style:family="table-cell">
      <style:table-cell-properties style:border-line-width-left="0.0014in 0.0014in 0.0014in" fo:padding-left="0.0785in" fo:padding-right="0.0785in" fo:padding-top="0in" fo:padding-bottom="0in" fo:border-left="0.3pt double #000000" fo:border-right="0.1pt solid #000000" fo:border-top="none" fo:border-bottom="none"/>
    </style:style>
    <style:style style:name="Table2.D7" style:family="table-cell">
      <style:table-cell-properties fo:padding-left="0.0785in" fo:padding-right="0.0785in" fo:padding-top="0in" fo:padding-bottom="0in" fo:border="none"/>
    </style:style>
    <style:style style:name="Table2.E7" style:family="table-cell">
      <style:table-cell-properties style:border-line-width-left="0.0014in 0.0014in 0.0014in" fo:padding-left="0.0785in" fo:padding-right="0.0785in" fo:padding-top="0in" fo:padding-bottom="0in" fo:border-left="0.3pt double #000000" fo:border-right="0.1pt solid #000000" fo:border-top="none" fo:border-bottom="none"/>
    </style:style>
    <style:style style:name="Table2.C8" style:family="table-cell">
      <style:table-cell-properties fo:padding-left="0.0785in" fo:padding-right="0.0785in" fo:padding-top="0in" fo:padding-bottom="0in" fo:border="none"/>
    </style:style>
    <style:style style:name="Table2.D8" style:family="table-cell">
      <style:table-cell-properties fo:padding-left="0.0785in" fo:padding-right="0.0785in" fo:padding-top="0in" fo:padding-bottom="0in" fo:border="none"/>
    </style:style>
    <style:style style:name="Table2.E8" style:family="table-cell">
      <style:table-cell-properties style:border-line-width-left="0.0014in 0.0014in 0.0014in" fo:padding-left="0.0785in" fo:padding-right="0.0785in" fo:padding-top="0in" fo:padding-bottom="0in" fo:border-left="0.3pt double #000000" fo:border-right="0.1pt solid #000000" fo:border-top="none" fo:border-bottom="none"/>
    </style:style>
    <style:style style:name="Table2.A9" style:family="table-cell">
      <style:table-cell-properties fo:padding-left="0.0785in" fo:padding-right="0.0785in" fo:padding-top="0in" fo:padding-bottom="0in" fo:border-left="0.1pt solid #000000" fo:border-right="none" fo:border-top="none" fo:border-bottom="0.1pt solid #000000"/>
    </style:style>
    <style:style style:name="Table2.B9" style:family="table-cell">
      <style:table-cell-properties fo:padding-left="0.0785in" fo:padding-right="0.0785in" fo:padding-top="0in" fo:padding-bottom="0in" fo:border-left="0.1pt solid #000000" fo:border-right="none" fo:border-top="none" fo:border-bottom="0.1pt solid #000000"/>
    </style:style>
    <style:style style:name="Table2.C9" style:family="table-cell">
      <style:table-cell-properties fo:padding-left="0.0785in" fo:padding-right="0.0785in" fo:padding-top="0in" fo:padding-bottom="0in" fo:border-left="none" fo:border-right="none" fo:border-top="none" fo:border-bottom="0.1pt solid #000000"/>
    </style:style>
    <style:style style:name="Table2.D9" style:family="table-cell">
      <style:table-cell-properties fo:padding-left="0.0785in" fo:padding-right="0.0785in" fo:padding-top="0in" fo:padding-bottom="0in" fo:border-left="none" fo:border-right="none" fo:border-top="none" fo:border-bottom="0.1pt solid #000000"/>
    </style:style>
    <style:style style:name="Table2.E9" style:family="table-cell">
      <style:table-cell-properties style:border-line-width-left="0.0014in 0.0014in 0.0014in" fo:padding-left="0.0785in" fo:padding-right="0.0785in" fo:padding-top="0in" fo:padding-bottom="0in" fo:border-left="0.3pt double #000000" fo:border-right="0.1pt solid #000000" fo:border-top="none" fo:border-bottom="0.1pt solid #000000"/>
    </style:style>
    <style:style style:name="P1" style:family="paragraph" style:parent-style-name="imagem_20_capa" style:master-page-name="Converted1">
      <style:paragraph-properties fo:text-align="start" style:justify-single-word="false" style:page-number="auto"/>
    </style:style>
    <style:style style:name="P2" style:family="paragraph" style:parent-style-name="Título_20_capa">
      <style:paragraph-properties fo:line-height="100%"/>
      <style:text-properties officeooo:paragraph-rsid="001c484e"/>
    </style:style>
    <style:style style:name="P3" style:family="paragraph" style:parent-style-name="author">
      <style:text-properties officeooo:rsid="001c484e" officeooo:paragraph-rsid="001c484e"/>
    </style:style>
    <style:style style:name="P4" style:family="paragraph" style:parent-style-name="thesisdate">
      <style:paragraph-properties fo:margin-top="0in" fo:margin-bottom="0.3937in" style:contextual-spacing="false" fo:break-before="page"/>
    </style:style>
    <style:style style:name="P5" style:family="paragraph" style:parent-style-name="committeetext">
      <style:paragraph-properties fo:margin-top="3.3335in" fo:margin-bottom="0.1965in" style:contextual-spacing="false"/>
    </style:style>
    <style:style style:name="P6" style:family="paragraph" style:parent-style-name="Standard">
      <style:paragraph-properties fo:line-height="100%" fo:text-align="start" style:justify-single-word="false" fo:hyphenation-ladder-count="no-limit" fo:hyphenation-keep="page" loext:hyphenation-keep-type="column" fo:text-indent="0in" style:auto-text-indent="false"/>
      <style:text-properties fo:font-size="12pt" style:font-size-asian="12pt" fo:hyphenate="tru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in" fo:margin-bottom="0in" style:contextual-spacing="false" fo:line-height="100%" fo:text-align="start" style:justify-single-word="false" fo:hyphenation-ladder-count="no-limit" fo:hyphenation-keep="page" loext:hyphenation-keep-type="column" fo:text-indent="0in" style:auto-text-indent="false" fo:break-before="page"/>
      <style:text-properties fo:font-size="12pt" style:font-size-asian="12pt" fo:hyphenate="true" fo:hyphenation-remain-char-count="2" fo:hyphenation-push-char-count="2" loext:hyphenation-no-caps="false" loext:hyphenation-no-last-word="false" loext:hyphenation-word-char-count="5" loext:hyphenation-zone="no-limit"/>
    </style:style>
    <style:style style:name="P8" style:family="paragraph" style:parent-style-name="título_20_inicial">
      <style:paragraph-properties fo:margin-top="0in" fo:margin-bottom="0.3937in" style:contextual-spacing="false" fo:break-before="page"/>
    </style:style>
    <style:style style:name="P9" style:family="paragraph" style:parent-style-name="título_20_inicial" style:master-page-name="Converted3">
      <style:paragraph-properties style:page-number="auto"/>
    </style:style>
    <style:style style:name="P10" style:family="paragraph" style:parent-style-name="título_20_inicial" style:master-page-name="Converted5">
      <style:paragraph-properties style:page-number="auto"/>
    </style:style>
    <style:style style:name="P11" style:family="paragraph" style:parent-style-name="Standard">
      <style:text-properties fo:language="en" fo:country="US"/>
    </style:style>
    <style:style style:name="P12" style:family="paragraph" style:parent-style-name="título_20_inicial" style:master-page-name="Converted7">
      <style:paragraph-properties fo:line-height="100%" style:page-number="auto"/>
    </style:style>
    <style:style style:name="P13" style:family="paragraph" style:parent-style-name="título_20_inicial" style:master-page-name="Converted9">
      <style:paragraph-properties style:page-number="auto"/>
    </style:style>
    <style:style style:name="P14" style:family="paragraph" style:parent-style-name="título_20_inicial" style:master-page-name="Converted11">
      <style:paragraph-properties style:page-number="auto"/>
    </style:style>
    <style:style style:name="P15" style:family="paragraph" style:parent-style-name="título_20_inicial" style:master-page-name="Converted13">
      <style:paragraph-properties style:page-number="auto"/>
    </style:style>
    <style:style style:name="P16" style:family="paragraph" style:parent-style-name="Heading_20_1" style:master-page-name="Converted15">
      <style:paragraph-properties style:page-number="1"/>
    </style:style>
    <style:style style:name="P17" style:family="paragraph" style:parent-style-name="Heading_20_2" style:list-style-name="WWNum17">
      <style:paragraph-properties fo:margin-left="0.4016in" fo:text-indent="-0.4016in" style:auto-text-indent="false"/>
    </style:style>
    <style:style style:name="P18" style:family="paragraph" style:parent-style-name="Heading_20_1" style:master-page-name="Converted17">
      <style:paragraph-properties style:page-number="auto"/>
    </style:style>
    <style:style style:name="P19" style:family="paragraph" style:parent-style-name="Heading_20_3" style:list-style-name="WWNum17"/>
    <style:style style:name="P20" style:family="paragraph" style:parent-style-name="Heading_20_1" style:master-page-name="Converted19">
      <style:paragraph-properties style:page-number="auto"/>
    </style:style>
    <style:style style:name="P21" style:family="paragraph" style:parent-style-name="Ilustração">
      <style:paragraph-properties text:number-lines="true" text:line-number="0"/>
    </style:style>
    <style:style style:name="P22" style:family="paragraph" style:parent-style-name="Marca_20_1" style:list-style-name="WWNum26"/>
    <style:style style:name="P23" style:family="paragraph" style:parent-style-name="Marca_20_1_20_Continuação" style:list-style-name="WWNum26"/>
    <style:style style:name="P24" style:family="paragraph" style:parent-style-name="Tabela">
      <style:paragraph-properties text:number-lines="true" text:line-number="0"/>
    </style:style>
    <style:style style:name="P25" style:family="paragraph" style:parent-style-name="Título_20_de_20_tabela">
      <style:paragraph-properties text:number-lines="true" text:line-number="0"/>
    </style:style>
    <style:style style:name="P26" style:family="paragraph" style:parent-style-name="Conteúdo_20_de_20_tabela">
      <style:paragraph-properties text:number-lines="true" text:line-number="0"/>
    </style:style>
    <style:style style:name="P27" style:family="paragraph" style:parent-style-name="Heading_20_1" style:master-page-name="Converted21">
      <style:paragraph-properties style:page-number="auto"/>
    </style:style>
    <style:style style:name="P28" style:family="paragraph" style:parent-style-name="Heading_20__20_1_5f_Before" style:master-page-name="Converted24">
      <style:paragraph-properties fo:margin-left="0in" fo:text-indent="0in" style:auto-text-indent="false" style:page-number="auto"/>
    </style:style>
    <style:style style:name="P29" style:family="paragraph" style:parent-style-name="Bibliografia_20_1">
      <style:paragraph-properties fo:margin-left="0.7874in" fo:margin-right="-0.0016in" fo:text-align="start" style:justify-single-word="false" fo:text-indent="-0.7874in" style:auto-text-indent="false" text:number-lines="true" text:line-number="0"/>
    </style:style>
    <style:style style:name="P30" style:family="paragraph" style:parent-style-name="Bibliografia_20_1">
      <style:paragraph-properties fo:margin-left="0.7874in" fo:margin-right="-0.0016in" fo:text-align="start" style:justify-single-word="false" fo:text-indent="0in" style:auto-text-indent="false" text:number-lines="true" text:line-number="0"/>
    </style:style>
    <style:style style:name="P31" style:family="paragraph" style:parent-style-name="Bibliografia_20_1">
      <style:paragraph-properties text:number-lines="true" text:line-number="0"/>
    </style:style>
    <style:style style:name="P32" style:family="paragraph" style:parent-style-name="Heading_20__20_1_5f_Before" style:master-page-name="Converted25">
      <style:paragraph-properties fo:margin-left="0in" fo:text-indent="0in" style:auto-text-indent="false" style:page-number="auto"/>
    </style:style>
    <style:style style:name="P33" style:family="paragraph" style:parent-style-name="título2_20_anexo" style:list-style-name="WWNum17">
      <style:paragraph-properties fo:margin-left="0.4016in" fo:text-indent="-0.4016in" style:auto-text-indent="false"/>
    </style:style>
    <style:style style:name="P34" style:family="paragraph" style:parent-style-name="Standard">
      <style:paragraph-properties fo:line-height="100%" fo:text-align="start" style:justify-single-word="false" fo:hyphenation-ladder-count="no-limit" fo:hyphenation-keep="page" loext:hyphenation-keep-type="column" fo:text-indent="0in" style:auto-text-indent="false"/>
      <style:text-properties fo:hyphenate="true" fo:hyphenation-remain-char-count="2" fo:hyphenation-push-char-count="2" loext:hyphenation-no-caps="false" loext:hyphenation-no-last-word="false" loext:hyphenation-word-char-count="5" loext:hyphenation-zone="no-limit"/>
    </style:style>
    <style:style style:name="P35" style:family="paragraph" style:parent-style-name="Heading_20__20_1_5f_Before">
      <style:paragraph-properties fo:margin-left="0in" fo:margin-top="0in" fo:margin-bottom="0.4165in" style:contextual-spacing="false" fo:text-indent="0in" style:auto-text-indent="false" fo:break-before="page"/>
      <style:text-properties fo:language="en" fo:country="US"/>
    </style:style>
    <style:style style:name="T1" style:family="text">
      <style:text-properties fo:font-size="24pt" style:font-size-asian="24pt" style:font-name-complex="Nimbus Sans L" style:font-size-complex="14pt"/>
    </style:style>
    <style:style style:name="T2" style:family="text">
      <style:text-properties officeooo:rsid="001c484e"/>
    </style:style>
    <style:style style:name="T3" style:family="text">
      <style:text-properties fo:font-size="12pt" style:font-size-asian="12pt"/>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pt" fo:country="PT"/>
    </style:style>
    <style:style style:name="T7" style:family="text">
      <style:text-properties fo:font-family="Calibri" style:font-family-generic="roman" style:font-pitch="variable" style:font-name-asian="ＭＳ 明朝" style:font-family-generic-complex="system" style:font-pitch-complex="variable" style:font-size-complex="11pt"/>
    </style:style>
    <style:style style:name="T8" style:family="text">
      <style:text-properties fo:font-family="Calibri" style:font-family-generic="roman" style:font-pitch="variable" fo:font-size="11pt" style:font-name-asian="ＭＳ 明朝" style:font-size-asian="11pt" style:font-family-generic-complex="system" style:font-pitch-complex="variable" style:font-size-complex="11pt"/>
    </style:style>
    <style:style style:name="T9" style:family="text">
      <style:text-properties text:display="true"/>
    </style:style>
    <style:style style:name="T10" style:family="text">
      <style:text-properties fo:font-weight="bold" style:font-weight-asian="bold"/>
    </style:style>
    <style:style style:name="T11" style:family="text">
      <style:text-properties style:text-position="sub 58%"/>
    </style:style>
    <style:style style:name="T12" style:family="text">
      <style:text-properties fo:font-size="11pt" style:font-size-asian="11pt"/>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ormula">
      <style:graphic-properties fo:margin-left="0in" fo:margin-right="0in" fo:margin-top="0in" fo:margin-bottom="0in" style:wrap="run-through" style:number-wrapped-paragraphs="no-limit" style:vertical-pos="top" style:vertical-rel="baseline" style:horizontal-pos="from-left" style:horizontal-rel="paragraph" fo:background-color="#ffffff" draw:fill="solid" draw:fill-color="#ffffff" draw:secondary-fill-color="#729fcf"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ot;equation&quot;"/>
        <text:sequence-decl text:display-outline-level="0" text:name="Figura"/>
        <text:sequence-decl text:display-outline-level="0" text:name="&quot;Tabela&quot;"/>
      </text:sequence-decls>
      <text:p text:style-name="P1" loext:marker-style-name="T1"><draw:frame draw:style-name="fr1" draw:name="Picture 1" text:anchor-type="as-char" svg:width="1.6035in" svg:height="0.5638in" draw:z-index="0"><draw:image xlink:href="Pictures/1000000100000299000000EAA7755BE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2">Interactive Musical Beat Annotation GUI</text:p>
      <text:p text:style-name="author"/>
      <text:p text:style-name="P3">Fernando Azeredo</text:p>
      <text:p text:style-name="author"><text:line-break/></text:p>
      <text:p text:style-name="provisionaltext"/>
      <text:p text:style-name="degree">Mestrado em Multimédia da Universidade do Porto</text:p>
      <text:p text:style-name="supervisorstext">Orientador: <text:span text:style-name="T2">António Sá Pinto</text:span></text:p>
      <text:p text:style-name="thesisdate">Junho de 2013</text:p>
      <text:p text:style-name="P4"/>
      <text:p text:style-name="thesisdate"/>
      <text:p text:style-name="thesisdate"/>
      <text:p text:style-name="thesisdate"/>
      <text:p text:style-name="thesisdate"/>
      <text:p text:style-name="thesisdate"/>
      <text:p text:style-name="thesisdate"/>
      <text:p text:style-name="thesisdate"/>
      <text:p text:style-name="thesisdate"/>
      <text:p text:style-name="thesisdate"/>
      <text:p text:style-name="thesisdate"/>
      <text:p text:style-name="thesisdate"/>
      <text:p text:style-name="thesisdate"><text:soft-page-break/><text:span text:style-name="T2">Fernando Azeredo</text:span>, 20<text:span text:style-name="T2">26</text:span></text:p>
      <text:p text:style-name="Título1">Interactive Musical Beat Annotation GUI</text:p>
      <text:p text:style-name="P3">Fernando Azeredo</text:p>
      <text:p text:style-name="committeedegree">Mestrado em Multimédia da Universidade do Porto</text:p>
      <text:p text:style-name="Standard"/>
      <text:p text:style-name="P5">Aprovado em provas públicas pelo Júri:</text:p>
      <text:p text:style-name="committeemember">Presidente: </text:p>
      <text:p text:style-name="committeemember">Vogal Externo: </text:p>
      <text:p text:style-name="committeemember">Orientador: <text:span text:style-name="T2">António Sá Pinto</text:span></text:p>
      <text:p text:style-name="Assinatura1"/>
      <text:p text:style-name="P6" loext:marker-style-name="T3"/>
      <text:p text:style-name="P7" loext:marker-style-name="T3"/>
      <text:p text:style-name="P8"/>
      <text:p text:style-name="título_20_inicial">Resumo</text:p>
      <text:p text:style-name="Standard">O Resumo fornece ao leitor um sumário do conteúdo da dissertação. Deverá ser breve mas conter detalhe suficiente e, uma vez que é a porta de entrada para a dissertação, deverá dar ao leitor uma boa impressão inicial.</text:p>
      <text:p text:style-name="Standard">Este texto inicial da dissertação é escrito no fim e resume numa página, sem referências externas, o tema e o contexto do trabalho, a motivação e os objetivos, as metodologias e técnicas empregues, os principais resultados alcançados e as conclusões.</text:p>
      <text:p text:style-name="Standard">Este documento ilustra o formato a usar em dissertações do Mestrado em Multimédia da Universidade do Porto. São dados exemplos de margens, cabeçalhos, títulos, paginação, estilos de índices, etc. São ainda dados exemplos de formatação de citações, figuras e tabelas, equações, referências cruzadas, lista de referências e índices. É usado texto descartável, <text:span text:style-name="T4">Loren Ipsum</text:span>, para preencher a dissertação por forma a ilustrar os formatos.</text:p>
      <text:p text:style-name="Standard"/>
      <text:p text:style-name="Standard"/>
      <text:p text:style-name="P9" loext:marker-style-name="T5"><text:span text:style-name="T5">Abstract</text:span><text:span text:style-name="T5"/></text:p>
      <text:p text:style-name="Standard" loext:marker-style-name="english"><text:span text:style-name="english">Here goes the abstract written in English.</text:span></text:p>
      <text:p text:style-name="Standard" loext:marker-style-name="T6"><text:span text:style-name="english">Lorem ipsum dolor sit amet, consectetuer adipiscing elit. Sed vehicula lorem commodo dui. Fusce mollis feugiat elit. Cum sociis natoque penatibus et magnis dis parturient montes, nascetur ridiculus mus. </text:span><text:span text:style-name="english"><text:span text:style-name="T6">Donec eu quam. Aenean consectetuer odio quis nisi. Fusce molestie metus sed neque. Praesent nulla. Donec quis urna. Pellentesque hendrerit vulputate nunc. Donec id eros et leo ullamcorper placerat. Curabitur aliquam tellus et diam. </text:span></text:span></text:p>
      <text:p text:style-name="Standard" loext:marker-style-name="T6"><text:span text:style-name="english">Ut tortor. Morbi eget elit. </text:span><text:span text:style-name="english"><text:span text:style-name="T6">Maecenas nec risus. Sed ultricies. Sed scelerisque libero faucibus sem. Nullam molestie leo quis tellus. Donec ipsum. Nulla lobortis purus pharetra turpis. </text:span></text:span><text:span text:style-name="english">Nulla laoreet, arcu nec hendrerit vulputate, tortor elit eleifend turpis, et aliquam leo metus in dolor. Praesent sed nulla. Mauris ac augue. Cras ac orci. Etiam sed urna eget nulla sodales venenatis. Donec faucibus ante eget dui. </text:span><text:span text:style-name="english"><text:span text:style-name="T6">Nam magna. Suspendisse sollicitudin est et mi.</text:span></text:span></text:p>
      <text:p text:style-name="Standard"/>
      <text:p text:style-name="Standard"/>
      <text:p text:style-name="P10">Agradecimentos</text:p>
      <text:p text:style-name="Standard" loext:marker-style-name="T5">Aliquam id dui. Nulla facilisi. Nullam ligula nunc, viverra a, iaculis at, faucibus quis, sapien. Cum sociis natoque penatibus et magnis dis parturient montes, nascetur ridiculus mus. Curabitur magna ligula, ornare luctus, aliquam non, aliquet at, tortor. Donec iaculis nulla sed eros. Sed felis. Nam lobortis libero. Pellentesque odio. Suspendisse potenti. Morbi imperdiet rhoncus magna. Morbi vestibulum interdum turpis. <text:span text:style-name="T5">Pellentesque varius. Morbi nulla urna, euismod in, molestie ac, placerat in, orci. </text:span><text:span text:style-name="T5"/></text:p>
      <text:p text:style-name="P11" loext:marker-style-name="T5"/>
      <text:p text:style-name="Standard">&lt;Autor&gt;</text:p>
      <text:p text:style-name="P12">Índice</text:p>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chapter/>
            <text:index-entry-tab-stop style:type="left" style:position="0.1874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4374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1"/>
            <text:index-source-style text:style-name="título_20_final"/>
            <text:index-source-style text:style-name="título1_20_anexo"/>
          </text:index-source-styles>
          <text:index-source-styles text:outline-level="2">
            <text:index-source-style text:style-name="Título_20_2"/>
            <text:index-source-style text:style-name="título2_20_anexo"/>
          </text:index-source-styles>
          <text:index-source-styles text:outline-level="3">
            <text:index-source-style text:style-name="Título_20_3"/>
          </text:index-source-styles>
        </text:table-of-content-source>
        <text:index-body>
          <text:p text:style-name="Contents_20_1" loext:marker-style-name="T7">1.<text:span text:style-name="T7"><text:tab/></text:span>Introdução<text:tab/>1</text:p>
          <text:p text:style-name="Contents_20_2" loext:marker-style-name="T7">1.1<text:span text:style-name="T7"><text:tab/></text:span>Contexto/Enquadramento/Motivação<text:tab/>1</text:p>
          <text:p text:style-name="Contents_20_2" loext:marker-style-name="T7">1.2<text:span text:style-name="T7"><text:tab/></text:span>Projeto<text:tab/>2</text:p>
          <text:p text:style-name="Contents_20_2" loext:marker-style-name="T7">1.3<text:span text:style-name="T7"><text:tab/></text:span>Problema(s), Hipótese(s) e Objetivos de Investigação<text:tab/>2</text:p>
          <text:p text:style-name="Contents_20_2" loext:marker-style-name="T7">1.4<text:span text:style-name="T7"><text:tab/></text:span>Metodologia de Investigação<text:tab/>3</text:p>
          <text:p text:style-name="Contents_20_2" loext:marker-style-name="T7">1.5<text:span text:style-name="T7"><text:tab/></text:span>Estrutura da Dissertação<text:tab/>3</text:p>
          <text:p text:style-name="Contents_20_1" loext:marker-style-name="T7">2.<text:span text:style-name="T7"><text:tab/></text:span>Revisão Bibliográfica<text:tab/>5</text:p>
          <text:p text:style-name="Contents_20_2" loext:marker-style-name="T7">2.1<text:span text:style-name="T7"><text:tab/></text:span>Introdução<text:tab/>5</text:p>
          <text:p text:style-name="Contents_20_2" loext:marker-style-name="T7">2.2<text:span text:style-name="T7"><text:tab/></text:span>Secção Exemplo<text:tab/>6</text:p>
          <text:p text:style-name="Contents_20_3">2.2.1<text:tab/>Sub-secção Exemplo<text:tab/>6</text:p>
          <text:p text:style-name="Contents_20_3">2.2.2<text:tab/>Sub-secção Exemplo 2<text:tab/>7</text:p>
          <text:p text:style-name="Contents_20_2" loext:marker-style-name="T7">2.3<text:span text:style-name="T7"><text:tab/></text:span>Resumo ou Conclusões<text:tab/>7</text:p>
          <text:p text:style-name="Contents_20_1" loext:marker-style-name="T7">3.<text:span text:style-name="T7"><text:tab/></text:span>Visualização de Sinópticos SVG<text:tab/>9</text:p>
          <text:p text:style-name="Contents_20_2" loext:marker-style-name="T7">3.1<text:span text:style-name="T7"><text:tab/></text:span>Secção Exemplo<text:tab/>9</text:p>
          <text:p text:style-name="Contents_20_3">3.1.1<text:tab/>Exemplo de Figura<text:tab/>10</text:p>
          <text:p text:style-name="Contents_20_3">3.1.2<text:tab/>Exemplo de Tabela<text:tab/>11</text:p>
          <text:p text:style-name="Contents_20_2" loext:marker-style-name="T7">3.2<text:span text:style-name="T7"><text:tab/></text:span>Secção Exemplo<text:tab/>11</text:p>
          <text:p text:style-name="Contents_20_2" loext:marker-style-name="T7">3.3<text:span text:style-name="T7"><text:tab/></text:span>Resumo e Conclusões<text:tab/>12</text:p>
          <text:p text:style-name="Contents_20_1" loext:marker-style-name="T7">4.<text:span text:style-name="T7"><text:tab/></text:span>Implementação<text:tab/>13</text:p>
          <text:p text:style-name="Contents_20_2" loext:marker-style-name="T7">4.1<text:span text:style-name="T7"><text:tab/></text:span>Secção Exemplo<text:tab/>13</text:p>
          <text:p text:style-name="Contents_20_2" loext:marker-style-name="T7">4.2<text:span text:style-name="T7"><text:tab/></text:span>Mais uma Secção<text:tab/>14</text:p>
          <text:p text:style-name="Contents_20_2" loext:marker-style-name="T7">4.3<text:span text:style-name="T7"><text:tab/></text:span>Resumo ou Conclusões<text:tab/>14</text:p>
          <text:p text:style-name="Contents_20_1" loext:marker-style-name="T7">5.<text:span text:style-name="T7"><text:tab/></text:span>Conclusões e Trabalho Futuro<text:tab/>15</text:p>
          <text:p text:style-name="Contents_20_2" loext:marker-style-name="T7">5.1<text:span text:style-name="T7"><text:tab/></text:span>Satisfação dos Objetivos<text:tab/>15</text:p>
          <text:p text:style-name="Contents_20_2" loext:marker-style-name="T7">5.2<text:span text:style-name="T7"><text:tab/></text:span>Trabalho Futuro<text:tab/>16</text:p>
          <text:p text:style-name="Contents_20_1" loext:marker-style-name="T7">6.<text:span text:style-name="T7"><text:tab/></text:span>Referências<text:tab/>17</text:p>
          <text:p text:style-name="Contents_20_1" loext:marker-style-name="T7">7.<text:span text:style-name="T7"><text:tab/></text:span>Loren Ipsum<text:tab/>19</text:p>
          <text:p text:style-name="Contents_20_1" loext:marker-style-name="T7">8.<text:span text:style-name="T7"><text:tab/></text:span>Índice Remissivo<text:tab/>21</text:p>
        </text:index-body>
      </text:table-of-content>
      <text:p text:style-name="Contents_20_1"><text:soft-page-break/></text:p>
      <text:p text:style-name="Contents_20_1"/>
      <text:p text:style-name="Contents_20_1"/>
      <text:p text:style-name="P13">Lista de Figuras</text:p>
      <text:illustration-index text:style-name="Sect1" text:protected="true" text:name="Table of Figures1">
        <text:illustration-index-source text:caption-sequence-name="Figura"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Figure_20_Index_20_1" loext:marker-style-name="T8"><text:a xlink:type="simple" xlink:href="#_Toc294372726" text:style-name="Index_20_Link" text:visited-style-name="Index_20_Link">Figura 1:Arquitectura da Solução Proposta.<text:span text:style-name="T9"><text:tab/>10</text:span></text:a></text:p>
        </text:index-body>
      </text:illustration-index>
      <text:p text:style-name="Standard"/>
      <text:p text:style-name="Standard"/>
      <text:p text:style-name="P14">Lista de Tabelas</text:p>
      <text:illustration-index text:style-name="Sect1" text:protected="true" text:name="Table of Figures2">
        <text:illustration-index-source text:caption-sequence-name="Tabela"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Figure_20_Index_20_1" loext:marker-style-name="T8">Tabela 1: Tabela Exemplo<text:tab/>11</text:p>
        </text:index-body>
      </text:illustration-index>
      <text:p text:style-name="Índice_20_de_20_tabelas_20_1"/>
      <text:p text:style-name="Índice_20_de_20_tabelas_20_1"/>
      <text:p text:style-name="P15">Abreviaturas e Símbolos</text:p>
      <table:table table:name="Table1" table:style-name="Table1">
        <table:table-column table:style-name="Table1.A"/>
        <table:table-column table:style-name="Table1.B"/>
        <table:table-row table:style-name="Table1.1">
          <table:table-cell table:style-name="Table1.A1" office:value-type="string">
            <text:p text:style-name="tabela_20_abreviaturas">ADT</text:p>
          </table:table-cell>
          <table:table-cell table:style-name="Table1.B1" office:value-type="string">
            <text:p text:style-name="tabela_20_abreviaturas">Abstract Data Type</text:p>
          </table:table-cell>
        </table:table-row>
        <table:table-row table:style-name="Table1.1">
          <table:table-cell table:style-name="Table1.A1" office:value-type="string">
            <text:p text:style-name="tabela_20_abreviaturas">ANDF</text:p>
          </table:table-cell>
          <table:table-cell table:style-name="Table1.B1" office:value-type="string">
            <text:p text:style-name="tabela_20_abreviaturas">Architecture-Neutral Distribution Format</text:p>
          </table:table-cell>
        </table:table-row>
        <table:table-row table:style-name="Table1.1">
          <table:table-cell table:style-name="Table1.A1" office:value-type="string">
            <text:p text:style-name="tabela_20_abreviaturas">API</text:p>
          </table:table-cell>
          <table:table-cell table:style-name="Table1.B1" office:value-type="string">
            <text:p text:style-name="tabela_20_abreviaturas">Application Programming Interface</text:p>
          </table:table-cell>
        </table:table-row>
        <table:table-row table:style-name="Table1.1">
          <table:table-cell table:style-name="Table1.A1" office:value-type="string">
            <text:p text:style-name="tabela_20_abreviaturas">CAD</text:p>
          </table:table-cell>
          <table:table-cell table:style-name="Table1.B1" office:value-type="string">
            <text:p text:style-name="tabela_20_abreviaturas">Computer-Aided Design</text:p>
          </table:table-cell>
        </table:table-row>
        <table:table-row table:style-name="Table1.1">
          <table:table-cell table:style-name="Table1.A1" office:value-type="string">
            <text:p text:style-name="tabela_20_abreviaturas">CASE</text:p>
          </table:table-cell>
          <table:table-cell table:style-name="Table1.B1" office:value-type="string">
            <text:p text:style-name="tabela_20_abreviaturas">Computer-Aided Software Engineering</text:p>
          </table:table-cell>
        </table:table-row>
        <table:table-row table:style-name="Table1.1">
          <table:table-cell table:style-name="Table1.A1" office:value-type="string">
            <text:p text:style-name="tabela_20_abreviaturas">CORBA</text:p>
          </table:table-cell>
          <table:table-cell table:style-name="Table1.B1" office:value-type="string">
            <text:p text:style-name="tabela_20_abreviaturas" loext:marker-style-name="T5"><text:span text:style-name="T5">Common Object Request Broker Architecture</text:span><text:span text:style-name="T5"/></text:p>
          </table:table-cell>
        </table:table-row>
        <table:table-row table:style-name="Table1.1">
          <table:table-cell table:style-name="Table1.A1" office:value-type="string">
            <text:p text:style-name="tabela_20_abreviaturas">UNCOL</text:p>
          </table:table-cell>
          <table:table-cell table:style-name="Table1.B1" office:value-type="string">
            <text:p text:style-name="tabela_20_abreviaturas">UNiversal COmpiler-oriented Language</text:p>
          </table:table-cell>
        </table:table-row>
        <table:table-row table:style-name="Table1.1">
          <table:table-cell table:style-name="Table1.A1" office:value-type="string">
            <text:p text:style-name="tabela_20_abreviaturas">Loren</text:p>
          </table:table-cell>
          <table:table-cell table:style-name="Table1.B1" office:value-type="string">
            <text:p text:style-name="tabela_20_abreviaturas">Lorem ipsum dolor sit amet, consectetuer adipiscing elit. Sed vehicula lorem commodo dui</text:p>
          </table:table-cell>
        </table:table-row>
        <table:table-row table:style-name="Table1.1">
          <table:table-cell table:style-name="Table1.A1" office:value-type="string">
            <text:p text:style-name="tabela_20_abreviaturas">WWW</text:p>
          </table:table-cell>
          <table:table-cell table:style-name="Table1.B1" office:value-type="string">
            <text:p text:style-name="tabela_20_abreviaturas">World Wide Web</text:p>
          </table:table-cell>
        </table:table-row>
      </table:table>
      <text:p text:style-name="Standard"/>
      <text:p text:style-name="Standard"/>
      <text:h text:style-name="P16" text:outline-level="1"><text:bookmark-start text:name="_Toc439847329"/>Introdução<text:bookmark-end text:name="_Toc439847329"/></text:h>
      <text:p text:style-name="Standard">O primeiro capítulo da dissertação deve servir para apresentar o enquadramento e a motivação do trabalho e para identificar e definir os problemas as hipóteses e os objetivos desta dissertação. Deve resumir as metodologias utilizadas no trabalho e termina apresentando um breve resumo de cada um dos capítulos posteriores.</text:p>
      <text:p text:style-name="Standard">Este documento ilustra o formato a usar em dissertações do Mestrado em Multimédia da Universidade do Porto, não servindo de exemplo sobre os conteúdos a usar. São dados exemplos de margens, cabeçalhos, títulos, paginação, estilos de índices, etc. <text:s/>São ainda dados exemplos de formatação de citações, figuras e tabelas, equações, referências cruzadas, lista de referências e índices.</text:p>
      <text:p text:style-name="Standard">Uma recolha sobre as normas existentes sobre este assunto pode ser encontrada em (GAP 2012).</text:p>
      <text:p text:style-name="Citação1"><text:s text:c="2"/><text:span text:style-name="T5">“Like the Abstract, the Introduction should be written to engage the interest of the reader. It should also give the reader an idea of how the dissertation is structured, and in doing so, define the thread of the contents.” </text:span>(Tham 2001, chap. Introduction). </text:p>
      <text:p text:style-name="Standard">Neste primeiro capítulo ilustra-se a utilização de citações e de referências bibliográficas. Para além de dar um exemplo de utilização de uma citação, a citação anterior, introduz uma referência que pode ser consultada, entre muitas outras referências bibliográficas interessantes (Tham 2001; Philips and Pugh 2005). </text:p>
      <text:list text:style-name="WWNum17">
        <text:list-item>
          <text:list>
            <text:list-item>
              <text:h text:style-name="P17" text:outline-level="2"><text:bookmark-start text:name="_Toc439847330"/>Contexto/Enquadramento/Motivação<text:bookmark-end text:name="_Toc439847330"/></text:h>
            </text:list-item>
          </text:list>
        </text:list-item>
      </text:list>
      <text:p text:style-name="Standard">Esta secção descreve a área em que o trabalho se insere, podendo referir um eventual projeto de que faz parte e/ou apresentar uma breve descrição da empresa onde o trabalho decorreu. </text:p>
      <text:p text:style-name="Standard">Deve ainda fazer a contextualização e justificação do estudo e a sua importância/motivação para o investigador e para a comunidade.</text:p>
      <text:p text:style-name="Standard"><text:soft-page-break/><text:span text:style-name="T5">Lorem ipsum (Lipsum 2008) dolor sit amet, consectetuer adipiscing elit. Sed eget nunc. Phasellus interdum, risus viverra mollis laoreet, felis justo iaculis ante, eget ornare purus augue non urna. Nam in magna. In a est. Phasellus a tellus vitae enim vehicula imperdiet. Etiam sit amet elit. </text:span>In hac habitasse platea dictumst. Quisque eget turpis vel felis elementum tempus. Curabitur sit amet tortor id libero dapibus pretium. Integer mattis eros eu lorem. <text:span text:style-name="T5">Duis erat tellus, porttitor sed, blandit eget, fringilla et, lacus. Phasellus tristique nibh nec orci. Mauris sed leo. Suspendisse fringilla tempor dolor. Donec sapien enim, congue in, porta et, sollicitudin in, quam. </text:span>Curabitur semper, mauris ut vestibulum eleifend, diam ipsum tincidunt quam, et vestibulum velit mauris ut risus. </text:p>
      <text:p text:style-name="Standard">Sed eget libero. Nulla facilisi. <text:span text:style-name="T5">Proin eget tortor. Morbi gravida. Donec arcu risus, blandit a, rutrum at, ornare ut, nisl. </text:span>Etiam consectetuer tortor eu odio. Etiam blandit molestie ligula. Nulla facilisi. Nam a augue non justo laoreet hendrerit. Nam aliquam, purus eu ultricies dictum, urna purus posuere neque, vel tempus tellus enim a arcu. </text:p>
      <text:list text:continue-numbering="true" text:style-name="WWNum17">
        <text:list-item>
          <text:list>
            <text:list-item>
              <text:h text:style-name="P17" text:outline-level="2"><text:bookmark-start text:name="_Toc439847331"/>Projeto<text:bookmark-end text:name="_Toc439847331"/></text:h>
            </text:list-item>
          </text:list>
        </text:list-item>
      </text:list>
      <text:p text:style-name="Standard">Na continuação da secção anterior, e no caso de a dissertação estar integrada num projeto, esta secção apresenta resumidamente o mesmo.</text:p>
      <text:p text:style-name="Standard">Nulla nec eros et pede vehicula aliquam. Aenean sodales pede vel ante. Fusce sollicitudin sodales lacus. Maecenas justo mauris, adipiscing vitae, ornare quis, convallis nec, eros. Etiam laoreet venenatis ipsum. In tellus odio, eleifend ac, ultrices vel, lobortis sed, nibh. Fusce nunc augue, dictum non, pulvinar sed, consectetuer eu, ipsum. Vivamus nec pede. Pellentesque pulvinar fringilla dolor. In sit amet pede. Proin orci justo, semper vel, vulputate quis, convallis ac, nulla. Nulla at justo. Mauris feugiat dolor. Etiam posuere fermentum eros. Morbi nisl ipsum, tempus id, ornare quis, mattis id, dolor. Aenean molestie metus suscipit dolor. Aliquam id lectus sed nisl lobortis rhoncus. Curabitur vitae diam sed sem aliquet tempus. Sed scelerisque nisi nec sem. </text:p>
      <text:list text:continue-numbering="true" text:style-name="WWNum17">
        <text:list-item>
          <text:list>
            <text:list-item>
              <text:h text:style-name="P17" text:outline-level="2"><text:bookmark-start text:name="_Toc439847332"/>Problema(s), Hipótese(s) e Objetivos de Investigação<text:bookmark-end text:name="_Toc439847332"/></text:h>
            </text:list-item>
          </text:list>
        </text:list-item>
      </text:list>
      <text:p text:style-name="Standard">Começa por formular o problema e as questões de investigação. Seguidamente identifica as hipóteses que irão dar resposta ao problema e os objetivos propostos para as validar.</text:p>
      <text:p text:style-name="Standard"><text:span text:style-name="T5">Lorem ipsum dolor sit amet, consectetuer adipiscing elit. Morbi sit amet nibh. </text:span>Fusce faucibus, enim vel ultrices ornare, est mauris ultricies velit, vitae consequat sem erat vel nunc. <text:span text:style-name="T5">Nam libero eros, mattis eget, sagittis nec, imperdiet at, sapien. </text:span>Aliquam lacus. Aenean adipiscing nibh in orci. Aliquam vestibulum, elit at fringilla</text:p>
      <text:p text:style-name="Standard">dignissim, metus diam lobortis urna, a laoreet nunc odio ac ipsum. Sed at urna. Integer vehicula fringilla augue. Nulla lacus eros, rhoncus sit amet, posuere ut, vehicula ac, nibh. Ut <text:soft-page-break/>eleifend, eros eu placerat vehicula, justo turpis blandit dolor, eu tincidunt felis risus at ante. <text:span text:style-name="T5">Aenean suscipit nisl eget eros. Ut laoreet libero eget enim. </text:span>Cras tempus pellentesque felis. Vestibulum vitae erat ac nibh posuere eleifend. </text:p>
      <text:p text:style-name="Standard">Integer nec quam. Sed fermentum. Nunc vitae leo. Etiam sit amet quam. Nunc vestibulum massa in mauris. Duis eget nulla. Fusce ultricies arcu eu nibh volutpat feugiat. Maecenas urna pede, commodo quis, porta eu, bibendum elementum, pede. Sed eros massa, molestie eget, mattis non, rutrum ac, magna. Duis dui. Maecenas eget tortor ut dolor semper mattis. Maecenas auctor, tellus et ultricies tempor, elit est placerat lacus, in posuere mauris lorem et arcu. </text:p>
      <text:list text:continue-numbering="true" text:style-name="WWNum17">
        <text:list-item>
          <text:list>
            <text:list-item>
              <text:h text:style-name="P17" text:outline-level="2"><text:bookmark-start text:name="_Toc439847333"/>Metodologia de Investigação<text:bookmark-end text:name="_Toc439847333"/></text:h>
            </text:list-item>
          </text:list>
        </text:list-item>
      </text:list>
      <text:p text:style-name="Text_20_body">Descreve a metodologia de investigação utilizada para a realização da dissertação e aborda a natureza do estudo ou classificação da investigação. Dependendo da natureza da investigação poderá descrever os métodos de recolha de dados/técnicas/instrumentos, a amostra e técnicas de tratamento de dados, bem como o desenvolvimento e validação de protótipos aplicacionais.</text:p>
      <text:list xml:id="list30730472867924" text:continue-numbering="true" text:style-name="WWNum17">
        <text:list-item>
          <text:list>
            <text:list-item>
              <text:h text:style-name="P17" text:outline-level="2"><text:bookmark-start text:name="_Toc439847334"/>Estrutura da Dissertação<text:bookmark-end text:name="_Toc439847334"/></text:h>
            </text:list-item>
          </text:list>
        </text:list-item>
      </text:list>
      <text:p text:style-name="Standard">Para além da introdução, esta dissertação contém mais x capítulos. No capítulo <text:bookmark-ref text:reference-format="number-no-superior" text:ref-name="Ref_cap2">2</text:bookmark-ref>, é descrito o estado da arte e são apresentados trabalhos relacionados. No capítulo <text:bookmark-ref text:reference-format="number-no-superior" text:ref-name="Ref_cap3">3</text:bookmark-ref>, ipsum dolor sit amet, consectetuer adipiscing elit. No capítulo <text:bookmark-ref text:reference-format="number-no-superior" text:ref-name="Ref_cap4">4</text:bookmark-ref>, praesent sit amet sem. No capítulo <text:bookmark-ref text:reference-format="number-no-superior" text:ref-name="Ref_cap5">5</text:bookmark-ref>, posuere, ante non tristique consectetuer, dui elit scelerisque augue, eu vehicula nibh nisi ac est.</text:p>
      <text:p text:style-name="Standard"/>
      <text:p text:style-name="Standard"/>
      <text:h text:style-name="P18" text:outline-level="1"><text:bookmark text:name="Ref_cap2"/><text:bookmark-start text:name="_Toc439847335"/>Revisão Bibliográfica<text:bookmark-end text:name="_Toc439847335"/></text:h>
      <text:p text:style-name="Standard">Neste capítulo é descrito o estado da arte e são apresentados trabalhos relacionados de forma a mostrar o que existe no mesmo domínio e quais os problemas encontrados. Deve deixar claro que existe uma oportunidade de desenvolvimento que cobre alguma falha concreta.</text:p>
      <text:p text:style-name="Standard">O capítulo deve também efectuar uma revisão tecnológica às principais ferramentas utilizáveis no âmbito do projeto, justificando futuras escolhas.</text:p>
      <text:list text:continue-numbering="true" text:style-name="WWNum17">
        <text:list-item>
          <text:list>
            <text:list-item>
              <text:h text:style-name="P17" text:outline-level="2"><text:bookmark-start text:name="_Toc439847336"/>Introdução<text:bookmark-end text:name="_Toc439847336"/></text:h>
            </text:list-item>
          </text:list>
        </text:list-item>
      </text:list>
      <text:p text:style-name="Standard">Neste capítulo é ilustrada a utilização dos mecanismos do OpenOffice para definir entradas no índice remissivo e são feitas diversas referências bibliográficas, usando-se texto de um artigo apresentado na Conferência XATA2006 (Marinho et al. 2006).</text:p>
      <text:p text:style-name="Standard">Nos últimos tempos têm surgido diversas soluções, apresentadas por empresas do sector Automação de Sistemas para a disponibilização de sistemas <text:span text:style-name="T4">SCADA/DMS</text:span> na <text:span text:style-name="T4">Web</text:span>.</text:p>
      <text:p text:style-name="Standard">Fusce risus mi, tristique eu, consectetuer id, auctor sed, elit. Donec laoreet. Duis consectetuer interdum libero. Etiam eu orci. In eu arcu. Fusce luctus diam eget lectus. Duis interdum lacus sed ligula. Proin vestibulum felis eget lacus. Vivamus vestibulum, tellus ut congue viverra, mauris lacus tempor turpis, eu congue nisi magna at dolor. Ut molestie vehicula libero. Praesent in neque sed risus tempus ornare. Donec hendrerit, erat eu semper aliquam, pede nulla dapibus risus, ut pretium orci pede et neque. Etiam eget tortor a metus convallis viverra. Quisque eget nisi sed orci facilisis interdum. Aliquam non felis. </text:p>
      <text:p text:style-name="Standard">Fusce risus mi, tristique eu, consectetuer id, auctor sed, elit. Donec laoreet. Duis consectetuer interdum libero. Etiam eu orci. In eu arcu. Fusce luctus diam eget lectus. Duis interdum lacus sed ligula. Proin vestibulum felis eget lacus. Vivamus vestibulum, tellus ut congue viverra, mauris lacus tempor turpis, eu congue nisi magna at dolor. Ut molestie vehicula libero. Praesent in neque sed risus tempus ornare. Donec hendrerit, erat eu semper aliquam, pede nulla dapibus risus, ut pretium orci pede et neque. Etiam eget tortor a metus convallis viverra. Quisque eget nisi sed orci facilisis interdum. Aliquam non felis. </text:p>
      <text:p text:style-name="Standard"/>
      <text:list text:continue-numbering="true" text:style-name="WWNum17">
        <text:list-item>
          <text:list>
            <text:list-item>
              <text:h text:style-name="P17" text:outline-level="2"><text:bookmark-start text:name="_Toc439847337"/><text:soft-page-break/>Secção Exemplo<text:bookmark-end text:name="_Toc439847337"/></text:h>
            </text:list-item>
          </text:list>
        </text:list-item>
      </text:list>
      <text:p text:style-name="Standard"><text:span text:style-name="T4">Scalable Vector Graphics</text:span> (<text:alphabetical-index-mark text:string-value=" " text:key1="SVG"/><text:alphabetical-index-mark text:string-value=" " text:key1="XML:SVG"/><text:alphabetical-index-mark text:string-value=" " text:key1="SVG"/>SVG) é uma linguagem em formato <text:alphabetical-index-mark text:string-value=" " text:key1="XML"/>XML que descreve gráficos de duas dimensões. Este formato padronizado pela W3C (<text:span text:style-name="T4">World Wide Web Consortium</text:span>) é livre de patentes ou direitos de autor e está totalmente documentado, à semelhança de outras normas W3C. (W3C 2005a).</text:p>
      <text:p text:style-name="Standard">Sendo uma linguagem <text:alphabetical-index-mark text:string-value=" " text:key1="XML"/>XML, o <text:alphabetical-index-mark text:string-value=" " text:key1="SVG"/><text:alphabetical-index-mark text:string-value=" " text:key1="SVG"/>SVG herda uma série de vantagens: a possibilidade de transformar <text:alphabetical-index-mark text:string-value=" " text:key1="SVG"/><text:alphabetical-index-mark text:string-value=" " text:key1="SVG"/>SVG usando técnicas como <text:alphabetical-index-mark text:string-value=" " text:key1="XML:XSLT"/><text:alphabetical-index-mark text:string-value=" " text:key1="XML:XSLT"/><text:alphabetical-index-mark text:string-value=" " text:key1="XSLT"/>XSLT, de embeber <text:alphabetical-index-mark text:string-value=" " text:key1="SVG"/><text:alphabetical-index-mark text:string-value=" " text:key1="SVG"/>SVG em qualquer documento <text:alphabetical-index-mark text:string-value=" " text:key1="XML"/>XML usando <text:span text:style-name="T4">namespaces</text:span> ou até de estilizar <text:alphabetical-index-mark text:string-value=" " text:key1="SVG"/><text:alphabetical-index-mark text:string-value=" " text:key1="SVG"/>SVG recorrendo a <text:alphabetical-index-mark text:string-value=" " text:key1="CSS"/>CSS (<text:span text:style-name="T4">Cascade Style Sheets</text:span>). De uma forma geral, pode dizer-se que <text:alphabetical-index-mark text:string-value=" " text:key1="SVG"/>SVG interage bem com as actuais tecnologias ligadas ao <text:alphabetical-index-mark text:string-value=" " text:key1="XML"/>XML e à Web, tal como referido em (IBM 2005; <text:s/>W3C 2005b).</text:p>
      <text:p text:style-name="Standard"><text:span text:style-name="T5">Lorem ipsum dolor sit amet, consectetuer adipiscing elit. Donec a eros. Phasellus non nulla non massa venenatis convallis. </text:span>In porta. Mauris quis magna. Proin mauris eros, aliquet id, eleifend vitae, semper quis, erat. Aliquam id lectus non odio dignissim blandit. Vestibulum porttitor arcu ut ligula. Nunc quis erat. Curabitur ipsum tortor, ornare vitae, dapibus pretium, hendrerit sed, urna. Vestibulum ante ipsum primis in faucibus orci luctus et ultrices posuere cubilia Curae; Phasellus bibendum, nulla eget varius aliquam, tortor nulla sollicitudin quam, vel vestibulum nisl magna at sem. Aliquam velit sapien, ultrices viverra, tempus quis, ultrices at, dui. Aliquam sit amet justo. Quisque tristique, metus eu iaculis sagittis, urna leo bibendum diam, a ultricies sem diam a augue. Mauris consectetuer, libero vel euismod tincidunt, nisi metus viverra ante, quis pretium sapien odio nec risus. Nunc semper auctor nulla<text:note text:id="ftn1" text:note-class="footnote"><text:note-citation>1</text:note-citation><text:note-body><text:p text:style-name="Footnote">Exemplo de nota de rodapé.</text:p></text:note-body></text:note>. </text:p>
      <text:list text:continue-numbering="true" text:style-name="WWNum17">
        <text:list-item>
          <text:list>
            <text:list-item>
              <text:list>
                <text:list-item>
                  <text:h text:style-name="P19" text:outline-level="3"><text:bookmark-start text:name="_Toc439847338"/>Sub-secção Exemplo<text:bookmark-end text:name="_Toc439847338"/></text:h>
                </text:list-item>
              </text:list>
            </text:list-item>
          </text:list>
        </text:list-item>
      </text:list>
      <text:p text:style-name="Standard"><text:alphabetical-index-mark text:string-value=" " text:key1="Batik"/>Batik é um conjunto de bibliotecas baseadas em <text:span text:style-name="T4">Java</text:span> que permitem o uso de imagens <text:alphabetical-index-mark text:string-value=" " text:key1="SVG"/><text:alphabetical-index-mark text:string-value=" " text:key1="SVG"/>SVG (visualização, geração ou manipulação) em aplicações ou <text:span text:style-name="T4">applets</text:span> (Apache 2005).</text:p>
      <text:p text:style-name="Standard">O projeto <text:alphabetical-index-mark text:string-value=" " text:key1="Batik"/>Batik destina-se a fornecer ao programador alguns módulos que permitem desenvolver soluções especificas usando <text:alphabetical-index-mark text:string-value=" " text:key1="SVG"/><text:alphabetical-index-mark text:string-value=" " text:key1="SVG"/>SVG (W3C 2005a). </text:p>
      <text:p text:style-name="Standard">Lorem ipsum dolor sit amet, consectetuer adipiscing elit. Nunc eu nulla. Pellentesque vitae nibh ultrices quam iaculis convallis. Aliquam purus eros, varius eget, volutpat sodales, imperdiet nec, lacus. Curabitur in elit sed sem rutrum posuere. Class aptent taciti sociosqu ad litora torquent per conubia nostra, per inceptos himenaeos. Duis sem. Praesent ultricies odio vel sapien. Integer faucibus malesuada libero. Cras semper, dolor id ullamcorper varius, magna risus volutpat felis, id pellentesque nulla ante at erat. Integer sodales. </text:p>
      <text:p text:style-name="Standard">Quisque sit amet odio. <text:span text:style-name="T5">In at risus sit amet turpis interdum posuere. </text:span>Maecenas iaculis vehicula sem. Ut leo arcu, malesuada vel, imperdiet id, dignissim a, purus. Duis eleifend, lectus non venenatis dignissim, risus libero imperdiet mi, nec gravida massa libero sed mauris. Nullam <text:soft-page-break/>lobortis libero non sapien. Integer convallis iaculis erat. Morbi dictum. Ut ultrices pellentesque velit. Cras ac ante. Etiam in neque tincidunt lacus gravida vehicula. Proin et nisi.</text:p>
      <text:p text:style-name="Standard">Vivamus non nunc nec risus tempor varius. Quisque bibendum mi at dolor. Aliquam consectetuer condimentum risus. Aliquam luctus pulvinar sem. Duis aliquam, urna et vulputate tristique, dui elit aliquet nibh, vel dignissim magna turpis id sapien. Duis commodo sem id quam. Phasellus dolor. Class aptent taciti sociosqu ad litora torquent per conubia nostra, per inceptos himenaeos. </text:p>
      <text:list text:continue-numbering="true" text:style-name="WWNum17">
        <text:list-item>
          <text:list>
            <text:list-item>
              <text:list>
                <text:list-item>
                  <text:h text:style-name="P19" text:outline-level="3"><text:bookmark-start text:name="_Toc439847339"/>Sub-secção Exemplo 2<text:bookmark-end text:name="_Toc439847339"/></text:h>
                </text:list-item>
              </text:list>
            </text:list-item>
          </text:list>
        </text:list-item>
      </text:list>
      <text:p text:style-name="Standard">Loren ipsum dolor sit amet, consectetuer adipiscing elit. <text:s/>Praesent sit amet sem. Maecenas eleifend facilisis leo. Vestibulum et mi. Aliquam posuere, ante non tristique consectetuer, dui elit scelerisque augue, eu vehicula nibh nisi ac est. Suspendisse elementum sodales felis. Nullam laoreet fermentum urna.</text:p>
      <text:p text:style-name="Standard">Duis eget diam. <text:span text:style-name="T5">In est justo, tristique in, lacinia vel, feugiat eget, quam. </text:span>Pellentesque habitant morbi tristique senectus et netus et malesuada fames ac turpis egestas. Fusce feugiat, elit ac placerat fermentum, augue nisl ultricies eros, id fringilla enim sapien eu felis. Vestibulum ante ipsum primis in faucibus orci luctus et ultrices posuere cubilia Curae; Sed dolor mi, porttitor quis, condimentum sed, luctus in. </text:p>
      <text:list xml:id="list30731157547987" text:continue-numbering="true" text:style-name="WWNum17">
        <text:list-item>
          <text:list>
            <text:list-item>
              <text:h text:style-name="P17" text:outline-level="2"><text:bookmark-start text:name="_Toc439847340"/>Resumo ou Conclusões<text:bookmark-end text:name="_Toc439847340"/></text:h>
            </text:list-item>
          </text:list>
        </text:list-item>
      </text:list>
      <text:p text:style-name="Standard">No final do capítulo deverá ser apresentado um resumo com as principais conclusões da revisão e sua utilidade para o desenvolvimento da solução para o problema.</text:p>
      <text:p text:style-name="Standard">Vivamus non nunc nec risus tempor varius. <text:span text:style-name="T5">Quisque bibendum mi at dolor. </text:span>Aliquam consectetuer condimentum risus. Aliquam luctus pulvinar sem. Duis aliquam, urna et vulputate tristique, dui elit aliquet nibh, vel dignissim magna turpis id sapien. Duis commodo sem id quam. Phasellus dolor. Class aptent taciti sociosqu ad litora torquent per conubia nostra, per inceptos himenaeos. </text:p>
      <text:p text:style-name="Standard"/>
      <text:p text:style-name="Standard"/>
      <text:h text:style-name="P20" text:outline-level="1"><text:bookmark text:name="Ref_cap3"/><text:bookmark-start text:name="_Toc439847341"/>Visualização de Sinópticos SVG<text:bookmark-end text:name="_Toc439847341"/></text:h>
      <text:p text:style-name="Standard">Este capítulo deve começar por fazer uma apresentação detalhada do problema a resolver<text:note text:id="ftn3" text:note-class="footnote"><text:note-citation>2</text:note-citation><text:note-body><text:p text:style-name="Footnote"><text:s/>Na introdução a apresentação do problema foi breve.</text:p></text:note-body></text:note> podendo mesmo, caso se justifique, constituir-se um capítulo separado só com essa finalidade.</text:p>
      <text:p text:style-name="Standard">Deve depois dedicar-se à apresentação da solução, descrevendo também os aspetos metodológicos relevantes da abordagem, mas ainda sem detalhes de implementação, que serão objeto do capítulo seguinte.</text:p>
      <text:list xml:id="list30730086869627" text:continue-numbering="true" text:style-name="WWNum17">
        <text:list-item>
          <text:list>
            <text:list-item>
              <text:h text:style-name="P17" text:outline-level="2"><text:bookmark-start text:name="_Toc439847342"/>Secção Exemplo<text:bookmark-end text:name="_Toc439847342"/></text:h>
            </text:list-item>
          </text:list>
        </text:list-item>
      </text:list>
      <text:p text:style-name="Standard">Neste capítulo apresentam-se exemplos de formatação de figuras e tabelas, equações e referências cruzadas.</text:p>
      <text:p text:style-name="Standard">Apresenta-se de seguida um exemplo de conjunto de equações, completamente fora do contexto, construídas com o editor de fórmulas do OpenOffice.Org:</text:p>
      <text:p text:style-name="equação"><draw:frame draw:style-name="fr2" draw:name="Object1" text:anchor-type="as-char" svg:width="2.1417in" svg:height="0.4583in" draw:z-index="2"><draw:object xlink:href="./Object 1" xlink:type="simple" xlink:show="embed" xlink:actuate="onLoad"/><draw:image xlink:href="./ObjectReplacements/Object 1" xlink:type="simple" xlink:show="embed" xlink:actuate="onLoad"/></draw:frame><text:tab/>(<text:sequence text:ref-name="ref&quot;equation&quot;0" text:name="&quot;equation&quot;" text:formula="ooow:&quot;equation&quot;+1" style:num-format="1">1</text:sequence>)</text:p>
      <text:p text:style-name="equação"><draw:frame draw:style-name="fr2" draw:name="Object2" text:anchor-type="as-char" svg:width="2.1752in" svg:height="0.4583in" draw:z-index="3"><draw:object xlink:href="./Object 2" xlink:type="simple" xlink:show="embed" xlink:actuate="onLoad"/><draw:image xlink:href="./ObjectReplacements/Object 2" xlink:type="simple" xlink:show="embed" xlink:actuate="onLoad"/></draw:frame><text:tab/>(<text:sequence text:ref-name="ref&quot;equation&quot;1" text:name="&quot;equation&quot;" text:formula="ooow:&quot;equation&quot;+1" style:num-format="1">1</text:sequence>)</text:p>
      <text:p text:style-name="Standard">Na Equação 3.2 ipsum dolor sit amet, consectetuer adipiscing elit. Proin nunc ante, malesuada ac, vestibulum ut, luctus nec, orci. Nulla fringilla sem vitae urna aliquam sollicitudin. Nunc tellus est, molestie nec, faucibus quis, placerat eu, pede. Duis quis sapien. Aenean tempor ligula eget felis. Sed in libero nec ipsum dignissim hendrerit. <text:span text:style-name="T5">Proin luctus magna nec sapien. Curabitur feugiat dui ac velit. Aenean adipiscing lacus non arcu. </text:span>In vel tellus. Integer condimentum aliquam massa. Vivamus a ante. <text:span text:style-name="T5">In bibendum elit vitae est eleifend placerat. Proin scelerisque urna sed diam hendrerit laoreet. </text:span>Vestibulum ante ipsum primis in faucibus orci luctus et ultrices posuere cubilia Curae; Ut erat mauris, cursus quis, placerat a, tempor ullamcorper, velit. Cras gravida accumsan nunc. Sed auctor urna a leo.</text:p>
      <text:p text:style-name="P21"><text:soft-page-break/><draw:frame draw:style-name="fr1" draw:name="Picture 11" text:anchor-type="as-char" svg:width="5.9055in" svg:height="2.2972in" draw:z-index="1"><draw:image xlink:href="Pictures/10000000000001EB000000BFF4667CDF.png" xlink:type="simple" xlink:show="embed" xlink:actuate="onLoad" draw:mime-type="image/png"/><svg:desc>fig1.png</svg:desc></draw:frame></text:p>
      <text:p text:style-name="P21"><text:bookmark-start text:name="_Ref294370562"/><text:bookmark-start text:name="_Toc294372726"/><text:bookmark-start text:name="_Ref294370536"/>Figura <text:sequence text:ref-name="refFigura0" text:name="Figura" text:formula="ooow:Figura+1" style:num-format="1">1</text:sequence><text:bookmark-end text:name="_Ref294370562"/>:Arquitectura da Solução Proposta.<text:bookmark-end text:name="_Toc294372726"/><text:bookmark-end text:name="_Ref294370536"/></text:p>
      <text:p text:style-name="Standard">Nunc vitae mauris non tortor gravida dictum. Sed sem. Ut pellentesque nisl eget nunc. Aenean scelerisque, diam at porta hendrerit, risus dui varius lorem, ut suscipit diam magna id est. Curabitur malesuada nibh id turpis suscipit auctor. Suspendisse commodo elit ut magna. Fusce faucibus metus vel tellus. Maecenas quam urna, porta at, pellentesque eu, pellentesque eget, tellus. Nam vehicula faucibus est. Aenean tristique ipsum at metus. Cum sociis natoque penatibus et magnis dis parturient montes, nascetur ridiculus mus. Cum sociis natoque penatibus et magnis dis parturient montes, nascetur ridiculus mus. Vestibulum ante ipsum primis in faucibus orci luctus et ultrices posuere cubilia Curae; Pellentesque ipsum. Suspendisse fermentum sem iaculis arcu. Phasellus eget augue.</text:p>
      <text:p text:style-name="Standard">A arquitectura do visualizador assenta sobre os seguintes conceitos base (Zukowski et al. 1997):</text:p>
      <text:list text:style-name="WWNum26">
        <text:list-item>
          <text:p text:style-name="P22"><text:span text:style-name="T10">Componentes</text:span> − Um sistema é definido por um conjunto de componentes; a colaboração é baseada no modelo push.</text:p>
        </text:list-item>
        <text:list-item>
          <text:p text:style-name="P23"><text:span text:style-name="T10">Praesent</text:span> − Sit amet sem maecenas eleifend facilisis leo.</text:p>
        </text:list-item>
        <text:list-item>
          <text:p text:style-name="P23"><text:span text:style-name="T10">Pellentesque</text:span> − Habitant morbi tristique senectus et netus et</text:p>
        </text:list-item>
      </text:list>
      <text:list text:continue-list="list30730086869627" text:style-name="WWNum17">
        <text:list-item>
          <text:list>
            <text:list-item>
              <text:list>
                <text:list-item>
                  <text:h text:style-name="P19" text:outline-level="3"><text:bookmark-start text:name="_Toc439847343"/>Exemplo de Figura<text:bookmark-end text:name="_Toc439847343"/></text:h>
                </text:list-item>
              </text:list>
            </text:list-item>
          </text:list>
        </text:list-item>
      </text:list>
      <text:p text:style-name="Standard">É apresentado na <text:bookmark-ref text:reference-format="text" text:ref-name="_Ref294370562">Figura 1</text:bookmark-ref><text:s/>um exemplo de formato de figura.</text:p>
      <text:p text:style-name="Standard"><text:span text:style-name="T5">Loren ipsum dolor sit amet, consectetuer adipiscing elit. <text:s/></text:span>Praesent sit amet sem. Maecenas eleifend facilisis leo. Vestibulum et mi. Aliquam posuere, ante non tristique consectetuer, dui elit scelerisque augue, eu vehicula nibh nisi ac est. Suspendisse elementum sodales felis. Nullam laoreet fermentum urna.</text:p>
      <text:p text:style-name="Standard">Duis eget diam. <text:span text:style-name="T5">In est justo, tristique in, lacinia vel, feugiat eget, quam. </text:span>Pellentesque habitant morbi tristique senectus et netus et malesuada fames ac turpis egestas. Fusce feugiat, elit ac placerat fermentum, augue nisl ultricies eros, id fringilla enim sapien eu felis. Vestibulum <text:soft-page-break/>ante ipsum primis in faucibus orci luctus et ultrices posuere cubilia Curae; Sed dolor mi, porttitor quis, condimentum sed luctus.</text:p>
      <text:list text:continue-numbering="true" text:style-name="WWNum17">
        <text:list-item>
          <text:list>
            <text:list-item>
              <text:list>
                <text:list-item>
                  <text:h text:style-name="P19" text:outline-level="3"><text:bookmark-start text:name="_Toc439847344"/>Exemplo de Tabela<text:bookmark-end text:name="_Toc439847344"/></text:h>
                </text:list-item>
              </text:list>
            </text:list-item>
          </text:list>
        </text:list-item>
      </text:list>
      <text:p text:style-name="Standard">É apresentado na <text:bookmark-ref text:reference-format="text" text:ref-name="_Ref294370625">Tabela 1</text:bookmark-ref>um exemplo de formato de tabela, onde também foram utilizadas as funcionalidades de edição de fórmulas do OpenOffice.Org.</text:p>
      <text:p text:style-name="P24"><text:bookmark-start text:name="_Ref294370625"/><text:bookmark-start text:name="_Toc294372762"/>Tabela <text:sequence text:ref-name="ref&quot;Tabela&quot;0" text:name="&quot;Tabela&quot;" text:formula="ooow:&quot;Tabela&quot;+1" style:num-format="1">1</text:sequence><text:bookmark-end text:name="_Ref294370625"/>: Tabela Exemplo<text:bookmark-end text:name="_Toc294372762"/></text:p>
      <table:table table:name="Table2" table:style-name="Table2">
        <table:table-column table:style-name="Table2.A"/>
        <table:table-column table:style-name="Table2.B"/>
        <table:table-column table:style-name="Table2.C" table:number-columns-repeated="2"/>
        <table:table-column table:style-name="Table2.E"/>
        <table:table-header-rows>
          <table:table-row table:style-name="Table2.1">
            <table:table-cell table:style-name="Table2.A1" table:number-columns-spanned="5" office:value-type="string">
              <text:p text:style-name="P25">Iteração k de f(x<text:span text:style-name="T11">n</text:span>)</text:p>
            </table:table-cell>
            <table:covered-table-cell/>
            <table:covered-table-cell/>
            <table:covered-table-cell/>
            <table:covered-table-cell/>
          </table:table-row>
          <table:table-row table:style-name="Table2.1">
            <table:table-cell table:style-name="Table2.A2" office:value-type="string">
              <text:p text:style-name="P25">k</text:p>
            </table:table-cell>
            <table:table-cell table:style-name="Table2.A2" office:value-type="string">
              <text:p text:style-name="P25"><draw:frame draw:style-name="fr2" draw:name="Object3" text:anchor-type="as-char" svg:width="0.2083in" svg:height="0.2335in" draw:z-index="4"><draw:object xlink:href="./Object 3" xlink:type="simple" xlink:show="embed" xlink:actuate="onLoad"/><draw:image xlink:href="./ObjectReplacements/Object 3" xlink:type="simple" xlink:show="embed" xlink:actuate="onLoad"/></draw:frame></text:p>
            </table:table-cell>
            <table:table-cell table:style-name="Table2.C2" office:value-type="string">
              <text:p text:style-name="P25"><draw:frame draw:style-name="fr2" draw:name="Object4" text:anchor-type="as-char" svg:width="0.2083in" svg:height="0.2335in" draw:z-index="5"><draw:object xlink:href="./Object 4" xlink:type="simple" xlink:show="embed" xlink:actuate="onLoad"/><draw:image xlink:href="./ObjectReplacements/Object 4" xlink:type="simple" xlink:show="embed" xlink:actuate="onLoad"/></draw:frame></text:p>
            </table:table-cell>
            <table:table-cell table:style-name="Table2.C2" office:value-type="string">
              <text:p text:style-name="P25"><draw:frame draw:style-name="fr2" draw:name="Object5" text:anchor-type="as-char" svg:width="0.2083in" svg:height="0.2335in" draw:z-index="6"><draw:object xlink:href="./Object 5" xlink:type="simple" xlink:show="embed" xlink:actuate="onLoad"/><draw:image xlink:href="./ObjectReplacements/Object 5" xlink:type="simple" xlink:show="embed" xlink:actuate="onLoad"/></draw:frame></text:p>
            </table:table-cell>
            <table:table-cell table:style-name="Table2.E2" office:value-type="string">
              <text:p text:style-name="P25">comentários</text:p>
            </table:table-cell>
          </table:table-row>
        </table:table-header-rows>
        <table:table-row table:style-name="Table2.1">
          <table:table-cell table:style-name="Table2.A3" office:value-type="string">
            <text:p text:style-name="P26">0</text:p>
          </table:table-cell>
          <table:table-cell table:style-name="Table2.B3" office:value-type="string">
            <text:p text:style-name="P26">-0,3</text:p>
          </table:table-cell>
          <table:table-cell table:style-name="Table2.C3" office:value-type="string">
            <text:p text:style-name="P26">0,6</text:p>
          </table:table-cell>
          <table:table-cell table:style-name="Table2.D3" office:value-type="string">
            <text:p text:style-name="P26">0,7</text:p>
          </table:table-cell>
          <table:table-cell table:style-name="Table2.E3" office:value-type="string">
            <text:p text:style-name="P26">-</text:p>
          </table:table-cell>
        </table:table-row>
        <table:table-row table:style-name="Table2.1">
          <table:table-cell table:style-name="Table2.A3" office:value-type="string">
            <text:p text:style-name="P26">1</text:p>
          </table:table-cell>
          <table:table-cell table:style-name="Table2.A3" office:value-type="string">
            <text:p text:style-name="P26">0,47102965</text:p>
          </table:table-cell>
          <table:table-cell table:style-name="Table2.C4" office:value-type="string">
            <text:p text:style-name="P26">0,04883157</text:p>
          </table:table-cell>
          <table:table-cell table:style-name="Table2.D4" office:value-type="string">
            <text:p text:style-name="P26">-0,53345964</text:p>
          </table:table-cell>
          <table:table-cell table:style-name="Table2.E4" office:value-type="string">
            <text:p text:style-name="P26"><draw:frame draw:style-name="fr2" draw:name="Object6" text:anchor-type="as-char" svg:width="0.3665in" svg:height="0.2083in" draw:z-index="7"><draw:object xlink:href="./Object 6" xlink:type="simple" xlink:show="embed" xlink:actuate="onLoad"/><draw:image xlink:href="./ObjectReplacements/Object 6" xlink:type="simple" xlink:show="embed" xlink:actuate="onLoad"/></draw:frame></text:p>
          </table:table-cell>
        </table:table-row>
        <table:table-row table:style-name="Table2.1">
          <table:table-cell table:style-name="Table2.A3" office:value-type="string">
            <text:p text:style-name="P26">2</text:p>
          </table:table-cell>
          <table:table-cell table:style-name="Table2.A3" office:value-type="string">
            <text:p text:style-name="P26">0,49988691</text:p>
          </table:table-cell>
          <table:table-cell table:style-name="Table2.C5" office:value-type="string">
            <text:p text:style-name="P26">0,00228830</text:p>
          </table:table-cell>
          <table:table-cell table:style-name="Table2.D5" office:value-type="string">
            <text:p text:style-name="P26">-0,52246185</text:p>
          </table:table-cell>
          <table:table-cell table:style-name="Table2.E5" office:value-type="string">
            <text:p text:style-name="P26"><draw:frame draw:style-name="fr2" draw:name="Object7" text:anchor-type="as-char" svg:width="0.3665in" svg:height="0.2083in" draw:z-index="8"><draw:object xlink:href="./Object 7" xlink:type="simple" xlink:show="embed" xlink:actuate="onLoad"/><draw:image xlink:href="./ObjectReplacements/Object 7" xlink:type="simple" xlink:show="embed" xlink:actuate="onLoad"/></draw:frame></text:p>
          </table:table-cell>
        </table:table-row>
        <table:table-row table:style-name="Table2.1">
          <table:table-cell table:style-name="Table2.A3" office:value-type="string">
            <text:p text:style-name="P26">3</text:p>
          </table:table-cell>
          <table:table-cell table:style-name="Table2.B3" office:value-type="string">
            <text:p text:style-name="P26">0,49999976</text:p>
          </table:table-cell>
          <table:table-cell table:style-name="Table2.C3" office:value-type="string">
            <text:p text:style-name="P26">0,00005380</text:p>
          </table:table-cell>
          <table:table-cell table:style-name="Table2.D6" office:value-type="string">
            <text:p text:style-name="P26">-0,523656</text:p>
          </table:table-cell>
          <table:table-cell table:style-name="Table2.E6" office:value-type="string">
            <text:p text:style-name="P26">N</text:p>
          </table:table-cell>
        </table:table-row>
        <table:table-row table:style-name="Table2.1">
          <table:table-cell table:style-name="Table2.A3" office:value-type="string">
            <text:p text:style-name="P26">4</text:p>
          </table:table-cell>
          <table:table-cell table:style-name="Table2.A3" office:value-type="string">
            <text:p text:style-name="P26">0,5</text:p>
          </table:table-cell>
          <table:table-cell table:style-name="Table2.C3" office:value-type="string">
            <text:p text:style-name="P26">0,00000307</text:p>
          </table:table-cell>
          <table:table-cell table:style-name="Table2.D7" office:value-type="string">
            <text:p text:style-name="P26">-0,52359743</text:p>
          </table:table-cell>
          <table:table-cell table:style-name="Table2.E7" office:value-type="string">
            <text:p text:style-name="P26"/>
          </table:table-cell>
        </table:table-row>
        <table:table-row table:style-name="Table2.1">
          <table:table-cell table:style-name="Table2.A3" office:value-type="string">
            <text:p text:style-name="P26"><draw:frame draw:style-name="fr2" draw:name="Object8" text:anchor-type="as-char" svg:width="0.0752in" svg:height="0.2083in" draw:z-index="9"><draw:object xlink:href="./Object 8" xlink:type="simple" xlink:show="embed" xlink:actuate="onLoad"/><draw:image xlink:href="./ObjectReplacements/Object 8" xlink:type="simple" xlink:show="embed" xlink:actuate="onLoad"/></draw:frame></text:p>
          </table:table-cell>
          <table:table-cell table:style-name="Table2.A3" office:value-type="string">
            <text:p text:style-name="P26"><draw:frame draw:style-name="fr2" draw:name="Object9" text:anchor-type="as-char" svg:width="0.0752in" svg:height="0.2083in" draw:z-index="10"><draw:object xlink:href="./Object 9" xlink:type="simple" xlink:show="embed" xlink:actuate="onLoad"/><draw:image xlink:href="./ObjectReplacements/Object 9" xlink:type="simple" xlink:show="embed" xlink:actuate="onLoad"/></draw:frame></text:p>
          </table:table-cell>
          <table:table-cell table:style-name="Table2.C8" office:value-type="string">
            <text:p text:style-name="P26"><draw:frame draw:style-name="fr2" draw:name="Object10" text:anchor-type="as-char" svg:width="0.1835in" svg:height="0.2083in" draw:z-index="11"><draw:object xlink:href="./Object 10" xlink:type="simple" xlink:show="embed" xlink:actuate="onLoad"/><draw:image xlink:href="./ObjectReplacements/Object 10" xlink:type="simple" xlink:show="embed" xlink:actuate="onLoad"/></draw:frame></text:p>
          </table:table-cell>
          <table:table-cell table:style-name="Table2.D8" office:value-type="string">
            <text:p text:style-name="P26"><draw:frame draw:style-name="fr2" draw:name="Object11" text:anchor-type="as-char" svg:width="0.0752in" svg:height="0.2083in" draw:z-index="12"><draw:object xlink:href="./Object 11" xlink:type="simple" xlink:show="embed" xlink:actuate="onLoad"/><draw:image xlink:href="./ObjectReplacements/Object 11" xlink:type="simple" xlink:show="embed" xlink:actuate="onLoad"/></draw:frame></text:p>
          </table:table-cell>
          <table:table-cell table:style-name="Table2.E8" office:value-type="string">
            <text:p text:style-name="P26"/>
          </table:table-cell>
        </table:table-row>
        <table:table-row table:style-name="Table2.1">
          <table:table-cell table:style-name="Table2.A9" office:value-type="string">
            <text:p text:style-name="P26">7</text:p>
          </table:table-cell>
          <table:table-cell table:style-name="Table2.B9" office:value-type="string">
            <text:p text:style-name="P26">0,5</text:p>
          </table:table-cell>
          <table:table-cell table:style-name="Table2.C9" office:value-type="string">
            <text:p text:style-name="P26">0,0</text:p>
          </table:table-cell>
          <table:table-cell table:style-name="Table2.D9" office:value-type="string">
            <text:p text:style-name="P26">-0,52359878</text:p>
          </table:table-cell>
          <table:table-cell table:style-name="Table2.E9" office:value-type="string">
            <text:p text:style-name="P26" loext:marker-style-name="T12"><draw:frame draw:style-name="fr2" draw:name="Object12" text:anchor-type="as-char" svg:width="0.5917in" svg:height="0.2083in" draw:z-index="13"><draw:object xlink:href="./Object 12" xlink:type="simple" xlink:show="embed" xlink:actuate="onLoad"/><draw:image xlink:href="./ObjectReplacements/Object 12" xlink:type="simple" xlink:show="embed" xlink:actuate="onLoad"/></draw:frame></text:p>
          </table:table-cell>
        </table:table-row>
      </table:table>
      <text:p text:style-name="Standard"><text:span text:style-name="T5">Loren ipsum dolor sit amet, consectetuer adipiscing elit. </text:span>Praesent sit amet sem. Maecenas eleifend facilisis leo. Vestibulum et mi. Aliquam posuere, ante non tristique consectetuer, dui elit scelerisque augue, eu vehicula nibh nisi ac est. Suspendisse elementum sodales felis. Nullam laoreet fermentum urna.</text:p>
      <text:p text:style-name="Standard">Duis eget diam. <text:span text:style-name="T5">In est justo, tristique in, lacinia vel, feugiat eget, quam. </text:span>Pellentesque habitant morbi tristique senectus et netus et malesuada fames ac turpis egestas. Fusce feugiat, elit ac placerat fermentum, augue nisl ultricies eros, id fringilla enim sapien eu felis. Vestibulum ante ipsum primis in faucibus orci luctus et ultrices posuere cubilia Curae; Sed dolor mi, porttitor quis, condimentum sed luctus. </text:p>
      <text:list text:continue-numbering="true" text:style-name="WWNum17">
        <text:list-item>
          <text:list>
            <text:list-item>
              <text:h text:style-name="P17" text:outline-level="2"><text:bookmark-start text:name="_Toc439847345"/>Secção Exemplo<text:bookmark-end text:name="_Toc439847345"/></text:h>
            </text:list-item>
          </text:list>
        </text:list-item>
      </text:list>
      <text:p text:style-name="Standard">Loren ipsum dolor sit amet, consectetuer adipiscing elit. Praesent sit amet sem. Maecenas eleifend facilisis leo. Vestibulum et mi. Aliquam posuere, ante non tristique consectetuer, dui elit scelerisque augue, eu vehicula nibh nisi ac est. Suspendisse elementum sodales felis. Nullam laoreet fermentum urna.</text:p>
      <text:p text:style-name="Standard">Duis eget diam. <text:span text:style-name="T5">In est justo, tristique in, lacinia vel, feugiat eget, quam. </text:span>Pellentesque habitant morbi tristique senectus et netus et malesuada fames ac turpis egestas. Fusce feugiat, elit ac placerat fermentum, augue nisl ultricies eros, id fringilla enim sapien eu felis. Vestibulum <text:soft-page-break/>ante ipsum primis in faucibus orci luctus et ultrices posuere cubilia Curae; Sed dolor mi, porttitor quis, condimentum sed luctus. </text:p>
      <text:list xml:id="list30729828546400" text:continue-numbering="true" text:style-name="WWNum17">
        <text:list-item>
          <text:list>
            <text:list-item>
              <text:h text:style-name="P17" text:outline-level="2"><text:bookmark-start text:name="_Toc439847346"/>Resumo e Conclusões<text:bookmark-end text:name="_Toc439847346"/></text:h>
            </text:list-item>
          </text:list>
        </text:list-item>
      </text:list>
      <text:p text:style-name="Standard">Resumir e apresentar as conclusões que se podem tirar no fim deste capítulo, nomeadamente sobre a adequação da solução encontrada ao problema formulado.</text:p>
      <text:p text:style-name="Standard"/>
      <text:p text:style-name="Standard"/>
      <text:h text:style-name="P27" text:outline-level="1"><text:bookmark text:name="Ref_cap4"/><text:bookmark-start text:name="_Toc439847347"/>Implementação<text:bookmark-end text:name="_Toc439847347"/></text:h>
      <text:p text:style-name="Standard">Este capítulo pode ser dedicado à apresentação de detalhes de nível mais baixo relacionados com o enquadramento e implementação das soluções preconizadas no capítulo anterior. Note-se no entanto que detalhes desnecessários à compreensão do trabalho devem ser remetidos para anexos.</text:p>
      <text:p text:style-name="Standard">Dependendo do volume, a avaliação do trabalho realizado pode ser incluída neste capítulo ou pode constituir um capítulo separado.</text:p>
      <text:list text:continue-numbering="true" text:style-name="WWNum17">
        <text:list-item>
          <text:list>
            <text:list-item>
              <text:h text:style-name="P17" text:outline-level="2"><text:bookmark-start text:name="_Toc439847348"/>Secção Exemplo<text:bookmark-end text:name="_Toc439847348"/></text:h>
            </text:list-item>
          </text:list>
        </text:list-item>
      </text:list>
      <text:p text:style-name="Standard">Neste capítulo mostra-se apenas o formato da dissertação.</text:p>
      <text:p text:style-name="Standard">Lorem ipsum dolor sit amet, consectetuer adipiscing elit. Integer hendrerit commodo ante. Pellentesque nibh libero, aliquam at, faucibus id, commodo a, velit. Duis eleifend sem eget leo. Morbi in est. Suspendisse magna sem, varius nec, hendrerit non, tincidunt quis, quam. Aenean congue. Vivamus vel est sit amet sem iaculis posuere. Cras mollis, enim vel gravida aliquam, libero nunc ullamcorper dui, ullamcorper sodales lectus nulla sed urna. Morbi aliquet porta risus. Proin vestibulum ligula a purus. Maecenas a nulla. Maecenas mattis est vitae neque auctor tempus. Etiam nulla dui, mattis vitae, porttitor sed, aliquet ut, enim. Cras nisl magna,aliquet et, laoreet at, gravida ac, neque. Sed id est. Nulla dapibus dolor quis ipsum rhoncus cursus.</text:p>
      <text:p text:style-name="Standard">Etiam nisi est, dignissim sodales, fermentum id, pulvinar ac, eros. Duis id orci. Nam pretium nisl ac augue. Ut adipiscing magna eget est. Curabitur varius. <text:span text:style-name="T5">Nulla facilisi. Pellentesque sit amet neque ac dui accumsan blandit. </text:span>Donec mauris felis, egestas sit amet, convallis ac, dignissim quis, dolor. Maecenas cursus tortor vel leo. Quisque tristique. Nunc augue odio, tincidunt in, dapibus sed, ultricies sit amet, lorem. In hac habitasse platea dictumst. Praesent iaculis, lacus hendrerit tempor sodales, libero tellus aliquet orci, ut rhoncus massa lectus quis erat. Pellentesque quis dolor nec tortor rhoncus convallis. Aliquam erat volutpat. Fusce placerat, magna eu imperdiet lobortis, augue massa blandit turpis, a consectetuer quam arcu sit amet risus.</text:p>
      <text:list text:continue-numbering="true" text:style-name="WWNum17">
        <text:list-item>
          <text:list>
            <text:list-item>
              <text:h text:style-name="P17" text:outline-level="2"><text:bookmark-start text:name="_Toc439847349"/><text:soft-page-break/>Mais uma Secção<text:bookmark-end text:name="_Toc439847349"/></text:h>
            </text:list-item>
          </text:list>
        </text:list-item>
      </text:list>
      <text:p text:style-name="Standard">Lorem ipsum dolor sit amet, consectetuer adipiscing elit. Quisque purus sapien, interdum ut, vestibulum a, accumsan ullamcorper, erat. Mauris a magna ut leo porta imperdiet. Donec dui odio, porta in, pretium non, semper quis, orci. Quisque erat diam, pharetra vel, laoreet ac, hendrerit vel, enim. Donec tristique luctus risus. Fusce dolor est, eleifend id, elementum sit amet, varius vitae, neque. Morbi at augue. Ut sem ligula, auctor vitae, facilisis id, pharetra non, lectus. Nulla lacus augue, aliquam eget, sollicitudin sed, hendrerit eu, leo. Suspendisse ac tortor. Mauris at odio. Etiam vehicula. Nam lacinia purus at nibh. Aliquam fringilla lorem ac justo. Ut nec enim.</text:p>
      <text:p text:style-name="Standard">Quisque ullamcorper. Aliquam vel magna. Sed pulvinar dictum ligula. Sed ultrices dolor ut turpis. Vivamus sagittis orci malesuada arcu venenatis auctor. Proin vehicula pharetra urna. Aliquam egestas nunc quis nisl. Donec ullamcorper. Nulla purus. Ut suscipit lacus vitae dui. Mauris semper. Ut eget sem. Integer orci. Nam vitae dui eget nisi placerat convallis.</text:p>
      <text:p text:style-name="Standard">Sed id lorem. Proin gravida bibendum lacus. Sed molestie, urna quis euismod laoreet, diam dolor dictum diam, vitae consectetuer leo ipsum id ante. Integer eu lectus non mauris pharetra viverra. In feugiat libero ut massa. Morbi cursus, lorem sollicitudin blandit semper, felis magna pellentesque lacus, ut rhoncus leo neque at tellus. Sed mattis, diam eget eleifend tincidunt, ligula eros tincidunt diam, vitae auctor turpis est vel nunc. <text:span text:style-name="T5">In eu magna. Donec dolor metus, egestas sit amet, ultrices in, faucibus sed, lectus. </text:span>Etiam est enim, vehicula pharetra, porta non, viverra vel, nunc. Ut non sem. Etiam nec neque.</text:p>
      <text:list xml:id="list30729174758938" text:continue-numbering="true" text:style-name="WWNum17">
        <text:list-item>
          <text:list>
            <text:list-item>
              <text:h text:style-name="P17" text:outline-level="2"><text:bookmark-start text:name="_Toc439847350"/>Resumo ou Conclusões<text:bookmark-end text:name="_Toc439847350"/></text:h>
            </text:list-item>
          </text:list>
        </text:list-item>
      </text:list>
      <text:p text:style-name="Standard">Proin vehicula pharetra urna. Aliquam egestas nunc quis nisl. Donec ullamcorper. Nulla purus. Ut suscipit lacus vitae dui. Mauris semper. Ut eget sem. Integer orci. Nam vitae dui eget nisi placerat convallis.</text:p>
      <text:p text:style-name="Standard"/>
      <text:p text:style-name="Standard"/>
      <text:section text:style-name="Sect1" text:name="TextSection">
        <text:h text:style-name="Heading_20_1" text:outline-level="1"><text:bookmark text:name="Ref_cap5"/><text:bookmark-start text:name="_Toc439847351"/><text:soft-page-break/>Conclusões e Trabalho Futuro<text:bookmark-end text:name="_Toc439847351"/></text:h>
        <text:p text:style-name="Standard">Deve ser apresentado um resumo do trabalho realizado e apreciada a satisfação dos objetivos do trabalho, uma lista de contribuições principais do trabalho e as direções para trabalho futuro.</text:p>
        <text:p text:style-name="Standard">A escrita deste capítulo deve ser orientada para a total compreensão do trabalho, tendo em atenção que, depois de ler o Resumo e a Introdução, a maioria dos leitores passará à leitura deste capítulo de conclusões e recomendações para trabalho futuro.</text:p>
        <text:list text:continue-numbering="true" text:style-name="WWNum17">
          <text:list-item>
            <text:list>
              <text:list-item>
                <text:h text:style-name="P17" text:outline-level="2"><text:bookmark-start text:name="_Toc439847352"/>Satisfação dos Objetivos<text:bookmark-end text:name="_Toc439847352"/></text:h>
              </text:list-item>
            </text:list>
          </text:list-item>
        </text:list>
        <text:p text:style-name="Standard">Lorem ipsum dolor sit amet, consectetuer adipiscing elit. Etiam non felis sed odio rutrum ultrices. Donec tempor dolor. Vivamus justo neque, tempus id, ullamcorper in, pharetra non, tellus. Praesent eu orci eu dolor congue gravida. Sed eu est. Donec pulvinar, lectus et eleifend volutpat, diam sapien sollicitudin arcu, a sagittis libero neque et dolor. Nam ligula. Cras tincidunt lectus quis nunc. Cras tincidunt congue turpis. Nulla pede velit, sagittis a, faucibus vitae, porttitor nec, ante. Nulla ut arcu. Cras eu augue at ipsum feugiat hendrerit. Proin sed justo eu sapien eleifend elementum. Pellentesque habitant morbi tristique senectus et netus et malesuada fames ac turpis egestas. Vivamus quam lacus, pharetra vel, aliquam vel, volutpat sed, nisl.</text:p>
        <text:p text:style-name="Standard" loext:marker-style-name="T5"><text:span text:style-name="T5">Nullam erat est, vehicula id, tempor non, scelerisque at, tellus. </text:span>Pellentesque tincidunt, ante vehicula bibendum adipiscing, lorem augue tempor felis, in dictum massa justo sed metus. Suspendisse placerat, mi eget molestie sodales, tortor ante interdum dui, ac sagittis est pede et lacus. Duis sapien. Nam ornare turpis et magna. Etiam adipiscing adipiscing ipsum. Fusce sodales nisl a arcu. Cras massa leo, vehicula facilisis, commodo a, molestie faucibus, metus. Suspendisse potenti. Duis sagittis. Donec porta. Sed urna. Maecenas eros. <text:span text:style-name="T5">Vivamus erat ligula, pharetra sit amet, bibendum et, fermentum sed, dolor. </text:span>Nullam eleifend condimentum nibh. Integer leo nibh, consequat eget, mollis et, sagittis ac, felis. Duis viverra pede in pede. <text:span text:style-name="T5">Phasellus molestie placerat leo. Praesent at tellus a augue congue molestie. Proin sed justo eu sapien eleifend elementum. Pellentesque habitant morbi tristique senectus et netus et malesuada fames ac turpis egestas.</text:span></text:p>
        <text:list xml:id="list30730262198823" text:continue-numbering="true" text:style-name="WWNum17">
          <text:list-item>
            <text:list>
              <text:list-item>
                <text:h text:style-name="P17" text:outline-level="2"><text:bookmark-start text:name="_Toc439847353"/><text:soft-page-break/>Trabalho Futuro<text:bookmark-end text:name="_Toc439847353"/></text:h>
              </text:list-item>
            </text:list>
          </text:list-item>
        </text:list>
        <text:p text:style-name="Standard" loext:marker-style-name="T5">Lorem ipsum dolor sit amet, consectetuer adipiscing elit. Aliquam tempor tristique risus. Suspendisse potenti. Fusce id eros. In eu enim. Praesent commodo leo. Nullam augue. Pellentesque tellus. Integer pulvinar purus a dui convallis consectetuer. In adipiscing, orci vitae lacinia semper, sapien elit posuere sem, ac euismod ipsum elit tempus urna. <text:span text:style-name="T5">Aliquam erat volutpat. Nullam suscipit augue sed felis. Phasellus faucibus accumsan est.</text:span><text:span text:style-name="T5"/></text:p>
        <text:p text:style-name="Standard" loext:marker-style-name="T5"><text:span text:style-name="T5">Aliquam felis justo, facilisis sit amet, bibendum ut, tempus ac, dolor. Sed malesuada. Nunc non massa. In erat. Nulla facilisi. Phasellus blandit, est in accumsan cursus, libero augue elementum leo, vitae auctor mauris nisl ac tortor. Cras porttitor ornare elit. Fusce at lorem. Sed lectus tortor, vestibulum id, varius a, condimentum nec, lectus. Maecenas in nisi et magna pretium aliquam. </text:span>Pellentesque justo elit, feugiat nec, tincidunt a, dignissim vel, ipsum. Sed nunc. Vestibulum ante ipsum primis in faucibus orci luctus et ultrices posuere cubilia Curae; Aliquam tempus rhoncus leo. <text:span text:style-name="T5">Donec neque quam, cursus sit amet, ultricies varius, semper non, pede. Donec porttitor. Sed aliquet feugiat elit.</text:span></text:p>
        <text:p text:style-name="P11" loext:marker-style-name="T5"/>
        <text:p text:style-name="Standard"><text:span text:style-name="T5">Lorem ipsum dolor sit amet, consectetuer adipiscing elit. Phasellus tellus pede, auctor ut, tincidunt a, consectetuer in, felis. </text:span>Mauris quis dolor et neque accumsan pellentesque. Donec dui magna, scelerisque mattis, sagittis nec, porta quis, nulla. Vivamus quis nisl. Etiam vitae nisl in diam vehicula viverra. Sed sollicitudin scelerisque est. Nunc dapibus. Sed urna. Nulla gravida. Praesent faucibus, risus ac lobortis dignissim, est tortor laoreet mauris, dictum pellentesque nunc orci tincidunt tellus. Nullam pulvinar, leo sed vestibulum euismod, ante ligula elementum pede, sit amet dapibus lacus tortor ac nisl. Morbi libero. Integer sed dolor ac lectus commodo iaculis. Donec ut odio.</text:p>
        <text:p text:style-name="Standard"/>
        <text:p text:style-name="Standard"/>
      </text:section>
      <text:p text:style-name="P28"/>
      <text:h text:style-name="Heading_20_1" text:outline-level="1"><text:bookmark-start text:name="_Toc439847354"/>Referências<text:bookmark-end text:name="_Toc439847354"/></text:h>
      <text:table-of-content text:style-name="Sect1" text:protected="true" text:name="Table of Contents2">
        <text:table-of-content-source text:outline-level="10" text:use-outline-level="false">
          <text:index-title-template text:style-name="Contents_20_Heading"/>
          <text:table-of-content-entry-template text:outline-level="1" text:style-name="Contents_20_1">
            <text:index-entry-link-start text:style-name="Index_20_Link"/>
            <text:index-entry-chapter/>
            <text:index-entry-tab-stop style:type="left" style:position="0.1874in" style:leader-char=" "/>
            <text:index-entry-text/>
            <text:index-entry-link-end/>
          </text:table-of-content-entry-template>
          <text:table-of-content-entry-template text:outline-level="2" text:style-name="Contents_20_2">
            <text:index-entry-link-start text:style-name="Index_20_Link"/>
            <text:index-entry-chapter/>
            <text:index-entry-tab-stop style:type="left" style:position="0.4374in" style:leader-char=" "/>
            <text:index-entry-text/>
            <text:index-entry-link-end/>
          </text:table-of-content-entry-template>
          <text:table-of-content-entry-template text:outline-level="3" text:style-name="Contents_20_3">
            <text:index-entry-link-start text:style-name="Index_20_Link"/>
            <text:index-entry-chapter/>
            <text:index-entry-tab-stop style:type="left" style:position="0.75in" style:leader-char=" "/>
            <text:index-entry-text/>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 loext:marker-style-name="T5"><text:span text:style-name="T5">(Apache 2005) Apache. Batik SVG Toolkit Architecture, Junho 2005. http://xml.apache.org/batik/architecture.html#coreComponents .</text:span><text:span text:style-name="T5"/></text:p>
          <text:p text:style-name="P29">(GAP 2012) Guia de Apoio à Publicação, Serviços de Documentação e Informação da FEUP. Acedido em 28 janeiro de 2013. http://metis.fe.up.pt/gap</text:p>
          <text:p text:style-name="P29" loext:marker-style-name="T5">(IBM 2005)<text:tab/>IBM. <text:span text:style-name="T5">Program with SVG, Maio 2005. </text:span><text:span text:style-name="T5"/></text:p>
          <text:p text:style-name="P30" loext:marker-style-name="T5"><text:span text:style-name="T5">http://www-128.ibm.com/developerworks/xml/library/x-matters40/ .</text:span><text:span text:style-name="T5"/></text:p>
          <text:p text:style-name="P29">(Lipsum 2008) Lipsum. Lorem Ipsum, Acedido em 19 de maio de 2008. http://www.lipsum.com.</text:p>
          <text:p text:style-name="P29" loext:marker-style-name="T5">(Marinho et al. 2006) Filipe Marinho, Paulo Viegas, J. Correia Lopes. SVG na Visualização de Sinópticos. In José Carlos Ramalho, J. Correia Lopes, Alberto Simões (Eds.) XATA2006, XML: Aplicações e Tecnologias Associadas (Portalege, 9 e 10 de Fevereiro de 2006), pp. 99-112. <text:span text:style-name="T5">Universidade do Minho, <text:s/>2006.</text:span><text:span text:style-name="T5"/></text:p>
          <text:p text:style-name="P29" loext:marker-style-name="T5"><text:span text:style-name="T5">(Philips and Pugh 2005) Estelle M. Philips and Derek S. Pugh. How to Get a PhD. Open University Press, Fourth Ed., <text:s/>2005.</text:span><text:span text:style-name="T5"/></text:p>
          <text:p text:style-name="P29" loext:marker-style-name="T5"><text:span text:style-name="T5">(Tham 2001) Ming Tham. Writing Research Theses or Dissertations. Internal Guide, University of Newcastle Upon Tyne, Maio 2001.</text:span><text:span text:style-name="T5"/></text:p>
          <text:p text:style-name="P29" loext:marker-style-name="T5"><text:span text:style-name="T5">(W3C 2005a) W3C - World Wide Web Consortium. W3C SVG Specification, Junho 2005. http://www.w3.org/TR/SVG11/ .</text:span><text:span text:style-name="T5"/></text:p>
          <text:p text:style-name="P29" loext:marker-style-name="T5"><text:soft-page-break/><text:span text:style-name="T5">(W3C 2005b) W3C - World Wide Web Consortium. W3C - About SVG, Abril 2005. http://www.w3.org/TR/SVG/intro.html/ .</text:span><text:span text:style-name="T5"/></text:p>
          <text:p text:style-name="P29"><text:span text:style-name="T5">(Zukowski et al. 1997) Debora J. Zukowski, Apratim Purakayastha, Ajay Mohindra, Murthy Devarakonda. Metis: A Thin-Client Application Framework. In <text:s/>Proceedings of the Third Conference on Object-Oriented Technologies and Systems, pp. 103-114. </text:span>Usenix Association, Junho 1997.</text:p>
        </text:index-body>
      </text:table-of-content>
      <text:p text:style-name="P31"/>
      <text:p text:style-name="P32">Anexo A</text:p>
      <text:h text:style-name="Heading_20_1" text:outline-level="1"><text:bookmark-start text:name="_Toc439847355"/>Loren Ipsum<text:bookmark-end text:name="_Toc439847355"/></text:h>
      <text:p text:style-name="Standard">Depois das conclusões e das referências bibliográficas, apresentam-se os anexos relevantes.</text:p>
      <text:list text:continue-numbering="true" text:style-name="WWNum17">
        <text:list-item>
          <text:list>
            <text:list-item>
              <text:p text:style-name="P33">O que é o Loren Ipsum</text:p>
            </text:list-item>
          </text:list>
        </text:list-item>
      </text:list>
      <text:p text:style-name="Standard" loext:marker-style-name="english"><text:span text:style-name="english"><text:span text:style-name="T13">Lorem Ipsum</text:span></text:span><text:span text:style-name="english">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Lip08]. </text:span></text:p>
      <text:list text:continue-numbering="true" text:style-name="WWNum17">
        <text:list-item>
          <text:list>
            <text:list-item>
              <text:p text:style-name="P33">De onde vem o Loren?</text:p>
            </text:list-item>
          </text:list>
        </text:list-item>
      </text:list>
      <text:p text:style-name="Standard" loext:marker-style-name="english"><text:span text:style-name="english">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text:span><text:soft-page-break/><text:span text:style-name="english">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span></text:p>
      <text:p text:style-name="Standard" loext:marker-style-name="english"><text:span text:style-name="english">The standard chunk of Lorem Ipsum used since the 1500s is reproduced below for those interested. Sections 1.10.32 and 1.10.33 from “de Finibus Bonorum et Malorum” by Cicero are also reproduced in their exact original form, accompanied by English versions from the 1914 translation by H. Rackham.</text:span></text:p>
      <text:list text:continue-numbering="true" text:style-name="WWNum17">
        <text:list-item>
          <text:list>
            <text:list-item>
              <text:p text:style-name="P33">Porque se usa o <text:span text:style-name="T14">Loren</text:span>?</text:p>
            </text:list-item>
          </text:list>
        </text:list-item>
      </text:list>
      <text:p text:style-name="Standard" loext:marker-style-name="english"><text:span text:style-name="english">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span></text:p>
      <text:list xml:id="list30731046111597" text:continue-numbering="true" text:style-name="WWNum17">
        <text:list-item>
          <text:list>
            <text:list-item>
              <text:p text:style-name="P33">Onde se Podem Encontrar Exemplos?</text:p>
            </text:list-item>
          </text:list>
        </text:list-item>
      </text:list>
      <text:p text:style-name="Standard" loext:marker-style-name="english"><text:span text:style-name="english">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text:span></text:p>
      <text:p text:style-name="Standard" loext:marker-style-name="english"><text:span text:style-name="english"/></text:p>
      <text:p text:style-name="P34" loext:marker-style-name="english"><text:span text:style-name="english"/></text:p>
      <text:p text:style-name="P35" loext:marker-style-name="T5"><text:bookmark text:name="_GoBack"/></text:p>
      <text:h text:style-name="Heading_20_1" text:outline-level="1"><text:bookmark-start text:name="_Toc439847356"/>Índice Remissivo<text:bookmark-end text:name="_Toc439847356"/></text:h>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imbus Sans L" svg:font-family="'Nimbus Sans L'" style:font-family-generic="system" style:font-pitch="variable"/>
    <style:font-face style:name="PingFang SC" svg:font-family="'PingFang SC'" style:font-family-generic="system" style:font-pitch="variable"/>
    <style:font-face style:name="StarSymbol" svg:font-family="StarSymbol" style:font-family-generic="roman" style:font-pitch="variable"/>
    <style:font-face style:name="StarSymbol1" svg:font-family="Star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pt" fo:country="PT" style:letter-kerning="false" style:font-name-asian="Times New Roman1" style:font-size-asian="10pt" style:language-asian="pt" style:country-asian="PT"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 fo:font-size="10pt" fo:language="pt" fo:country="PT" style:letter-kerning="false" style:font-name-asian="Times New Roman1" style:font-size-asian="10pt" style:language-asian="pt" style:country-asian="PT"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0.2362in" fo:text-align="justify" style:justify-single-word="false" fo:orphans="2" fo:widows="2" fo:hyphenation-ladder-count="no-limit" fo:hyphenation-keep="auto" loext:hyphenation-keep-type="column" fo:text-indent="0.3154in" style:auto-text-indent="false" style:writing-mode="lr-tb"/>
      <style:text-properties style:font-name="Times" fo:font-family="Times" style:font-family-generic="roman" style:font-pitch="variable" fo:font-size="11pt" style:font-name-asian="Nimbus Sans L" style:font-family-asian="'Nimbus Sans L'" style:font-family-generic-asian="system" style:font-pitch-asian="variable" style:font-size-asian="11pt" style:font-size-complex="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Text_20_body" loext:linked-style-name="Heading_20_1_20_Char" style:default-outline-level="1" style:list-style-name="" style:class="chapter">
      <style:paragraph-properties fo:margin-top="1.25in" fo:margin-bottom="0.8335in" style:contextual-spacing="false" fo:line-height="100%" fo:keep-together="always" fo:keep-with-next="always"/>
      <style:text-properties fo:font-size="28pt" fo:font-weight="bold" style:font-name-asian="Times New Roman1" style:font-family-asian="'Times New Roman'" style:font-family-generic-asian="system" style:font-pitch-asian="variable" style:font-size-asian="28pt" style:font-weight-asian="bold" style:font-size-complex="10pt" style:font-weight-complex="bold"/>
    </style:style>
    <style:style style:name="Heading_20_2" style:display-name="Heading 2" style:family="paragraph" style:parent-style-name="Heading_20_1" style:next-style-name="Text_20_body" loext:linked-style-name="Heading_20_2_20_Char" style:default-outline-level="2" style:list-style-name="WWNum17" style:list-level="2" style:class="chapter">
      <style:paragraph-properties fo:margin-left="0.4016in" fo:margin-top="0.4445in" fo:margin-bottom="0.1665in" style:contextual-spacing="false" fo:text-indent="-0.4016in" style:auto-text-indent="false"/>
      <style:text-properties fo:font-size="15pt" style:font-size-asian="15pt" style:font-size-complex="15pt"/>
    </style:style>
    <style:style style:name="Heading_20_3" style:display-name="Heading 3" style:family="paragraph" style:parent-style-name="Heading_20_4" style:next-style-name="Text_20_body" loext:linked-style-name="Heading_20_3_20_Char" style:default-outline-level="3" style:list-style-name="WWNum17" style:list-level="3" style:class="chapter">
      <style:paragraph-properties fo:margin-top="0.3335in" fo:margin-bottom="0.1575in" style:contextual-spacing="false" fo:text-align="start" style:justify-single-word="false"/>
      <style:text-properties fo:font-size="13pt" style:font-size-asian="13pt" style:font-weight-complex="bold"/>
    </style:style>
    <style:style style:name="Heading_20_4" style:display-name="Heading 4" style:family="paragraph" style:parent-style-name="Standard" style:next-style-name="Standard" style:default-outline-level="4" style:list-style-name="WWNum17" style:list-level="4" style:class="chapter">
      <style:paragraph-properties fo:margin-top="0.4165in" fo:margin-bottom="0in"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WWNum17" style:list-level="5" style:class="chapter">
      <style:paragraph-properties fo:margin-top="0.3335in" fo:margin-bottom="0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WWNum17" style:list-level="6" style:class="chapter">
      <style:paragraph-properties fo:margin-top="0.111in" fo:margin-bottom="0in" style:contextual-spacing="false" fo:keep-together="always" fo:keep-with-next="always"/>
      <style:text-properties fo:font-weight="bold" style:font-weight-asian="bold"/>
    </style:style>
    <style:style style:name="Heading_20_7" style:display-name="Heading 7" style:family="paragraph" style:parent-style-name="Standard" style:next-style-name="Standard" style:default-outline-level="7" style:list-style-name="WWNum17" style:list-level="7" style:class="chapter">
      <style:paragraph-properties fo:margin-top="0.111in" fo:margin-bottom="0in" style:contextual-spacing="false" fo:keep-together="always" fo:keep-with-next="always"/>
      <style:text-properties fo:font-weight="bold" style:font-weight-asian="bold"/>
    </style:style>
    <style:style style:name="Heading_20_8" style:display-name="Heading 8" style:family="paragraph" style:parent-style-name="Standard" style:next-style-name="Standard" style:default-outline-level="8" style:list-style-name="WWNum17" style:list-level="8" style:class="chapter">
      <style:paragraph-properties fo:margin-top="0.111in" fo:margin-bottom="0in" style:contextual-spacing="false" fo:keep-together="always" fo:keep-with-next="always"/>
      <style:text-properties fo:font-weight="bold" style:font-weight-asian="bold"/>
    </style:style>
    <style:style style:name="Heading_20_9" style:display-name="Heading 9" style:family="paragraph" style:parent-style-name="Standard" style:next-style-name="Standard" style:default-outline-level="9" style:list-style-name="WWNum17" style:list-level="9" style:class="chapter">
      <style:paragraph-properties fo:margin-top="0.111in" fo:margin-bottom="0in" style:contextual-spacing="false" fo:keep-together="always" fo:keep-with-next="always"/>
      <style:text-properties fo:font-weight="bold" style:font-weight-asian="bold"/>
    </style:style>
    <style:style style:name="txt" style:family="paragraph" style:parent-style-name="Standard">
      <style:paragraph-properties fo:margin-right="-0.3346in" fo:text-align="start" style:justify-single-word="false"/>
      <style:text-properties style:font-name="Courier New" fo:font-family="'Courier New'" style:font-family-generic="roman" style:font-pitch="variable" fo:font-size="10pt" style:font-size-asian="10pt"/>
    </style:style>
    <style:style style:name="List_20_2_20__28_WW_29_" style:display-name="List 2 (WW)" style:family="paragraph" style:parent-style-name="Standard">
      <style:paragraph-properties fo:margin-left="0.3929in" fo:text-indent="-0.1965in" style:auto-text-indent="false"/>
    </style:style>
    <style:style style:name="Alg." style:family="paragraph" style:parent-style-name="Standard">
      <style:paragraph-properties fo:margin-right="-0.0008in" fo:text-align="start" style:justify-single-word="false" fo:padding="0.0138in" fo:border="0.74pt solid #000000" style:shadow="none"/>
      <style:text-properties style:font-name="Courier New" fo:font-family="'Courier New'" style:font-family-generic="roman" style:font-pitch="variable" fo:font-size="9pt" style:font-size-asian="9pt"/>
    </style:style>
    <style:style style:name="Marginalia" style:family="paragraph" style:parent-style-name="Standard" style:class="text">
      <style:text-properties fo:font-size="10pt" style:font-size-asian="10pt"/>
    </style:style>
    <style:style style:name="Text_20_body_20_indent" style:display-name="Text body indent" style:family="paragraph" style:parent-style-name="Standard" style:class="text">
      <style:paragraph-properties fo:margin-left="0.1965in" fo:margin-top="0in" fo:margin-bottom="0.0835in" style:contextual-spacing="false"/>
    </style:style>
    <style:style style:name="Endnote" style:family="paragraph" style:parent-style-name="Standard" style:class="extra"/>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3457in" style:type="center"/>
          <style:tab-stop style:position="6.6925in" style:type="right"/>
        </style:tab-stops>
      </style:paragraph-properties>
    </style:style>
    <style:style style:name="Footnote" style:family="paragraph" style:parent-style-name="Standard" loext:linked-style-name="Footnote_20_Text_20_Char" style:class="extra">
      <style:paragraph-properties fo:margin-left="0.1972in" fo:line-height="100%" fo:text-indent="-0.1972in" style:auto-text-indent="false" text:number-lines="false" text:line-number="0"/>
      <style:text-properties fo:font-size="9pt" style:font-size-asian="9pt" style:font-size-complex="10pt"/>
    </style:style>
    <style:style style:name="Header" style:family="paragraph" style:parent-style-name="Standard" loext:linked-style-name="Header_20_Char" style:class="extra">
      <style:paragraph-properties fo:text-indent="0in" style:auto-text-indent="false" text:number-lines="false" text:line-number="0">
        <style:tab-stops>
          <style:tab-stop style:position="3.3457in" style:type="center"/>
          <style:tab-stop style:position="6.6925in" style:type="right"/>
        </style:tab-stops>
      </style:paragraph-properties>
    </style:style>
    <style:style style:name="Indent" style:family="paragraph" style:parent-style-name="Standard">
      <style:paragraph-properties fo:margin-left="0.5917in" fo:text-indent="-0.1965in" style:auto-text-indent="false"/>
    </style:style>
    <style:style style:name="Notas" style:family="paragraph" style:parent-style-name="Standard" style:next-style-name="Standard">
      <style:paragraph-properties fo:margin-left="4.0362in" fo:text-align="end" style:justify-single-word="false" fo:keep-together="always" fo:keep-with-next="always"/>
      <style:text-properties fo:color="#0000ff" loext:opacity="100%" fo:font-size="10pt" style:font-size-asian="10pt"/>
    </style:style>
    <style:style style:name="Contents_20_1" style:display-name="Contents 1" style:family="paragraph" style:parent-style-name="Índice" style:class="index">
      <style:paragraph-properties fo:margin-top="0.0783in" fo:margin-bottom="0in" style:contextual-spacing="false" fo:text-indent="0in" style:auto-text-indent="false">
        <style:tab-stops>
          <style:tab-stop style:position="0.1874in"/>
          <style:tab-stop style:position="5.8752in" style:type="right" style:leader-style="dotted" style:leader-text="."/>
        </style:tab-stops>
      </style:paragraph-properties>
      <style:text-properties fo:font-weight="bold" style:font-weight-asian="bold"/>
    </style:style>
    <style:style style:name="Contents_20_2" style:display-name="Contents 2" style:family="paragraph" style:parent-style-name="Índice" style:class="index">
      <style:paragraph-properties fo:margin-left="0.1965in" fo:text-indent="0in" style:auto-text-indent="false">
        <style:tab-stops>
          <style:tab-stop style:position="0.4374in"/>
          <style:tab-stop style:position="5.8752in" style:type="right" style:leader-style="dotted" style:leader-text="."/>
        </style:tab-stops>
      </style:paragraph-properties>
    </style:style>
    <style:style style:name="Contents_20_3" style:display-name="Contents 3" style:family="paragraph" style:parent-style-name="Índice" style:class="index">
      <style:paragraph-properties fo:margin-left="0.3929in" fo:text-indent="0in" style:auto-text-indent="false">
        <style:tab-stops>
          <style:tab-stop style:position="0.75in"/>
          <style:tab-stop style:position="5.8752in" style:type="right" style:leader-style="dotted" style:leader-text="."/>
        </style:tab-stops>
      </style:paragraph-properties>
      <style:text-properties style:font-name="Times New Roman" fo:font-family="'Times New Roman'" style:font-family-generic="roman" style:font-pitch="variable" style:font-name-asian="ＭＳ 明朝" style:font-family-asian="'ＭＳ 明朝'" style:font-family-generic-asian="system" style:font-pitch-asian="variable" style:font-size-complex="11pt"/>
    </style:style>
    <style:style style:name="Contents_20_4" style:display-name="Contents 4" style:family="paragraph" style:parent-style-name="Standard" style:next-style-name="Standard" style:class="index">
      <style:paragraph-properties fo:margin-left="1.3783in" fo:margin-right="0.7874in" fo:line-height="150%" fo:text-align="start" style:justify-single-word="false" fo:text-indent="-0.4925in" style:auto-text-indent="false">
        <style:tab-stops>
          <style:tab-stop style:position="5.5126in" style:type="righ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5752in" fo:margin-right="0.7874in" fo:line-height="150%" fo:text-align="start" style:justify-single-word="false" fo:text-indent="-0.4917in" style:auto-text-indent="false">
        <style:tab-stops>
          <style:tab-stop style:position="5.5126in" style:type="righ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772in" fo:margin-right="0.7874in" fo:line-height="150%" fo:text-align="start" style:justify-single-word="false" fo:text-indent="-0.4925in" style:auto-text-indent="false">
        <style:tab-stops>
          <style:tab-stop style:position="5.5126in" style:type="righ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1.9689in" fo:margin-right="0.7874in" fo:line-height="150%" fo:text-align="start" style:justify-single-word="false" fo:text-indent="-0.4917in" style:auto-text-indent="false">
        <style:tab-stops>
          <style:tab-stop style:position="5.5126in" style:type="righ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1661in" fo:margin-right="0.7874in" fo:line-height="150%" fo:text-align="start" style:justify-single-word="false" fo:text-indent="-0.4925in" style:auto-text-indent="false">
        <style:tab-stops>
          <style:tab-stop style:position="5.5126in" style:type="righ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3626in" fo:margin-right="0.7874in" fo:line-height="150%" fo:text-align="start" style:justify-single-word="false" fo:text-indent="-0.4917in" style:auto-text-indent="false">
        <style:tab-stops>
          <style:tab-stop style:position="5.5126in" style:type="right"/>
        </style:tab-stops>
      </style:paragraph-properties>
      <style:text-properties fo:font-size="9pt" style:font-size-asian="9pt"/>
    </style:style>
    <style:style style:name="macro" style:family="paragraph">
      <style:paragraph-properties fo:margin-top="0in" fo:margin-bottom="0in" style: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roman" style:font-pitch="variable" fo:font-size="9pt" fo:language="en" fo:country="GB" style:font-size-asian="9pt" style:language-asian="en" style:country-asian="US"/>
    </style:style>
    <style:style style:name="Header_20_Left" style:display-name="Header Left" style:family="paragraph" style:parent-style-name="Standard">
      <style:paragraph-properties fo:text-align="start" style:justify-single-word="false"/>
      <style:text-properties fo:font-weight="bold" style:font-weight-asian="bold"/>
    </style:style>
    <style:style style:name="Header_20_Right" style:display-name="Header Right" style:family="paragraph" style:parent-style-name="Standard">
      <style:paragraph-properties fo:text-align="end" style:justify-single-word="false"/>
      <style:text-properties fo:font-weight="bold" style:font-weight-asian="bold"/>
    </style:style>
    <style:style style:name="Heading_20_1_20_False" style:display-name="Heading 1 False" style:family="paragraph" style:parent-style-name="Heading_20_1" style:next-style-name="Standard" style:default-outline-level=""/>
    <style:style style:name="Numbering_20_3" style:display-name="Numbering 3" style:family="paragraph" style:parent-style-name="Standard" style:class="list">
      <style:paragraph-properties fo:margin-left="0.5898in" fo:text-indent="-0.1965in" style:auto-text-indent="false"/>
    </style:style>
    <style:style style:name="Figure_20_Index_20_1" style:display-name="Figure Index 1" style:family="paragraph" style:parent-style-name="Standard" style:next-style-name="Standard" style:class="index">
      <style:paragraph-properties fo:margin-left="0.5902in" fo:margin-right="0.7874in" fo:text-align="start" style:justify-single-word="false" fo:text-indent="-0.2953in" style:auto-text-indent="false">
        <style:tab-stops>
          <style:tab-stop style:position="5.5126in" style:type="right"/>
        </style:tab-stops>
      </style:paragraph-properties>
      <style:text-properties fo:font-size="10pt" style:font-size-asian="10pt"/>
    </style:style>
    <style:style style:name="Title_20_of_20_Doc" style:display-name="Title of Doc" style:family="paragraph" style:parent-style-name="Standard" style:next-style-name="Standard">
      <style:paragraph-properties fo:text-align="center" style:justify-single-word="false"/>
      <style:text-properties fo:font-size="18pt" fo:font-weight="bold" style:font-size-asian="18pt" style:font-weight-asian="bold"/>
    </style:style>
    <style:style style:name="Document_20_Map" style:display-name="Document Map" style:family="paragraph" style:parent-style-name="Standard">
      <loext:graphic-properties draw:fill="solid" draw:fill-color="#000080"/>
      <style:paragraph-properties fo:background-color="#000080" style:punctuation-wrap="hanging" style:vertical-align="baseline"/>
      <style:text-properties fo:font-size="9pt" style:font-size-asian="9pt"/>
    </style:style>
    <style:style style:name="author" style:family="paragraph" style:parent-style-name="Standard">
      <style:paragraph-properties fo:margin-top="0.1965in" fo:margin-bottom="0in" style:contextual-spacing="false" fo:text-align="center" style:justify-single-word="false" fo:text-indent="0in" style:auto-text-indent="false"/>
      <style:text-properties fo:font-size="14pt" fo:font-weight="bold" style:font-size-asian="14pt" style:font-weight-asian="bold" style:font-size-complex="14pt" style:font-weight-complex="bold"/>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Índice" style:family="paragraph" style:parent-style-name="Standard">
      <style:paragraph-properties text:number-lines="false" text:line-number="0"/>
    </style:style>
    <style:style style:name="Bibliografia_20_1" style:display-name="Bibliografia 1" style:family="paragraph" style:parent-style-name="Índice">
      <style:paragraph-properties fo:margin-left="0.7874in" fo:margin-top="0in" fo:margin-bottom="0.0783in" style:contextual-spacing="false" fo:text-indent="-0.7874in" style:auto-text-indent="false">
        <style:tab-stops>
          <style:tab-stop style:position="7.4799in" style:type="right" style:leader-style="dotted" style:leader-text="."/>
        </style:tab-stops>
      </style:paragraph-properties>
    </style:style>
    <style:style style:name="Cabeçalho_20_à_20_direita" style:display-name="Cabeçalho à direita" style:family="paragraph" style:parent-style-name="Standard">
      <style:paragraph-properties fo:text-indent="0in" style:auto-text-indent="false" text:number-lines="false" text:line-number="0">
        <style:tab-stops>
          <style:tab-stop style:position="2.9528in" style:type="center"/>
          <style:tab-stop style:position="5.9055in" style:type="right"/>
        </style:tab-stops>
      </style:paragraph-properties>
    </style:style>
    <style:style style:name="Cabeçalho_20_à_20_esquerda" style:display-name="Cabeçalho à esquerda" style:family="paragraph" style:parent-style-name="Standard">
      <style:paragraph-properties fo:text-indent="0in" style:auto-text-indent="false" text:number-lines="false" text:line-number="0">
        <style:tab-stops>
          <style:tab-stop style:position="2.9528in" style:type="center"/>
          <style:tab-stop style:position="5.9055in" style:type="right"/>
        </style:tab-stops>
      </style:paragraph-properties>
    </style:style>
    <style:style style:name="Título1" style:family="paragraph" style:parent-style-name="Standard" style:next-style-name="Text_20_body">
      <style:paragraph-properties fo:margin-top="1.1811in" fo:margin-bottom="0.3937in" style:contextual-spacing="false" fo:text-align="center" style:justify-single-word="false" fo:text-indent="0in" style:auto-text-indent="false" fo:keep-with-next="always"/>
      <style:text-properties fo:font-size="18pt" fo:font-weight="bold" style:font-size-asian="18pt" style:font-weight-asian="bold" style:font-name-complex="Nimbus Sans L" style:font-family-complex="'Nimbus Sans L'" style:font-family-generic-complex="system" style:font-pitch-complex="variable" style:font-size-complex="14pt"/>
    </style:style>
    <style:style style:name="Title" style:family="paragraph" style:parent-style-name="Standard" style:next-style-name="Standard" loext:linked-style-name="Title_20_Char" style:class="chapter">
      <style:paragraph-properties fo:margin-top="1.1811in" fo:margin-bottom="0.3937in" style:contextual-spacing="false" fo:text-align="center" style:justify-single-word="false" fo:text-indent="0in" style:auto-text-indent="false" fo:keep-with-next="always"/>
      <style:text-properties fo:font-size="18pt" fo:font-weight="bold" style:font-size-asian="18pt" style:font-weight-asian="bold" style:font-name-complex="Nimbus Sans L" style:font-family-complex="'Nimbus Sans L'" style:font-family-generic-complex="system" style:font-pitch-complex="variable" style:font-size-complex="18pt" style:font-weight-complex="bold"/>
    </style:style>
    <style:style style:name="Subtitle" style:family="paragraph" style:parent-style-name="Título1" style:next-style-name="Text_20_body" loext:linked-style-name="Subtitle_20_Char" style:class="chapter">
      <style:text-properties fo:font-size="14pt" fo:font-style="italic" style:font-size-asian="14pt" style:font-style-asian="italic" style:font-style-complex="italic"/>
    </style:style>
    <style:style style:name="capítulo" style:family="paragraph" style:parent-style-name="Title" style:next-style-name="Standard">
      <style:paragraph-properties fo:margin-top="1.5752in" fo:margin-bottom="0.1965in" style:contextual-spacing="false" fo:text-align="start" style:justify-single-word="false"/>
    </style:style>
    <style:style style:name="Citação1" style:family="paragraph" style:parent-style-name="Standard">
      <style:paragraph-properties fo:margin-left="0.3937in" fo:margin-right="0.3937in" fo:margin-top="0.1181in" fo:margin-bottom="0.1181in" style:contextual-spacing="false" fo:text-indent="0in" style:auto-text-indent="false"/>
    </style:style>
    <style:style style:name="committeedate" style:family="paragraph" style:parent-style-name="Standard">
      <style:paragraph-properties fo:margin-top="0.3937in" fo:margin-bottom="0in" style:contextual-spacing="false" fo:text-align="start" style:justify-single-word="false" fo:text-indent="0in" style:auto-text-indent="false"/>
      <style:text-properties fo:font-size="12pt" style:font-size-asian="12pt"/>
    </style:style>
    <style:style style:name="degree" style:family="paragraph" style:parent-style-name="Standard">
      <style:paragraph-properties fo:margin-top="0.7874in" fo:margin-bottom="0in" style:contextual-spacing="false" fo:text-align="center" style:justify-single-word="false" fo:text-indent="0in" style:auto-text-indent="false"/>
      <style:text-properties fo:font-size="12pt" style:font-size-asian="12pt"/>
    </style:style>
    <style:style style:name="committeedegree" style:family="paragraph" style:parent-style-name="degree">
      <style:text-properties fo:font-size="14pt" style:font-size-asian="14pt"/>
    </style:style>
    <style:style style:name="committeemember" style:family="paragraph" style:parent-style-name="Standard">
      <style:paragraph-properties fo:margin-top="0.1181in" fo:margin-bottom="0in" style:contextual-spacing="false" fo:text-indent="0in" style:auto-text-indent="false"/>
      <style:text-properties fo:font-size="12pt" style:font-size-asian="12pt"/>
    </style:style>
    <style:style style:name="committeetext" style:family="paragraph" style:parent-style-name="Standard">
      <style:paragraph-properties fo:margin-top="3.9366in" fo:margin-bottom="0.1965in" style:contextual-spacing="false" fo:text-align="start" style:justify-single-word="false" fo:text-indent="0in" style:auto-text-indent="false"/>
      <style:text-properties fo:font-size="14pt" style:font-size-asian="14pt"/>
    </style:style>
    <style:style style:name="Conteúdo_20_da_20_moldura" style:display-name="Conteúdo da moldura" style:family="paragraph" style:parent-style-name="Text_20_body"/>
    <style:style style:name="Conteúdo_20_de_20_tabela" style:display-name="Conteúdo de tabela" style:family="paragraph" style:parent-style-name="Standard">
      <style:paragraph-properties fo:text-indent="0in" style:auto-text-indent="false" text:number-lines="false" text:line-number="0"/>
      <style:text-properties fo:font-size="10.5pt" style:font-size-asian="10.5pt"/>
    </style:style>
    <style:style style:name="thesisdate" style:family="paragraph" style:parent-style-name="Standard">
      <style:paragraph-properties fo:margin-top="0.5902in" fo:margin-bottom="0.3937in" style:contextual-spacing="false" fo:text-align="center" style:justify-single-word="false" fo:text-indent="0in" style:auto-text-indent="false"/>
    </style:style>
    <style:style style:name="copyrightnotice" style:family="paragraph" style:parent-style-name="thesisdate">
      <style:paragraph-properties fo:margin-top="9.0547in" fo:margin-bottom="0.3937in" style:contextual-spacing="false"/>
    </style:style>
    <style:style style:name="Sender" style:family="paragraph" style:parent-style-name="Standard" style:class="extra">
      <style:paragraph-properties fo:margin-top="0in" fo:margin-bottom="0.0417in" style:contextual-spacing="false" text:number-lines="false" text:line-number="0"/>
    </style:style>
    <style:style style:name="equação" style:family="paragraph" style:parent-style-name="Standard">
      <style:paragraph-properties fo:margin-top="0.1665in" fo:margin-bottom="0.0835in" style:contextual-spacing="false" fo:line-height="100%" fo:text-align="center" style:justify-single-word="false">
        <style:tab-stops>
          <style:tab-stop style:position="5.2173in"/>
        </style:tab-stops>
      </style:paragraph-properties>
    </style:style>
    <style:style style:name="Figura"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style-complex="italic"/>
    </style:style>
    <style:style style:name="Ilustração" style:family="paragraph" style:parent-style-name="Standard">
      <style:paragraph-properties fo:margin-top="0.222in" fo:margin-bottom="0.1665in" style:contextual-spacing="false" fo:line-height="100%" fo:text-align="center" style:justify-single-word="false" fo:text-indent="0in" style:auto-text-indent="false" text:number-lines="false" text:line-number="0"/>
      <style:text-properties style:font-style-complex="italic"/>
    </style:style>
    <style:style style:name="imagem_20_capa" style:display-name="imagem capa" style:family="paragraph" style:parent-style-name="Ilustração">
      <style:paragraph-properties fo:margin-top="0in" fo:margin-bottom="0in" style:contextual-spacing="false"/>
    </style:style>
    <style:style style:name="Index_20_1" style:display-name="Index 1" style:family="paragraph" style:parent-style-name="Índice" style:class="index">
      <style:paragraph-properties fo:text-indent="0in" style:auto-text-indent="false"/>
    </style:style>
    <style:style style:name="Index_20_2" style:display-name="Index 2" style:family="paragraph" style:parent-style-name="Índice" style:class="index">
      <style:paragraph-properties fo:margin-left="0.1965in" fo:text-indent="0in" style:auto-text-indent="false"/>
    </style:style>
    <style:style style:name="Index_20_Heading" style:display-name="Index Heading" style:family="paragraph" style:parent-style-name="Título1" style:class="index">
      <style:paragraph-properties text:number-lines="false" text:line-number="0"/>
      <style:text-properties fo:font-size="16pt" style:font-size-asian="16pt" style:font-size-complex="16pt" style:font-weight-complex="bold"/>
    </style:style>
    <style:style style:name="Índice_20_de_20_ilustrações_20_1" style:display-name="Índice de ilustrações 1" style:family="paragraph" style:parent-style-name="Índice">
      <style:paragraph-properties fo:text-indent="0in" style:auto-text-indent="false">
        <style:tab-stops>
          <style:tab-stop style:position="6.6925in" style:type="right" style:leader-style="dotted" style:leader-text="."/>
        </style:tab-stops>
      </style:paragraph-properties>
    </style:style>
    <style:style style:name="Índice_20_de_20_tabelas_20_1" style:display-name="Índice de tabelas 1" style:family="paragraph" style:parent-style-name="Índice">
      <style:paragraph-properties fo:text-indent="0in" style:auto-text-indent="false">
        <style:tab-stops>
          <style:tab-stop style:position="6.6925in" style:type="right" style:leader-style="dotted" style:leader-text="."/>
        </style:tab-stops>
      </style:paragraph-properties>
    </style:style>
    <style:style style:name="Marca_20_1" style:display-name="Marca 1" style:family="paragraph" style:parent-style-name="Standard" style:next-style-name="Standard" style:list-style-name="WWNum26">
      <style:paragraph-properties fo:margin-top="0.1665in" fo:margin-bottom="0in" style:contextual-spacing="false"/>
    </style:style>
    <style:style style:name="Marca_20_1_20_Continuação" style:display-name="Marca 1 Continuação" style:family="paragraph" style:parent-style-name="Marca_20_1">
      <style:paragraph-properties fo:margin-top="0in" fo:margin-bottom="0in" style:contextual-spacing="false"/>
      <style:text-properties style:font-name-asian="Times New Roman1" style:font-family-asian="'Times New Roman'" style:font-family-generic-asian="system" style:font-pitch-asian="variable" style:font-size-complex="10pt"/>
    </style:style>
    <style:style style:name="provisionaltext" style:family="paragraph" style:parent-style-name="Standard">
      <style:paragraph-properties fo:margin-top="0.3937in" fo:margin-bottom="1.378in" style:contextual-spacing="false" fo:text-align="center" style:justify-single-word="false" fo:text-indent="0in" style:auto-text-indent="false"/>
      <style:text-properties fo:font-variant="small-caps" fo:font-size="15pt" style:font-size-asian="15pt" style:font-size-complex="14pt"/>
    </style:style>
    <style:style style:name="Rodapé_20_à_20_direita" style:display-name="Rodapé à direita" style:family="paragraph" style:parent-style-name="Standard">
      <style:paragraph-properties fo:text-indent="0in" style:auto-text-indent="false" text:number-lines="false" text:line-number="0">
        <style:tab-stops>
          <style:tab-stop style:position="3.3457in" style:type="center"/>
          <style:tab-stop style:position="6.6925in" style:type="right"/>
        </style:tab-stops>
      </style:paragraph-properties>
    </style:style>
    <style:style style:name="Rodapé_20_à_20_esquerda" style:display-name="Rodapé à esquerda" style:family="paragraph" style:parent-style-name="Standard">
      <style:paragraph-properties fo:text-indent="0in" style:auto-text-indent="false" text:number-lines="false" text:line-number="0">
        <style:tab-stops>
          <style:tab-stop style:position="2.9528in" style:type="center"/>
          <style:tab-stop style:position="5.9055in" style:type="right"/>
        </style:tab-stops>
      </style:paragraph-properties>
    </style:style>
    <style:style style:name="Rodapé_20_inicial_20_direito" style:display-name="Rodapé inicial direito" style:family="paragraph" style:parent-style-name="Footer">
      <style:paragraph-properties fo:text-align="center" style:justify-single-word="false" fo:text-indent="0in" style:auto-text-indent="false"/>
    </style:style>
    <style:style style:name="Rodapé_20_inicial_20_esquerdo" style:display-name="Rodapé inicial esquerdo" style:family="paragraph" style:parent-style-name="Footer">
      <style:paragraph-properties fo:text-align="start" style:justify-single-word="false" fo:text-indent="0in" style:auto-text-indent="false"/>
    </style:style>
    <style:style style:name="school" style:family="paragraph" style:parent-style-name="Standard">
      <style:paragraph-properties fo:margin-top="0.1181in" fo:margin-bottom="0.1575in" style:contextual-spacing="false" fo:text-align="center" style:justify-single-word="false" fo:text-indent="0in" style:auto-text-indent="false"/>
      <style:text-properties fo:font-variant="small-caps" fo:font-size="16pt" fo:font-weight="bold" style:font-size-asian="16pt" style:font-weight-asian="bold"/>
    </style:style>
    <style:style style:name="Separador_20_de_20_índice_20_remissivo" style:display-name="Separador de índice remissivo" style:family="paragraph" style:parent-style-name="Índice">
      <style:paragraph-properties fo:text-indent="0in" style:auto-text-indent="false"/>
    </style:style>
    <style:style style:name="Assinatura1" style:family="paragraph" style:parent-style-name="committeemember">
      <style:paragraph-properties fo:text-align="end" style:justify-single-word="false"/>
    </style:style>
    <style:style style:name="supervisorstext" style:family="paragraph" style:parent-style-name="Standard">
      <style:paragraph-properties fo:margin-top="0.1965in" fo:margin-bottom="0in" style:contextual-spacing="false" fo:text-align="center" style:justify-single-word="false" fo:text-indent="0in" style:auto-text-indent="false"/>
    </style:style>
    <style:style style:name="Tabela" style:family="paragraph" style:parent-style-name="Standard">
      <style:paragraph-properties fo:margin-top="0.161in" fo:margin-bottom="0.0827in" style:contextual-spacing="false" fo:text-align="center" style:justify-single-word="false" text:number-lines="false" text:line-number="0"/>
      <style:text-properties fo:font-size="12pt" style:font-size-asian="12pt" style:font-style-complex="italic"/>
    </style:style>
    <style:style style:name="tabela_20_abreviaturas" style:display-name="tabela abreviaturas" style:family="paragraph" style:parent-style-name="Standard">
      <style:paragraph-properties fo:text-indent="0in" style:auto-text-indent="false"/>
    </style:style>
    <style:style style:name="Título_20_-_20_Bibliografia" style:display-name="Título - Bibliografia" style:family="paragraph" style:parent-style-name="Título1">
      <style:paragraph-properties text:number-lines="false" text:line-number="0"/>
      <style:text-properties fo:font-size="16pt" style:font-size-asian="16pt" style:font-size-complex="16pt" style:font-weight-complex="bold"/>
    </style:style>
    <style:style style:name="Título_20_-_20_Índice_20_de_20_ilustrações" style:display-name="Título - Índice de ilustrações" style:family="paragraph" style:parent-style-name="Título1">
      <style:paragraph-properties text:number-lines="false" text:line-number="0"/>
      <style:text-properties fo:font-size="16pt" style:font-size-asian="16pt" style:font-size-complex="16pt" style:font-weight-complex="bold"/>
    </style:style>
    <style:style style:name="Título_20_-_20_Índice_20_de_20_objectos" style:display-name="Título - Índice de objectos" style:family="paragraph" style:parent-style-name="Título1">
      <style:paragraph-properties text:number-lines="false" text:line-number="0"/>
      <style:text-properties fo:font-size="16pt" style:font-size-asian="16pt" style:font-size-complex="16pt" style:font-weight-complex="bold"/>
    </style:style>
    <style:style style:name="Título_20_-_20_Índice_20_de_20_tabelas" style:display-name="Título - Índice de tabelas" style:family="paragraph" style:parent-style-name="Título1">
      <style:paragraph-properties text:number-lines="false" text:line-number="0"/>
      <style:text-properties fo:font-size="16pt" style:font-size-asian="16pt" style:font-size-complex="16pt" style:font-weight-complex="bold"/>
    </style:style>
    <style:style style:name="Título_20_capa" style:display-name="Título capa" style:family="paragraph" style:parent-style-name="Título1">
      <style:paragraph-properties fo:margin-top="0.5118in" fo:margin-bottom="0.3937in" style:contextual-spacing="false"/>
      <style:text-properties fo:font-size="24pt" style:font-size-asian="24pt"/>
    </style:style>
    <style:style style:name="Heading_20__20_1_5f_Before" style:display-name="Heading  1_Before" style:family="paragraph" style:parent-style-name="Heading_20_1" style:next-style-name="Standard" style:default-outline-level="" style:list-style-name="">
      <style:paragraph-properties fo:margin-top="1.389in" fo:margin-bottom="0.4165in" style:contextual-spacing="false"/>
      <style:text-properties fo:font-size="21pt" style:font-size-asian="21pt" style:font-size-complex="21pt"/>
    </style:style>
    <style:style style:name="Título_20_de_20_tabela" style:display-name="Título de tabela" style:family="paragraph" style:parent-style-name="Conteúdo_20_de_20_tabela">
      <style:paragraph-properties fo:text-align="center" style:justify-single-word="false"/>
      <style:text-properties fo:font-size="11pt" fo:font-style="italic" style:font-size-asian="11pt" style:font-style-asian="italic" style:font-style-complex="italic" style:font-weight-complex="bold"/>
    </style:style>
    <style:style style:name="Título_20_do_20_índice" style:display-name="Título do índice" style:family="paragraph" style:parent-style-name="Título1">
      <style:paragraph-properties text:number-lines="false" text:line-number="0"/>
      <style:text-properties fo:font-size="16pt" style:font-size-asian="16pt" style:font-size-complex="16pt" style:font-weight-complex="bold"/>
    </style:style>
    <style:style style:name="Título_20_do_20_índice_20_do_20_utilizador" style:display-name="Título do índice do utilizador" style:family="paragraph" style:parent-style-name="Título1">
      <style:paragraph-properties text:number-lines="false" text:line-number="0"/>
      <style:text-properties fo:font-size="16pt" style:font-size-asian="16pt" style:font-size-complex="16pt" style:font-weight-complex="bold"/>
    </style:style>
    <style:style style:name="título_20_inicial" style:display-name="título inicial" style:family="paragraph" style:parent-style-name="Título_20_-_20_Bibliografia" style:next-style-name="Standard">
      <style:paragraph-properties fo:margin-top="1.5752in" fo:margin-bottom="0.3937in" style:contextual-spacing="false" fo:text-align="start" style:justify-single-word="false"/>
      <style:text-properties fo:font-size="24pt" style:font-size-asian="24pt"/>
    </style:style>
    <style:style style:name="título_20_final" style:display-name="título final" style:family="paragraph" style:parent-style-name="título_20_inicial" style:next-style-name="Standard"/>
    <style:style style:name="título1_20_anexo" style:display-name="título1 anexo" style:family="paragraph" style:parent-style-name="Heading_20_1" style:default-outline-level=""/>
    <style:style style:name="título2_20_anexo" style:display-name="título2 anexo" style:family="paragraph" style:parent-style-name="Heading_20_2" style:default-outline-level="" style:list-style-name="WWNum17"/>
    <style:style style:name="Header_20_left" style:display-name="Header left" style:family="paragraph" style:parent-style-name="Header"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text-properties fo:font-size="9pt" style:font-size-asian="9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Nimbus Sans L" style:font-family-asian="'Nimbus Sans L'"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loext:linked-style-name="Title">
      <style:text-properties style:font-name="Times" fo:font-family="Times" style:font-family-generic="roman" style:font-pitch="variable" fo:font-size="18pt" fo:font-weight="bold" style:font-name-asian="Nimbus Sans L" style:font-family-asian="'Nimbus Sans L'" style:font-family-generic-asian="system" style:font-pitch-asian="variable" style:font-size-asian="18pt" style:font-weight-asian="bold" style:font-name-complex="Nimbus Sans L" style:font-family-complex="'Nimbus Sans L'" style:font-family-generic-complex="system" style:font-pitch-complex="variable" style:font-size-complex="18pt" style:font-weight-complex="bold"/>
    </style:style>
    <style:style style:name="Subtitle_20_Char" style:display-name="Subtitle Char" style:family="text" style:parent-style-name="Default_20_Paragraph_20_Font" loext:linked-style-name="Subtitle">
      <style:text-properties style:font-name="Times" fo:font-family="Times" style:font-family-generic="roman" style:font-pitch="variable" fo:font-size="14pt" fo:font-style="italic" fo:font-weight="bold" style:font-name-asian="Nimbus Sans L" style:font-family-asian="'Nimbus Sans L'" style:font-family-generic-asian="system" style:font-pitch-asian="variable" style:font-size-asian="14pt" style:font-style-asian="italic" style:font-weight-asian="bold" style:font-name-complex="Nimbus Sans L" style:font-family-complex="'Nimbus Sans L'" style:font-family-generic-complex="system" style:font-pitch-complex="variable" style:font-size-complex="14pt" style:font-style-complex="italic"/>
    </style:style>
    <style:style style:name="Caracteres_20_de_20_numeração" style:display-name="Caracteres de numeração" style:family="text"/>
    <style:style style:name="Emphasis" style:family="text">
      <style:text-properties fo:font-style="italic" style:font-style-asian="italic"/>
    </style:style>
    <style:style style:name="english" style:family="text">
      <style:text-properties fo:language="en" fo:country="GB"/>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Marcas_20_e_20_números" style:display-name="Marcas e número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Símbolo_20_de_20_nota_20_de_20_rodapé" style:display-name="Símbolo de nota de rodapé" style:family="text"/>
    <style:style style:name="Símbolo_20_de_20_nota_20_final" style:display-name="Símbolo de nota final" style:family="text"/>
    <style:style style:name="Strong_20_Emphasis" style:display-name="Strong Emphasis" style:family="text">
      <style:text-properties fo:font-weight="bold" style:font-weight-asian="bold" style:font-weight-complex="bold"/>
    </style:style>
    <style:style style:name="Variável" style:family="text">
      <style:text-properties fo:font-style="italic" style:font-style-asian="italic" style:font-style-complex="italic"/>
    </style:style>
    <style:style style:name="Heading_20_1_20_Char" style:display-name="Heading 1 Char" style:family="text" style:parent-style-name="Default_20_Paragraph_20_Font" loext:linked-style-name="Heading_20_1">
      <style:text-properties style:font-name="Times" fo:font-family="Times" style:font-family-generic="roman" style:font-pitch="variable" fo:font-size="28pt" fo:font-weight="bold" style:font-size-asian="28pt" style:font-weight-asian="bold" style:font-weight-complex="bold"/>
    </style:style>
    <style:style style:name="Heading_20_2_20_Char" style:display-name="Heading 2 Char" style:family="text" style:parent-style-name="Default_20_Paragraph_20_Font" loext:linked-style-name="Heading_20_2">
      <style:text-properties style:font-name="Times" fo:font-family="Times" style:font-family-generic="roman" style:font-pitch="variable" fo:font-size="15pt" fo:font-weight="bold" style:font-size-asian="15pt" style:font-weight-asian="bold" style:font-size-complex="15pt" style:font-weight-complex="bold"/>
    </style:style>
    <style:style style:name="Heading_20_3_20_Char" style:display-name="Heading 3 Char" style:family="text" style:parent-style-name="Default_20_Paragraph_20_Font" loext:linked-style-name="Heading_20_3">
      <style:text-properties style:font-name="Times" fo:font-family="Times" style:font-family-generic="roman" style:font-pitch="variable" fo:font-size="13pt" fo:font-weight="bold" style:font-name-asian="Nimbus Sans L" style:font-family-asian="'Nimbus Sans L'" style:font-family-generic-asian="system" style:font-pitch-asian="variable" style:font-size-asian="13pt" style:font-weight-asian="bold" style:font-size-complex="12pt" style:font-weight-complex="bold"/>
    </style:style>
    <style:style style:name="Header_20_Char" style:display-name="Header Char" style:family="text" style:parent-style-name="Default_20_Paragraph_20_Font" loext:linked-style-name="Header">
      <style:text-properties style:font-name="Times" fo:font-family="Times" style:font-family-generic="roman" style:font-pitch="variable" fo:font-size="11pt" style:font-name-asian="Nimbus Sans L" style:font-family-asian="'Nimbus Sans L'" style:font-family-generic-asian="system" style:font-pitch-asian="variable" style:font-size-asian="11pt" style:font-size-complex="12pt"/>
    </style:style>
    <style:style style:name="Footer_20_Char" style:display-name="Footer Char" style:family="text" style:parent-style-name="Default_20_Paragraph_20_Font" loext:linked-style-name="Footer">
      <style:text-properties style:font-name="Times" fo:font-family="Times" style:font-family-generic="roman" style:font-pitch="variable" fo:font-size="11pt" style:font-name-asian="Nimbus Sans L" style:font-family-asian="'Nimbus Sans L'" style:font-family-generic-asian="system" style:font-pitch-asian="variable" style:font-size-asian="11pt" style:font-size-complex="12pt"/>
    </style:style>
    <style:style style:name="Footnote_20_Text_20_Char" style:display-name="Footnote Text Char" style:family="text" style:parent-style-name="Default_20_Paragraph_20_Font" loext:linked-style-name="Footnote">
      <style:text-properties style:font-name="Times" fo:font-family="Times" style:font-family-generic="roman" style:font-pitch="variable" fo:font-size="9pt" style:font-name-asian="Nimbus Sans L" style:font-family-asian="'Nimbus Sans L'" style:font-family-generic-asian="system" style:font-pitch-asian="variable" style:font-size-asian="9pt"/>
    </style:style>
    <style:style style:name="Line_20_numbering" style:display-name="Line numbering"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size="9pt" style:font-size-asian="9pt" style:font-name-complex="StarSymbol1" style:font-family-complex="StarSymbol" style:font-family-generic-complex="system" style:font-pitch-complex="variable" style:font-size-complex="9pt"/>
    </style:style>
    <style:style style:name="ListLabel_20_83" style:display-name="ListLabel 83" style:family="text">
      <style:text-properties style:font-name="Times New Roman"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84" style:display-name="ListLabel 84" style:family="text">
      <style:text-properties fo:font-size="9pt" style:font-size-asian="9pt" style:font-name-complex="StarSymbol1" style:font-family-complex="StarSymbol" style:font-family-generic-complex="system" style:font-pitch-complex="variable" style:font-size-complex="9pt"/>
    </style:style>
    <style:style style:name="ListLabel_20_85" style:display-name="ListLabel 85" style:family="text">
      <style:text-properties fo:font-size="9pt" style:font-size-asian="9pt" style:font-name-complex="StarSymbol1" style:font-family-complex="StarSymbol" style:font-family-generic-complex="system" style:font-pitch-complex="variable" style:font-size-complex="9pt"/>
    </style:style>
    <style:style style:name="ListLabel_20_86" style:display-name="ListLabel 86" style:family="text">
      <style:text-properties style:font-name="Times New Roman"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87" style:display-name="ListLabel 87" style:family="text">
      <style:text-properties fo:font-size="9pt" style:font-size-asian="9pt" style:font-name-complex="StarSymbol1" style:font-family-complex="StarSymbol" style:font-family-generic-complex="system" style:font-pitch-complex="variable" style:font-size-complex="9pt"/>
    </style:style>
    <style:style style:name="ListLabel_20_88" style:display-name="ListLabel 88" style:family="text">
      <style:text-properties fo:font-size="9pt" style:font-size-asian="9pt" style:font-name-complex="StarSymbol1" style:font-family-complex="StarSymbol" style:font-family-generic-complex="system" style:font-pitch-complex="variable" style:font-size-complex="9pt"/>
    </style:style>
    <style:style style:name="ListLabel_20_89" style:display-name="ListLabel 89" style:family="text">
      <style:text-properties style:font-name="Times New Roman"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90" style:display-name="ListLabel 90" style:family="text">
      <style:text-properties fo:font-size="9pt" style:font-size-asian="9pt" style:font-name-complex="StarSymbol1" style:font-family-complex="StarSymbol" style:font-family-generic-complex="system" style:font-pitch-complex="variable" style:font-size-complex="9pt"/>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Times New Roman" fo:font-family="'Times New Roman'"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Times New Roman" fo:font-family="'Times New Roman'"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Times New Roman" fo:font-family="'Times New Roman'" style:font-family-generic="roman" style:font-pitch="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Times New Roman" fo:font-family="'Times New Roman'" style:font-family-generic="roman" style:font-pitch="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Times New Roman" fo:font-family="'Times New Roman'" style:font-family-generic="roman" style:font-pitch="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Times New Roman" fo:font-family="'Times New Roman'"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Times New Roman" fo:font-family="'Times New Roman'"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Times New Roman" fo:font-family="'Times New Roman'"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Times New Roman" fo:font-family="'Times New Roman'"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ListLabel_20_128"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129"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130"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131"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132"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133"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134"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135"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is-legal="true" loext:num-list-format="%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 loext:is-legal="true"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 loext:is-legal="true" loext:num-list-format="%1%.%2%.%3%." style:num-suffix="."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ListLabel_20_4" loext:is-legal="true" loext:num-list-format="%1%.%2%.%3%.%4%." style:num-suffix="."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text:style-name="ListLabel_20_5" loext:is-legal="true" loext:num-list-format="%1%.%2%.%3%.%4%.%5%." style:num-suffix="."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text:style-name="ListLabel_20_6" loext:is-legal="true" loext:num-list-format="%1%.%2%.%3%.%4%.%5%.%6%." style:num-suffix="."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text:style-name="ListLabel_20_7" loext:is-legal="true" loext:num-list-format="%1%.%2%.%3%.%4%.%5%.%6%.%7%." style:num-suffix="." style:num-format="1" text:display-levels="7">
        <style:list-level-properties text:list-level-position-and-space-mode="label-alignment">
          <style:list-level-label-alignment text:label-followed-by="listtab" text:list-tab-stop-position="1.5in" fo:text-indent="-0.9in" fo:margin-left="0.9in"/>
        </style:list-level-properties>
      </text:list-level-style-number>
      <text:list-level-style-number text:level="8" text:style-name="ListLabel_20_8" loext:is-legal="true" loext:num-list-format="%1%.%2%.%3%.%4%.%5%.%6%.%7%.%8%." style:num-suffix="." style:num-format="1" text:display-levels="8">
        <style:list-level-properties text:list-level-position-and-space-mode="label-alignment">
          <style:list-level-label-alignment text:label-followed-by="listtab" text:list-tab-stop-position="1.5in" fo:text-indent="-1in" fo:margin-left="1in"/>
        </style:list-level-properties>
      </text:list-level-style-number>
      <text:list-level-style-number text:level="9" text:style-name="ListLabel_20_9" loext:is-legal="true" loext:num-list-format="%1%.%2%.%3%.%4%.%5%.%6%.%7%.%8%.%9%." style:num-suffix="." style:num-format="1" text:display-levels="9">
        <style:list-level-properties text:list-level-position-and-space-mode="label-alignment">
          <style:list-level-label-alignment text:label-followed-by="listtab" text:list-tab-stop-position="1.75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is-legal="true" loext:num-list-format="%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 loext:is-legal="true"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 loext:is-legal="true" loext:num-list-format="%1%.%2%.%3%." style:num-suffix="."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ListLabel_20_13" loext:is-legal="true" loext:num-list-format="%1%.%2%.%3%.%4%." style:num-suffix="."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text:style-name="ListLabel_20_14" loext:is-legal="true" loext:num-list-format="%1%.%2%.%3%.%4%.%5%." style:num-suffix="."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text:style-name="ListLabel_20_15" loext:is-legal="true" loext:num-list-format="%1%.%2%.%3%.%4%.%5%.%6%." style:num-suffix="."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text:style-name="ListLabel_20_16" loext:is-legal="true" loext:num-list-format="%1%.%2%.%3%.%4%.%5%.%6%.%7%." style:num-suffix="." style:num-format="1" text:display-levels="7">
        <style:list-level-properties text:list-level-position-and-space-mode="label-alignment">
          <style:list-level-label-alignment text:label-followed-by="listtab" text:list-tab-stop-position="1.5in" fo:text-indent="-0.9in" fo:margin-left="0.9in"/>
        </style:list-level-properties>
      </text:list-level-style-number>
      <text:list-level-style-number text:level="8" text:style-name="ListLabel_20_17" loext:is-legal="true" loext:num-list-format="%1%.%2%.%3%.%4%.%5%.%6%.%7%.%8%." style:num-suffix="." style:num-format="1" text:display-levels="8">
        <style:list-level-properties text:list-level-position-and-space-mode="label-alignment">
          <style:list-level-label-alignment text:label-followed-by="listtab" text:list-tab-stop-position="1.5in" fo:text-indent="-1in" fo:margin-left="1in"/>
        </style:list-level-properties>
      </text:list-level-style-number>
      <text:list-level-style-number text:level="9" text:style-name="ListLabel_20_18" loext:is-legal="true" loext:num-list-format="%1%.%2%.%3%.%4%.%5%.%6%.%7%.%8%.%9%." style:num-suffix="." style:num-format="1" text:display-levels="9">
        <style:list-level-properties text:list-level-position-and-space-mode="label-alignment">
          <style:list-level-label-alignment text:label-followed-by="listtab" text:list-tab-stop-position="1.75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is-legal="true" loext:num-list-format="%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0" loext:is-legal="true"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1" loext:is-legal="true" loext:num-list-format="%1%.%2%.%3%." style:num-suffix="."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ListLabel_20_22" loext:is-legal="true" loext:num-list-format="%1%.%2%.%3%.%4%." style:num-suffix="."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text:style-name="ListLabel_20_23" loext:is-legal="true" loext:num-list-format="%1%.%2%.%3%.%4%.%5%." style:num-suffix="."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text:style-name="ListLabel_20_24" loext:is-legal="true" loext:num-list-format="%1%.%2%.%3%.%4%.%5%.%6%." style:num-suffix="."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text:style-name="ListLabel_20_25" loext:is-legal="true" loext:num-list-format="%1%.%2%.%3%.%4%.%5%.%6%.%7%." style:num-suffix="." style:num-format="1" text:display-levels="7">
        <style:list-level-properties text:list-level-position-and-space-mode="label-alignment">
          <style:list-level-label-alignment text:label-followed-by="listtab" text:list-tab-stop-position="1.5in" fo:text-indent="-0.9in" fo:margin-left="0.9in"/>
        </style:list-level-properties>
      </text:list-level-style-number>
      <text:list-level-style-number text:level="8" text:style-name="ListLabel_20_26" loext:is-legal="true" loext:num-list-format="%1%.%2%.%3%.%4%.%5%.%6%.%7%.%8%." style:num-suffix="." style:num-format="1" text:display-levels="8">
        <style:list-level-properties text:list-level-position-and-space-mode="label-alignment">
          <style:list-level-label-alignment text:label-followed-by="listtab" text:list-tab-stop-position="1.5in" fo:text-indent="-1in" fo:margin-left="1in"/>
        </style:list-level-properties>
      </text:list-level-style-number>
      <text:list-level-style-number text:level="9" text:style-name="ListLabel_20_27" loext:is-legal="true" loext:num-list-format="%1%.%2%.%3%.%4%.%5%.%6%.%7%.%8%.%9%." style:num-suffix="." style:num-format="1" text:display-levels="9">
        <style:list-level-properties text:list-level-position-and-space-mode="label-alignment">
          <style:list-level-label-alignment text:label-followed-by="listtab" text:list-tab-stop-position="1.75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is-legal="true" loext:num-list-format="%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9" loext:is-legal="true"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0" loext:is-legal="true" loext:num-list-format="%1%.%2%.%3%." style:num-suffix="."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ListLabel_20_31" loext:is-legal="true" loext:num-list-format="%1%.%2%.%3%.%4%." style:num-suffix="."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text:style-name="ListLabel_20_32" loext:is-legal="true" loext:num-list-format="%1%.%2%.%3%.%4%.%5%." style:num-suffix="."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text:style-name="ListLabel_20_33" loext:is-legal="true" loext:num-list-format="%1%.%2%.%3%.%4%.%5%.%6%." style:num-suffix="."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text:style-name="ListLabel_20_34" loext:is-legal="true" loext:num-list-format="%1%.%2%.%3%.%4%.%5%.%6%.%7%." style:num-suffix="." style:num-format="1" text:display-levels="7">
        <style:list-level-properties text:list-level-position-and-space-mode="label-alignment">
          <style:list-level-label-alignment text:label-followed-by="listtab" text:list-tab-stop-position="1.5in" fo:text-indent="-0.9in" fo:margin-left="0.9in"/>
        </style:list-level-properties>
      </text:list-level-style-number>
      <text:list-level-style-number text:level="8" text:style-name="ListLabel_20_35" loext:is-legal="true" loext:num-list-format="%1%.%2%.%3%.%4%.%5%.%6%.%7%.%8%." style:num-suffix="." style:num-format="1" text:display-levels="8">
        <style:list-level-properties text:list-level-position-and-space-mode="label-alignment">
          <style:list-level-label-alignment text:label-followed-by="listtab" text:list-tab-stop-position="1.5in" fo:text-indent="-1in" fo:margin-left="1in"/>
        </style:list-level-properties>
      </text:list-level-style-number>
      <text:list-level-style-number text:level="9" text:style-name="ListLabel_20_36" loext:is-legal="true" loext:num-list-format="%1%.%2%.%3%.%4%.%5%.%6%.%7%.%8%.%9%." style:num-suffix="." style:num-format="1" text:display-levels="9">
        <style:list-level-properties text:list-level-position-and-space-mode="label-alignment">
          <style:list-level-label-alignment text:label-followed-by="listtab" text:list-tab-stop-position="1.75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is-legal="true" loext:num-list-format="%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8" loext:is-legal="true"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9" loext:is-legal="true" loext:num-list-format="%1%.%2%.%3%." style:num-suffix="."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ListLabel_20_40" loext:is-legal="true" loext:num-list-format="%1%.%2%.%3%.%4%." style:num-suffix="."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text:style-name="ListLabel_20_41" loext:is-legal="true" loext:num-list-format="%1%.%2%.%3%.%4%.%5%." style:num-suffix="."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text:style-name="ListLabel_20_42" loext:is-legal="true" loext:num-list-format="%1%.%2%.%3%.%4%.%5%.%6%." style:num-suffix="."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text:style-name="ListLabel_20_43" loext:is-legal="true" loext:num-list-format="%1%.%2%.%3%.%4%.%5%.%6%.%7%." style:num-suffix="." style:num-format="1" text:display-levels="7">
        <style:list-level-properties text:list-level-position-and-space-mode="label-alignment">
          <style:list-level-label-alignment text:label-followed-by="listtab" text:list-tab-stop-position="1.5in" fo:text-indent="-0.9in" fo:margin-left="0.9in"/>
        </style:list-level-properties>
      </text:list-level-style-number>
      <text:list-level-style-number text:level="8" text:style-name="ListLabel_20_44" loext:is-legal="true" loext:num-list-format="%1%.%2%.%3%.%4%.%5%.%6%.%7%.%8%." style:num-suffix="." style:num-format="1" text:display-levels="8">
        <style:list-level-properties text:list-level-position-and-space-mode="label-alignment">
          <style:list-level-label-alignment text:label-followed-by="listtab" text:list-tab-stop-position="1.5in" fo:text-indent="-1in" fo:margin-left="1in"/>
        </style:list-level-properties>
      </text:list-level-style-number>
      <text:list-level-style-number text:level="9" text:style-name="ListLabel_20_45" loext:is-legal="true" loext:num-list-format="%1%.%2%.%3%.%4%.%5%.%6%.%7%.%8%.%9%." style:num-suffix="." style:num-format="1" text:display-levels="9">
        <style:list-level-properties text:list-level-position-and-space-mode="label-alignment">
          <style:list-level-label-alignment text:label-followed-by="listtab" text:list-tab-stop-position="1.75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is-legal="true" loext:num-list-format="%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47" loext:is-legal="true"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8" loext:is-legal="true" loext:num-list-format="%1%.%2%.%3%." style:num-suffix="."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ListLabel_20_49" loext:is-legal="true" loext:num-list-format="%1%.%2%.%3%.%4%." style:num-suffix="."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text:style-name="ListLabel_20_50" loext:is-legal="true" loext:num-list-format="%1%.%2%.%3%.%4%.%5%." style:num-suffix="."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text:style-name="ListLabel_20_51" loext:is-legal="true" loext:num-list-format="%1%.%2%.%3%.%4%.%5%.%6%." style:num-suffix="."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text:style-name="ListLabel_20_52" loext:is-legal="true" loext:num-list-format="%1%.%2%.%3%.%4%.%5%.%6%.%7%." style:num-suffix="." style:num-format="1" text:display-levels="7">
        <style:list-level-properties text:list-level-position-and-space-mode="label-alignment">
          <style:list-level-label-alignment text:label-followed-by="listtab" text:list-tab-stop-position="1.5in" fo:text-indent="-0.9in" fo:margin-left="0.9in"/>
        </style:list-level-properties>
      </text:list-level-style-number>
      <text:list-level-style-number text:level="8" text:style-name="ListLabel_20_53" loext:is-legal="true" loext:num-list-format="%1%.%2%.%3%.%4%.%5%.%6%.%7%.%8%." style:num-suffix="." style:num-format="1" text:display-levels="8">
        <style:list-level-properties text:list-level-position-and-space-mode="label-alignment">
          <style:list-level-label-alignment text:label-followed-by="listtab" text:list-tab-stop-position="1.5in" fo:text-indent="-1in" fo:margin-left="1in"/>
        </style:list-level-properties>
      </text:list-level-style-number>
      <text:list-level-style-number text:level="9" text:style-name="ListLabel_20_54" loext:is-legal="true" loext:num-list-format="%1%.%2%.%3%.%4%.%5%.%6%.%7%.%8%.%9%." style:num-suffix="." style:num-format="1" text:display-levels="9">
        <style:list-level-properties text:list-level-position-and-space-mode="label-alignment">
          <style:list-level-label-alignment text:label-followed-by="listtab" text:list-tab-stop-position="1.75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is-legal="true" loext:num-list-format="%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56" loext:is-legal="true"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7" loext:is-legal="true" loext:num-list-format="%1%.%2%.%3%." style:num-suffix="."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ListLabel_20_58" loext:is-legal="true" loext:num-list-format="%1%.%2%.%3%.%4%." style:num-suffix="."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text:style-name="ListLabel_20_59" loext:is-legal="true" loext:num-list-format="%1%.%2%.%3%.%4%.%5%." style:num-suffix="."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text:style-name="ListLabel_20_60" loext:is-legal="true" loext:num-list-format="%1%.%2%.%3%.%4%.%5%.%6%." style:num-suffix="."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text:style-name="ListLabel_20_61" loext:is-legal="true" loext:num-list-format="%1%.%2%.%3%.%4%.%5%.%6%.%7%." style:num-suffix="." style:num-format="1" text:display-levels="7">
        <style:list-level-properties text:list-level-position-and-space-mode="label-alignment">
          <style:list-level-label-alignment text:label-followed-by="listtab" text:list-tab-stop-position="1.5in" fo:text-indent="-0.9in" fo:margin-left="0.9in"/>
        </style:list-level-properties>
      </text:list-level-style-number>
      <text:list-level-style-number text:level="8" text:style-name="ListLabel_20_62" loext:is-legal="true" loext:num-list-format="%1%.%2%.%3%.%4%.%5%.%6%.%7%.%8%." style:num-suffix="." style:num-format="1" text:display-levels="8">
        <style:list-level-properties text:list-level-position-and-space-mode="label-alignment">
          <style:list-level-label-alignment text:label-followed-by="listtab" text:list-tab-stop-position="1.5in" fo:text-indent="-1in" fo:margin-left="1in"/>
        </style:list-level-properties>
      </text:list-level-style-number>
      <text:list-level-style-number text:level="9" text:style-name="ListLabel_20_63" loext:is-legal="true" loext:num-list-format="%1%.%2%.%3%.%4%.%5%.%6%.%7%.%8%.%9%." style:num-suffix="." style:num-format="1" text:display-levels="9">
        <style:list-level-properties text:list-level-position-and-space-mode="label-alignment">
          <style:list-level-label-alignment text:label-followed-by="listtab" text:list-tab-stop-position="1.75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is-legal="true" loext:num-list-format="%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is-legal="true"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is-legal="true" loext:num-list-format="%1%.%2%.%3%." style:num-suffix="."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ListLabel_20_67" loext:is-legal="true" loext:num-list-format="%1%.%2%.%3%.%4%." style:num-suffix="."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text:style-name="ListLabel_20_68" loext:is-legal="true" loext:num-list-format="%1%.%2%.%3%.%4%.%5%." style:num-suffix="."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text:style-name="ListLabel_20_69" loext:is-legal="true" loext:num-list-format="%1%.%2%.%3%.%4%.%5%.%6%." style:num-suffix="."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text:style-name="ListLabel_20_70" loext:is-legal="true" loext:num-list-format="%1%.%2%.%3%.%4%.%5%.%6%.%7%." style:num-suffix="." style:num-format="1" text:display-levels="7">
        <style:list-level-properties text:list-level-position-and-space-mode="label-alignment">
          <style:list-level-label-alignment text:label-followed-by="listtab" text:list-tab-stop-position="1.5in" fo:text-indent="-0.9in" fo:margin-left="0.9in"/>
        </style:list-level-properties>
      </text:list-level-style-number>
      <text:list-level-style-number text:level="8" text:style-name="ListLabel_20_71" loext:is-legal="true" loext:num-list-format="%1%.%2%.%3%.%4%.%5%.%6%.%7%.%8%." style:num-suffix="." style:num-format="1" text:display-levels="8">
        <style:list-level-properties text:list-level-position-and-space-mode="label-alignment">
          <style:list-level-label-alignment text:label-followed-by="listtab" text:list-tab-stop-position="1.5in" fo:text-indent="-1in" fo:margin-left="1in"/>
        </style:list-level-properties>
      </text:list-level-style-number>
      <text:list-level-style-number text:level="9" text:style-name="ListLabel_20_72" loext:is-legal="true" loext:num-list-format="%1%.%2%.%3%.%4%.%5%.%6%.%7%.%8%.%9%." style:num-suffix="." style:num-format="1" text:display-levels="9">
        <style:list-level-properties text:list-level-position-and-space-mode="label-alignment">
          <style:list-level-label-alignment text:label-followed-by="listtab" text:list-tab-stop-position="1.75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is-legal="true" loext:num-list-format="%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4" loext:is-legal="true"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75" loext:is-legal="true" loext:num-list-format="%1%.%2%.%3%." style:num-suffix="."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ListLabel_20_76" loext:is-legal="true" loext:num-list-format="%1%.%2%.%3%.%4%." style:num-suffix="."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text:style-name="ListLabel_20_77" loext:is-legal="true" loext:num-list-format="%1%.%2%.%3%.%4%.%5%." style:num-suffix="."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text:style-name="ListLabel_20_78" loext:is-legal="true" loext:num-list-format="%1%.%2%.%3%.%4%.%5%.%6%." style:num-suffix="."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text:style-name="ListLabel_20_79" loext:is-legal="true" loext:num-list-format="%1%.%2%.%3%.%4%.%5%.%6%.%7%." style:num-suffix="." style:num-format="1" text:display-levels="7">
        <style:list-level-properties text:list-level-position-and-space-mode="label-alignment">
          <style:list-level-label-alignment text:label-followed-by="listtab" text:list-tab-stop-position="1.5in" fo:text-indent="-0.9in" fo:margin-left="0.9in"/>
        </style:list-level-properties>
      </text:list-level-style-number>
      <text:list-level-style-number text:level="8" text:style-name="ListLabel_20_80" loext:is-legal="true" loext:num-list-format="%1%.%2%.%3%.%4%.%5%.%6%.%7%.%8%." style:num-suffix="." style:num-format="1" text:display-levels="8">
        <style:list-level-properties text:list-level-position-and-space-mode="label-alignment">
          <style:list-level-label-alignment text:label-followed-by="listtab" text:list-tab-stop-position="1.5in" fo:text-indent="-1in" fo:margin-left="1in"/>
        </style:list-level-properties>
      </text:list-level-style-number>
      <text:list-level-style-number text:level="9" text:style-name="ListLabel_20_81" loext:is-legal="true" loext:num-list-format="%1%.%2%.%3%.%4%.%5%.%6%.%7%.%8%.%9%." style:num-suffix="." style:num-format="1" text:display-levels="9">
        <style:list-level-properties text:list-level-position-and-space-mode="label-alignment">
          <style:list-level-label-alignment text:label-followed-by="listtab" text:list-tab-stop-position="1.75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style-name="Regular" style:font-pitch="variable"/>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2'"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2'"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2'"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Anexo %1%: " style:num-prefix="Anexo " style:num-suffix=": "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92" loext:num-list-format="A.%2% " style:num-prefix="A." style:num-suffix=" " style:num-format="1">
        <style:list-level-properties text:list-level-position-and-space-mode="label-alignment">
          <style:list-level-label-alignment text:label-followed-by="listtab" text:list-tab-stop-position="0.252in" fo:text-indent="-0.252in" fo:margin-left="0.252in"/>
        </style:list-level-properties>
      </text:list-level-style-number>
      <text:list-level-style-number text:level="3" text:style-name="ListLabel_20_93" loext:num-list-format="A.%2%.%3% " style:num-prefix="A." style:num-suffix=" "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13"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14"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16"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17"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nothing" fo:text-indent="-0.3in" fo:margin-left="0.3in"/>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nothing" fo:text-indent="-0.3in" fo:margin-left="0.3in"/>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8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8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8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8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94"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95"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9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9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9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7756in"/>
        </style:list-level-properties>
        <style:text-properties fo:font-family="Symbol" style:font-style-name="Regular" style:font-pitch="variable"/>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2756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7756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2756in"/>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7756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2756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7756in"/>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2756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7756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654in"/>
        </style:list-level-properties>
        <style:text-properties fo:font-family="Symbol" style:font-style-name="Regular" style:font-pitch="variable"/>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0654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654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0654in"/>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654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0654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654in"/>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0654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654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654in"/>
        </style:list-level-properties>
        <style:text-properties fo:font-family="Symbol" style:font-style-name="Regular" style:font-pitch="variable"/>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0654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654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0654in"/>
        </style:list-level-properties>
        <style:text-properties fo:font-family="Symbol" style:font-style-name="Regular" style:font-pitch="variable"/>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654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0654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654in"/>
        </style:list-level-properties>
        <style:text-properties fo:font-family="Symbol" style:font-style-name="Regular" style:font-pitch="variable"/>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0654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654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654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Rodapé_20_à_20_direita">
      <style:paragraph-properties>
        <style:tab-stops>
          <style:tab-stop style:position="3.3457in" style:type="center"/>
          <style:tab-stop style:position="5.8752in" style:type="right"/>
        </style:tab-stops>
      </style:paragraph-properties>
    </style:style>
    <style:page-layout style:name="Mpm1">
      <style:page-layout-properties fo:page-width="8.2681in" fo:page-height="11.6929in" style:num-format="1" style:print-orientation="portrait" fo:margin-top="1.1811in" fo:margin-bottom="1.1811in" fo:margin-left="1.1811in" fo:margin-right="1.1811in" style:writing-mode="lr-tb" style:layout-grid-color="#c0c0c0" style:layout-grid-lines="2370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aper-tray-name="[From printer settings]" style:print-orientation="portrait" fo:margin-top="1.1811in" fo:margin-bottom="1.1811in" fo:margin-left="1.1811in" fo:margin-right="1.1811in" fo:border="none" fo:padding="0in" style:shadow="none" fo:background-color="transparent" style:writing-mode="lr-tb" style:layout-grid-color="#c0c0c0" style:layout-grid-lines="23700" style:layout-grid-base-height="0.0693in" style:layout-grid-ruby-height="0in" style:layout-grid-mode="none" style:layout-grid-ruby-below="false" style:layout-grid-print="false" style:layout-grid-display="false" style:layout-grid-base-width="0.1528in"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aper-tray-name="[From printer settings]" style:print-orientation="portrait" fo:margin-top="0.8283in" fo:margin-bottom="1.1846in" fo:margin-left="1.1811in" fo:margin-right="1.1811in" fo:border="none" fo:padding="0in" style:shadow="none" fo:background-color="transparent" style:writing-mode="lr-tb" style:layout-grid-color="#c0c0c0" style:layout-grid-lines="23700" style:layout-grid-base-height="0.0693in" style:layout-grid-ruby-height="0in" style:layout-grid-mode="none" style:layout-grid-ruby-below="false" style:layout-grid-print="false" style:layout-grid-display="false" style:layout-grid-base-width="0.1528in"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7874in" fo:margin-bottom="0.7874in" fo:margin-left="1.1811in" fo:margin-right="1.1811in" style:writing-mode="lr-tb" style:layout-grid-color="#c0c0c0" style:layout-grid-lines="2370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3937in" fo:margin-left="0in" fo:margin-right="0in" fo:margin-top="0.3543in" style:dynamic-spacing="true"/>
      </style:footer-style>
    </style:page-layout>
    <style:page-layout style:name="Mpm5" style:page-usage="right">
      <style:page-layout-properties fo:page-width="8.2681in" fo:page-height="11.6929in" style:num-format="i" style:paper-tray-name="[From printer settings]" style:print-orientation="portrait" fo:margin-top="0.7874in" fo:margin-bottom="0.7874in" fo:margin-left="1.1811in" fo:margin-right="1.1811in" fo:border="none" fo:padding="0in" style:shadow="none" fo:background-color="transparent" style:writing-mode="lr-tb" style:layout-grid-color="#c0c0c0" style:layout-grid-lines="23700" style:layout-grid-base-height="0.0693in" style:layout-grid-ruby-height="0in" style:layout-grid-mode="none" style:layout-grid-ruby-below="false" style:layout-grid-print="false" style:layout-grid-display="false" style:layout-grid-base-width="0.1528in"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6">
      <style:page-layout-properties fo:page-width="8.2681in" fo:page-height="11.6929in" style:num-format="1" style:print-orientation="portrait" fo:margin-top="0.7874in" fo:margin-bottom="0.7874in" fo:margin-left="1.1811in" fo:margin-right="1.1811in" style:writing-mode="lr-tb" style:layout-grid-color="#c0c0c0" style:layout-grid-lines="44" style:layout-grid-base-height="0.207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3937in" fo:margin-left="0in" fo:margin-right="0in" fo:margin-top="0.3543in" style:dynamic-spacing="true"/>
      </style:footer-style>
    </style:page-layout>
    <style:page-layout style:name="Mpm7" style:page-usage="right">
      <style:page-layout-properties fo:page-width="8.2681in" fo:page-height="11.6929in" style:num-format="1" style:paper-tray-name="[From printer settings]" style:print-orientation="portrait" fo:margin-top="0.7874in" fo:margin-bottom="0.7874in" fo:margin-left="1.1811in" fo:margin-right="1.1811in" fo:border="none" fo:padding="0in" style:shadow="none" fo:background-color="transparent" style:writing-mode="lr-tb" style:layout-grid-color="#c0c0c0" style:layout-grid-lines="44" style:layout-grid-base-height="0.2075in" style:layout-grid-ruby-height="0in" style:layout-grid-mode="none" style:layout-grid-ruby-below="false" style:layout-grid-print="false" style:layout-grid-display="false" style:layout-grid-base-width="0.1528in"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8">
      <style:page-layout-properties fo:page-width="8.2681in" fo:page-height="11.6929in" style:num-format="1" style:print-orientation="portrait" fo:margin-top="0.7874in" fo:margin-bottom="0.7874in" fo:margin-left="1.1811in" fo:margin-right="1.1811in" style:writing-mode="lr-tb" style:layout-grid-color="#c0c0c0" style:layout-grid-lines="44" style:layout-grid-base-height="0.207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937in" fo:margin-left="0in" fo:margin-right="0in" fo:margin-bottom="0.3543in" style:dynamic-spacing="true"/>
      </style:header-style>
      <style:footer-style>
        <style:header-footer-properties fo:min-height="0.3937in" fo:margin-left="0in" fo:margin-right="0in" fo:margin-top="0.3543in" style:dynamic-spacing="true"/>
      </style:footer-style>
    </style:page-layout>
    <style:page-layout style:name="Mpm9" style:page-usage="right">
      <style:page-layout-properties fo:page-width="8.2681in" fo:page-height="11.6929in" style:num-format="1" style:paper-tray-name="[From printer settings]" style:print-orientation="portrait" fo:margin-top="0.7874in" fo:margin-bottom="0.7874in" fo:margin-left="1.1811in" fo:margin-right="1.1811in" fo:border="none" fo:padding="0in" style:shadow="none" fo:background-color="transparent" style:writing-mode="lr-tb" style:layout-grid-color="#c0c0c0" style:layout-grid-lines="44" style:layout-grid-base-height="0.2075in" style:layout-grid-ruby-height="0in" style:layout-grid-mode="none" style:layout-grid-ruby-below="false" style:layout-grid-print="false" style:layout-grid-display="false" style:layout-grid-base-width="0.1528in"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10">
      <style:page-layout-properties fo:page-width="8.2681in" fo:page-height="11.6929in" style:num-format="1" style:print-orientation="portrait" fo:margin-top="0.7874in" fo:margin-bottom="0.7874in" fo:margin-left="1.1811in" fo:margin-right="1.181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3937in" fo:margin-left="0in" fo:margin-right="0in" fo:margin-top="0.3543in" style:dynamic-spacing="true"/>
      </style:footer-style>
    </style:page-layout>
    <style:page-layout style:name="Mpm11">
      <style:page-layout-properties fo:page-width="8.2681in" fo:page-height="11.6929in" style:num-format="1" style:print-orientation="portrait" fo:margin-top="0.7874in" fo:margin-bottom="0.7874in" fo:margin-left="1.1811in" fo:margin-right="1.1811in" style:writing-mode="lr-tb" style:layout-grid-color="#c0c0c0" style:layout-grid-lines="2370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3937in" fo:margin-left="0in" fo:margin-right="0in" fo:margin-top="0.3543in" style:dynamic-spacing="true"/>
      </style:footer-style>
    </style:page-layout>
    <style:page-layout style:name="Mpm12" style:page-usage="right">
      <style:page-layout-properties fo:page-width="8.2681in" fo:page-height="11.6929in" style:num-format="1" style:paper-tray-name="[From printer settings]" style:print-orientation="portrait" fo:margin-top="0.7874in" fo:margin-bottom="0.7874in" fo:margin-left="1.1811in" fo:margin-right="1.1811in" fo:border="none" fo:padding="0in" style:shadow="none" fo:background-color="transparent" style:writing-mode="lr-tb" style:layout-grid-color="#c0c0c0" style:layout-grid-lines="23700" style:layout-grid-base-height="0.0693in" style:layout-grid-ruby-height="0in" style:layout-grid-mode="none" style:layout-grid-ruby-below="false" style:layout-grid-print="false" style:layout-grid-display="false" style:layout-grid-base-width="0.1528in"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13">
      <style:page-layout-properties fo:page-width="8.2681in" fo:page-height="11.6929in" style:num-format="1" style:print-orientation="portrait" fo:margin-top="0.5in" fo:margin-bottom="0.5in" fo:margin-left="1.1811in" fo:margin-right="1.1811in" style:writing-mode="lr-tb" style:layout-grid-color="#c0c0c0" style:layout-grid-lines="57" style:layout-grid-base-height="0.1618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page-layout style:name="Mpm14">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8">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9">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20">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master-page style:name="Converted1" style:page-layout-name="Mpm2" draw:style-name="Mdp2" style:next-style-name="Standard"/>
    <style:master-page style:name="Converted2" style:page-layout-name="Mpm1" draw:style-name="Mdp1"/>
    <style:master-page style:name="Converted3" style:page-layout-name="Mpm2" draw:style-name="Mdp2" style:next-style-name="Converted2"/>
    <style:master-page style:name="Converted4" style:page-layout-name="Mpm1" draw:style-name="Mdp1"/>
    <style:master-page style:name="Converted5" style:page-layout-name="Mpm2" draw:style-name="Mdp2" style:next-style-name="Converted4"/>
    <style:master-page style:name="Converted6" style:page-layout-name="Mpm1" draw:style-name="Mdp1"/>
    <style:master-page style:name="Converted7" style:page-layout-name="Mpm3" draw:style-name="Mdp2" style:next-style-name="Converted6"/>
    <style:master-page style:name="Converted8" style:page-layout-name="Mpm4" draw:style-name="Mdp1">
      <style:header>
        <text:p text:style-name="Header"/>
      </style:header>
      <style:header-left>
        <text:p text:style-name="Header"/>
      </style:header-left>
      <style:footer>
        <text:p text:style-name="Rodapé_20_inicial_20_direito"><text:page-number text:select-page="current">0</text:page-number></text:p>
      </style:footer>
      <style:footer-left>
        <text:p text:style-name="Rodapé_20_inicial_20_esquerdo"><text:tab/><text:page-number text:select-page="current">xii</text:page-number></text:p>
      </style:footer-left>
    </style:master-page>
    <style:master-page style:name="Converted9" style:page-layout-name="Mpm5" draw:style-name="Mdp2" style:next-style-name="Converted8">
      <style:header>
        <text:p text:style-name="Header"/>
      </style:header>
      <style:header-left>
        <text:p text:style-name="Header"/>
      </style:header-left>
      <style:footer>
        <text:p text:style-name="Rodapé_20_inicial_20_direito"><text:page-number text:select-page="current">xiii</text:page-number></text:p>
      </style:footer>
      <style:footer-left>
        <text:p text:style-name="Rodapé_20_inicial_20_esquerdo"><text:tab/><text:page-number text:select-page="current">0</text:page-number></text:p>
      </style:footer-left>
    </style:master-page>
    <style:master-page style:name="Converted10" style:page-layout-name="Mpm4" draw:style-name="Mdp1">
      <style:header>
        <text:p text:style-name="Header"/>
      </style:header>
      <style:header-left>
        <text:p text:style-name="Header"/>
      </style:header-left>
      <style:footer>
        <text:p text:style-name="Rodapé_20_inicial_20_direito"><text:page-number text:select-page="current">0</text:page-number></text:p>
      </style:footer>
      <style:footer-left>
        <text:p text:style-name="Rodapé_20_inicial_20_esquerdo"><text:tab/><text:page-number text:select-page="current">xiv</text:page-number></text:p>
      </style:footer-left>
    </style:master-page>
    <style:master-page style:name="Converted11" style:page-layout-name="Mpm5" draw:style-name="Mdp2" style:next-style-name="Converted10">
      <style:header>
        <text:p text:style-name="Header"/>
      </style:header>
      <style:header-left>
        <text:p text:style-name="Header"/>
      </style:header-left>
      <style:footer>
        <text:p text:style-name="Rodapé_20_inicial_20_direito"><text:page-number text:select-page="current">xv</text:page-number></text:p>
      </style:footer>
      <style:footer-left>
        <text:p text:style-name="Rodapé_20_inicial_20_esquerdo"><text:tab/><text:page-number text:select-page="current">0</text:page-number></text:p>
      </style:footer-left>
    </style:master-page>
    <style:master-page style:name="Converted12" style:page-layout-name="Mpm4" draw:style-name="Mdp1">
      <style:header>
        <text:p text:style-name="Header"/>
      </style:header>
      <style:header-left>
        <text:p text:style-name="Header"/>
      </style:header-left>
      <style:footer>
        <text:p text:style-name="Rodapé_20_inicial_20_direito"><text:page-number text:select-page="current">0</text:page-number></text:p>
      </style:footer>
      <style:footer-left>
        <text:p text:style-name="Rodapé_20_inicial_20_esquerdo"><text:tab/><text:page-number text:select-page="current">xvi</text:page-number></text:p>
      </style:footer-left>
    </style:master-page>
    <style:master-page style:name="Converted13" style:page-layout-name="Mpm5" draw:style-name="Mdp2" style:next-style-name="Converted12">
      <style:header>
        <text:p text:style-name="Header"/>
      </style:header>
      <style:header-left>
        <text:p text:style-name="Header"/>
      </style:header-left>
      <style:footer>
        <text:p text:style-name="Rodapé_20_inicial_20_direito"><text:page-number text:select-page="current">xvii</text:page-number></text:p>
      </style:footer>
      <style:footer-left>
        <text:p text:style-name="Rodapé_20_inicial_20_esquerdo"><text:tab/><text:page-number text:select-page="current">0</text:page-number></text:p>
      </style:footer-left>
    </style:master-page>
    <style:master-page style:name="Converted14" style:page-layout-name="Mpm6" draw:style-name="Mdp1">
      <style:header>
        <text:p text:style-name="MP1"><loext:style-ref text:reference-format="text" text:ref-name="Heading 1">Introdução</loext:style-ref></text:p>
      </style:header>
      <style:header-left>
        <text:p text:style-name="Header"/>
      </style:header-left>
      <style:footer>
        <text:p text:style-name="MP2"><text:tab/><text:tab/><text:page-number text:select-page="current">3</text:page-number></text:p>
      </style:footer>
      <style:footer-left>
        <text:p text:style-name="Rodapé_20_à_20_direita"><text:page-number text:select-page="current">2</text:page-number></text:p>
      </style:footer-left>
    </style:master-page>
    <style:master-page style:name="Converted15" style:page-layout-name="Mpm7" draw:style-name="Mdp2" style:next-style-name="Converted14">
      <style:header>
        <text:p text:style-name="MP1"><loext:style-ref text:reference-format="text" text:ref-name="Heading 1">Introdução</loext:style-ref></text:p>
      </style:header>
      <style:header-left>
        <text:p text:style-name="Header"/>
      </style:header-left>
      <style:footer>
        <text:p text:style-name="MP2"><text:tab/><text:tab/><text:page-number text:select-page="current">1</text:page-number></text:p>
      </style:footer>
      <style:footer-left>
        <text:p text:style-name="Rodapé_20_à_20_direita"><text:page-number text:select-page="current">0</text:page-number></text:p>
      </style:footer-left>
    </style:master-page>
    <style:master-page style:name="Converted16" style:page-layout-name="Mpm6" draw:style-name="Mdp1">
      <style:header>
        <text:p text:style-name="MP1"><loext:style-ref text:reference-format="text" text:ref-name="Heading 1">Revisão Bibliográfica</loext:style-ref></text:p>
        <text:p text:style-name="Header"/>
      </style:header>
      <style:header-left>
        <text:p text:style-name="Header"/>
      </style:header-left>
      <style:footer>
        <text:p text:style-name="MP2"><text:tab/><text:tab/><text:page-number text:select-page="current">7</text:page-number></text:p>
      </style:footer>
      <style:footer-left>
        <text:p text:style-name="Rodapé_20_à_20_direita"><text:page-number text:select-page="current">6</text:page-number></text:p>
      </style:footer-left>
    </style:master-page>
    <style:master-page style:name="Converted17" style:page-layout-name="Mpm7" draw:style-name="Mdp2" style:next-style-name="Converted16">
      <style:header>
        <text:p text:style-name="MP1"><loext:style-ref text:reference-format="text" text:ref-name="Heading 1">Revisão Bibliográfica</loext:style-ref></text:p>
        <text:p text:style-name="Header"/>
      </style:header>
      <style:header-left>
        <text:p text:style-name="Header"/>
      </style:header-left>
      <style:footer>
        <text:p text:style-name="MP2"><text:tab/><text:tab/><text:page-number text:select-page="current">5</text:page-number></text:p>
      </style:footer>
      <style:footer-left>
        <text:p text:style-name="Rodapé_20_à_20_direita"><text:page-number text:select-page="current">0</text:page-number></text:p>
      </style:footer-left>
    </style:master-page>
    <style:master-page style:name="Converted18" style:page-layout-name="Mpm8" draw:style-name="Mdp1">
      <style:header>
        <text:p text:style-name="MP1"><loext:style-ref text:reference-format="text" text:ref-name="Heading 1">Visualização de Sinópticos SVG</loext:style-ref></text:p>
        <text:p text:style-name="Header"/>
      </style:header>
      <style:header-left>
        <text:p text:style-name="Header"/>
      </style:header-left>
      <style:footer>
        <text:p text:style-name="MP2"><text:tab/><text:tab/><text:page-number text:select-page="current">11</text:page-number></text:p>
      </style:footer>
      <style:footer-left>
        <text:p text:style-name="Rodapé_20_à_20_direita"><text:page-number text:select-page="current">12</text:page-number></text:p>
      </style:footer-left>
    </style:master-page>
    <style:master-page style:name="Converted19" style:page-layout-name="Mpm9" draw:style-name="Mdp2" style:next-style-name="Converted18">
      <style:header>
        <text:p text:style-name="MP1"><loext:style-ref text:reference-format="text" text:ref-name="Heading 1">Visualização de Sinópticos SVG</loext:style-ref></text:p>
        <text:p text:style-name="Header"/>
      </style:header>
      <style:header-left>
        <text:p text:style-name="Header"/>
      </style:header-left>
      <style:footer>
        <text:p text:style-name="MP2"><text:tab/><text:tab/><text:page-number text:select-page="current">9</text:page-number></text:p>
      </style:footer>
      <style:footer-left>
        <text:p text:style-name="Rodapé_20_à_20_direita"><text:page-number text:select-page="current">0</text:page-number></text:p>
      </style:footer-left>
    </style:master-page>
    <style:master-page style:name="Converted20" style:page-layout-name="Mpm6" draw:style-name="Mdp1">
      <style:header>
        <text:p text:style-name="MP1"><loext:style-ref text:reference-format="text" text:ref-name="Heading 1">Conclusões e Trabalho Futuro</loext:style-ref></text:p>
        <text:p text:style-name="Header"/>
      </style:header>
      <style:header-left>
        <text:p text:style-name="Header"/>
      </style:header-left>
      <style:footer>
        <text:p text:style-name="MP2"><text:tab/><text:tab/><text:page-number text:select-page="current">15</text:page-number></text:p>
      </style:footer>
      <style:footer-left>
        <text:p text:style-name="Rodapé_20_à_20_direita"><text:page-number text:select-page="current">16</text:page-number></text:p>
      </style:footer-left>
    </style:master-page>
    <style:master-page style:name="Converted21" style:page-layout-name="Mpm7" draw:style-name="Mdp2" style:next-style-name="Converted20">
      <style:header>
        <text:p text:style-name="MP1"><loext:style-ref text:reference-format="text" text:ref-name="Heading 1">Implementação</loext:style-ref></text:p>
        <text:p text:style-name="Header"/>
      </style:header>
      <style:header-left>
        <text:p text:style-name="Header"/>
      </style:header-left>
      <style:footer>
        <text:p text:style-name="MP2"><text:tab/><text:tab/><text:page-number text:select-page="current">13</text:page-number></text:p>
      </style:footer>
      <style:footer-left>
        <text:p text:style-name="Rodapé_20_à_20_direita"><text:page-number text:select-page="current">0</text:page-number></text:p>
      </style:footer-left>
    </style:master-page>
    <style:master-page style:name="Converted22" style:page-layout-name="Mpm10" draw:style-name="Mdp1">
      <style:header>
        <text:p text:style-name="MP1"><loext:style-ref text:reference-format="text" text:ref-name="Heading 1">Introdução</loext:style-ref></text:p>
        <text:p text:style-name="Header"/>
      </style:header>
      <style:header-left>
        <text:p text:style-name="Header"/>
      </style:header-left>
      <style:footer>
        <text:p text:style-name="MP2"><text:tab/><text:tab/><text:page-number text:select-page="current">0</text:page-number></text:p>
      </style:footer>
      <style:footer-left>
        <text:p text:style-name="Rodapé_20_à_20_direita"><text:page-number text:select-page="current">0</text:page-number></text:p>
      </style:footer-left>
    </style:master-page>
    <style:master-page style:name="Converted23" style:page-layout-name="Mpm11" draw:style-name="Mdp1">
      <style:header>
        <text:p text:style-name="MP1"><loext:style-ref text:reference-format="text" text:ref-name="Heading 1">Introdução</loext:style-ref></text:p>
        <text:p text:style-name="Header"/>
      </style:header>
      <style:header-left>
        <text:p text:style-name="Header"/>
      </style:header-left>
      <style:footer>
        <text:p text:style-name="MP2"><text:tab/><text:tab/><text:page-number text:select-page="current">19</text:page-number></text:p>
      </style:footer>
      <style:footer-left>
        <text:p text:style-name="Rodapé_20_à_20_direita"><text:page-number text:select-page="current">18</text:page-number></text:p>
      </style:footer-left>
    </style:master-page>
    <style:master-page style:name="Converted24" style:page-layout-name="Mpm12" draw:style-name="Mdp2" style:next-style-name="Converted23">
      <style:header>
        <text:p text:style-name="MP1"><loext:style-ref text:reference-format="text" text:ref-name="Heading 1">Referências</loext:style-ref></text:p>
        <text:p text:style-name="Header"/>
      </style:header>
      <style:header-left>
        <text:p text:style-name="Header"/>
      </style:header-left>
      <style:footer>
        <text:p text:style-name="MP2"><text:tab/><text:tab/><text:page-number text:select-page="current">17</text:page-number></text:p>
      </style:footer>
      <style:footer-left>
        <text:p text:style-name="Rodapé_20_à_20_direita"><text:page-number text:select-page="current">0</text:page-number></text:p>
      </style:footer-left>
    </style:master-page>
    <style:master-page style:name="Converted25" style:page-layout-name="Mpm13" draw:style-name="Mdp1">
      <style:header>
        <text:p text:style-name="MP1"><loext:style-ref text:reference-format="text" text:ref-name="Heading 1">Índice Remissivo</loext:style-ref></text:p>
        <text:p text:style-name="Header"/>
      </style:header>
      <style:header-left>
        <text:p text:style-name="Header"/>
      </style:header-left>
      <style:footer>
        <text:p text:style-name="MP2"><text:tab/><text:tab/><text:page-number text:select-page="current">21</text:page-number></text:p>
      </style:footer>
      <style:footer-left>
        <text:p text:style-name="Rodapé_20_à_20_direita"><text:page-number text:select-page="current">20</text:page-number></text:p>
      </style:footer-left>
    </style:master-page>
    <style:master-page style:name="First_20_Page" style:display-name="First Page" style:page-layout-name="Mpm14" style:next-style-name="Standard"/>
    <style:master-page style:name="Left_20_Page" style:display-name="Left Page" style:page-layout-name="Mpm15" style:next-style-name="Right_20_Page"/>
    <style:master-page style:name="Right_20_Page" style:display-name="Right Page" style:page-layout-name="Mpm16" style:next-style-name="Left_20_Page"/>
    <style:master-page style:name="Envelope" style:page-layout-name="Mpm17"/>
    <style:master-page style:name="Index" style:page-layout-name="Mpm14"/>
    <style:master-page style:name="HTML" style:page-layout-name="Mpm18"/>
    <style:master-page style:name="Footnote" style:page-layout-name="Mpm19"/>
    <style:master-page style:name="Endnote" style:page-layout-name="Mpm19"/>
    <style:master-page style:name="Landscape" style:page-layout-name="Mpm2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 Augusto de Sousa</meta:initial-creator>
    <meta:editing-cycles>6</meta:editing-cycles>
    <meta:creation-date>2015-10-28T12:05:00</meta:creation-date>
    <dc:date>2026-02-06T03:07:28.431449000</dc:date>
    <meta:editing-duration>PT6H47M25S</meta:editing-duration>
    <meta:generator>LibreOffice/25.2.2.2$MacOSX_X86_64 LibreOffice_project/7370d4be9e3cf6031a51beef54ff3bda878e3fac</meta:generator>
    <meta:document-statistic meta:table-count="2" meta:image-count="2" meta:object-count="12" meta:page-count="39" meta:paragraph-count="292" meta:word-count="5367" meta:character-count="35307" meta:non-whitespace-character-count="30187"/>
    <meta:user-defined meta:name="AppVersion">15.0000</meta:user-defined>
    <meta:user-defined meta:name="Company">FEUP</meta:user-defined>
    <meta:template xlink:type="simple" xlink:actuate="onRequest" xlink:title="Normal.dotm" xlink:href=""/>
  </office:meta>
</office:document-meta>
</file>

<file path=Object 1/content.xml><?xml version="1.0" encoding="utf-8"?>
<math xmlns="http://www.w3.org/1998/Math/MathML" display="block">
  <semantics>
    <mrow>
      <mstyle mathsize="12pt">
        <mrow>
          <mstyle mathvariant="italic">
            <msub>
              <mtext>CIF</mtext>
              <mstyle mathsize="8pt">
                <mn>1</mn>
              </mstyle>
            </msub>
          </mstyle>
          <mi mathvariant="normal">:</mi>
          <mspace width="2em"/>
          <msubsup>
            <mi>F</mi>
            <mstyle mathsize="8pt">
              <mn>0</mn>
            </mstyle>
            <mstyle mathsize="8pt">
              <mi>j</mi>
            </mstyle>
          </msubsup>
          <mrow>
            <mo fence="true" form="prefix" stretchy="true">(</mo>
            <mrow>
              <mi>a</mi>
            </mrow>
            <mo fence="true" form="postfix" stretchy="true">)</mo>
          </mrow>
          <mrow>
            <mspace width="0.5em"/>
            <mo stretchy="false">=</mo>
            <mspace width="0.5em"/>
          </mrow>
          <mfrac>
            <mn>1</mn>
            <mrow>
              <mn>2</mn>
              <mstyle mathvariant="italic">
                <mtext>πι</mtext>
              </mstyle>
            </mrow>
          </mfrac>
          <mspace width="0.5em"/>
          <mrow>
            <mo stretchy="false">∮</mo>
            <mrow>
              <mfrac>
                <mrow>
                  <msubsup>
                    <mi>F</mi>
                    <mstyle mathsize="8pt">
                      <mn>0</mn>
                    </mstyle>
                    <mstyle mathsize="8pt">
                      <mi>j</mi>
                    </mstyle>
                  </msubsup>
                  <mrow>
                    <mo fence="true" form="prefix" stretchy="true">(</mo>
                    <mrow>
                      <mi>z</mi>
                    </mrow>
                    <mo fence="true" form="postfix" stretchy="true">)</mo>
                  </mrow>
                </mrow>
                <mrow>
                  <mi>z</mi>
                  <mo stretchy="false">−</mo>
                  <mi>a</mi>
                </mrow>
              </mfrac>
              <mstyle mathvariant="italic">
                <mtext>dz</mtext>
              </mstyle>
            </mrow>
          </mrow>
        </mrow>
      </mstyle>
      <mrow/>
    </mrow>
    <annotation encoding="StarMath 5.0"> size 12{ ital "CIF" rSub { size 8{1} } :~F rSub { size 8{0} }  rSup { size 8{j} }  left (a right )`=` {  {1}  over  {2 ital "πι"} } ` lInt { {  {F rSub { size 8{0} }  rSup { size 8{j} }  left (z right )}  over  {z - a} }  ital "dz"} } {}</annotation>
  </semantics>
</math>
</file>

<file path=Object 10/content.xml><?xml version="1.0" encoding="utf-8"?>
<math xmlns="http://www.w3.org/1998/Math/MathML" display="block">
  <semantics>
    <mrow>
      <mstyle mathsize="12pt">
        <mo stretchy="false">⋱</mo>
      </mstyle>
      <mrow/>
    </mrow>
    <annotation encoding="StarMath 5.0"> size 12{ dotsdown } {}</annotation>
  </semantics>
</math>
</file>

<file path=Object 11/content.xml><?xml version="1.0" encoding="utf-8"?>
<math xmlns="http://www.w3.org/1998/Math/MathML" display="block">
  <semantics>
    <mrow>
      <mstyle mathsize="12pt">
        <mo stretchy="false">⋮</mo>
      </mstyle>
      <mrow/>
    </mrow>
    <annotation encoding="StarMath 5.0"> size 12{ dotsvert } {}</annotation>
  </semantics>
</math>
</file>

<file path=Object 12/content.xml><?xml version="1.0" encoding="utf-8"?>
<math xmlns="http://www.w3.org/1998/Math/MathML" display="block">
  <semantics>
    <mrow>
      <mstyle mathsize="12pt">
        <mrow>
          <mstyle mathvariant="italic">
            <mtext>δ&lt;</mtext>
          </mstyle>
          <msup>
            <mtext>10</mtext>
            <mstyle mathsize="8pt">
              <mrow>
                <mo stretchy="false">−</mo>
                <mn>8</mn>
              </mrow>
            </mstyle>
          </msup>
        </mrow>
      </mstyle>
      <mrow/>
    </mrow>
    <annotation encoding="StarMath 5.0"> size 12{ ital "δ&lt;""10" rSup { size 8{ - 8} } } {}</annotation>
  </semantics>
</math>
</file>

<file path=Object 2/content.xml><?xml version="1.0" encoding="utf-8"?>
<math xmlns="http://www.w3.org/1998/Math/MathML" display="block">
  <semantics>
    <mrow>
      <mstyle mathsize="12pt">
        <mrow>
          <mstyle mathvariant="italic">
            <msub>
              <mtext>CIF</mtext>
              <mstyle mathsize="8pt">
                <mn>2</mn>
              </mstyle>
            </msub>
          </mstyle>
          <mi mathvariant="normal">:</mi>
          <mspace width="2em"/>
          <msubsup>
            <mi>F</mi>
            <mstyle mathsize="8pt">
              <mn>1</mn>
            </mstyle>
            <mstyle mathsize="8pt">
              <mi>j</mi>
            </mstyle>
          </msubsup>
          <mrow>
            <mo fence="true" form="prefix" stretchy="true">(</mo>
            <mrow>
              <mi>a</mi>
            </mrow>
            <mo fence="true" form="postfix" stretchy="true">)</mo>
          </mrow>
          <mrow>
            <mspace width="0.5em"/>
            <mo stretchy="false">=</mo>
            <mspace width="0.5em"/>
          </mrow>
          <mfrac>
            <mn>1</mn>
            <mrow>
              <mn>2</mn>
              <mstyle mathvariant="italic">
                <mtext>πι</mtext>
              </mstyle>
            </mrow>
          </mfrac>
          <mspace width="0.5em"/>
          <mrow>
            <mo stretchy="false">∮</mo>
            <mrow>
              <mfrac>
                <mrow>
                  <msubsup>
                    <mi>F</mi>
                    <mstyle mathsize="8pt">
                      <mn>0</mn>
                    </mstyle>
                    <mstyle mathsize="8pt">
                      <mi>j</mi>
                    </mstyle>
                  </msubsup>
                  <mrow>
                    <mo fence="true" form="prefix" stretchy="true">(</mo>
                    <mrow>
                      <mi>x</mi>
                    </mrow>
                    <mo fence="true" form="postfix" stretchy="true">)</mo>
                  </mrow>
                </mrow>
                <mrow>
                  <mi>x</mi>
                  <mo stretchy="false">−</mo>
                  <mi>a</mi>
                </mrow>
              </mfrac>
              <mstyle mathvariant="italic">
                <mtext>dx</mtext>
              </mstyle>
            </mrow>
          </mrow>
        </mrow>
      </mstyle>
      <mrow/>
    </mrow>
    <annotation encoding="StarMath 5.0"> size 12{ ital "CIF" rSub { size 8{2} } :~F rSub { size 8{1} }  rSup { size 8{j} }  left (a right )`=` {  {1}  over  {2 ital "πι"} } ` lInt { {  {F rSub { size 8{0} }  rSup { size 8{j} }  left (x right )}  over  {x - a} }  ital "dx"} } {}</annotation>
  </semantics>
</math>
</file>

<file path=Object 3/content.xml><?xml version="1.0" encoding="utf-8"?>
<math xmlns="http://www.w3.org/1998/Math/MathML" display="block">
  <semantics>
    <mrow>
      <mstyle mathsize="12pt">
        <msubsup>
          <mi>x</mi>
          <mstyle mathsize="8pt">
            <mn>1</mn>
          </mstyle>
          <mstyle mathsize="8pt">
            <mi>k</mi>
          </mstyle>
        </msubsup>
      </mstyle>
      <mrow/>
    </mrow>
    <annotation encoding="StarMath 5.0"> size 12{x rSub { size 8{1} }  rSup { size 8{k} } } {}</annotation>
  </semantics>
</math>
</file>

<file path=Object 4/content.xml><?xml version="1.0" encoding="utf-8"?>
<math xmlns="http://www.w3.org/1998/Math/MathML" display="block">
  <semantics>
    <mrow>
      <mstyle mathsize="12pt">
        <msubsup>
          <mi>x</mi>
          <mstyle mathsize="8pt">
            <mn>2</mn>
          </mstyle>
          <mstyle mathsize="8pt">
            <mi>k</mi>
          </mstyle>
        </msubsup>
      </mstyle>
      <mrow/>
    </mrow>
    <annotation encoding="StarMath 5.0"> size 12{x rSub { size 8{2} }  rSup { size 8{k} } } {}</annotation>
  </semantics>
</math>
</file>

<file path=Object 5/content.xml><?xml version="1.0" encoding="utf-8"?>
<math xmlns="http://www.w3.org/1998/Math/MathML" display="block">
  <semantics>
    <mrow>
      <mstyle mathsize="12pt">
        <msubsup>
          <mi>x</mi>
          <mstyle mathsize="8pt">
            <mn>3</mn>
          </mstyle>
          <mstyle mathsize="8pt">
            <mi>k</mi>
          </mstyle>
        </msubsup>
      </mstyle>
      <mrow/>
    </mrow>
    <annotation encoding="StarMath 5.0"> size 12{x rSub { size 8{3} }  rSup { size 8{k} } } {}</annotation>
  </semantics>
</math>
</file>

<file path=Object 6/content.xml><?xml version="1.0" encoding="utf-8"?>
<math xmlns="http://www.w3.org/1998/Math/MathML" display="block">
  <semantics>
    <mrow>
      <mstyle mathsize="12pt">
        <mstyle mathvariant="italic">
          <mtext>δ&lt;ε</mtext>
        </mstyle>
      </mstyle>
      <mrow/>
    </mrow>
    <annotation encoding="StarMath 5.0"> size 12{ ital "δ&lt;ε"} {}</annotation>
  </semantics>
</math>
</file>

<file path=Object 7/content.xml><?xml version="1.0" encoding="utf-8"?>
<math xmlns="http://www.w3.org/1998/Math/MathML" display="block">
  <semantics>
    <mrow>
      <mstyle mathsize="12pt">
        <mstyle mathvariant="italic">
          <mtext>δ&lt;ε</mtext>
        </mstyle>
      </mstyle>
      <mrow/>
    </mrow>
    <annotation encoding="StarMath 5.0"> size 12{ ital "δ&lt;ε"} {}</annotation>
  </semantics>
</math>
</file>

<file path=Object 8/content.xml><?xml version="1.0" encoding="utf-8"?>
<math xmlns="http://www.w3.org/1998/Math/MathML" display="block">
  <semantics>
    <mrow>
      <mstyle mathsize="12pt">
        <mo stretchy="false">⋮</mo>
      </mstyle>
      <mrow/>
    </mrow>
    <annotation encoding="StarMath 5.0"> size 12{ dotsvert } {}</annotation>
  </semantics>
</math>
</file>

<file path=Object 9/content.xml><?xml version="1.0" encoding="utf-8"?>
<math xmlns="http://www.w3.org/1998/Math/MathML" display="block">
  <semantics>
    <mrow>
      <mstyle mathsize="12pt">
        <mo stretchy="false">⋮</mo>
      </mstyle>
      <mrow/>
    </mrow>
    <annotation encoding="StarMath 5.0"> size 12{ dotsvert } {}</annotation>
  </semantics>
</math>
</file>