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Heading_20_1">
      <style:text-properties fo:language="en" fo:country="US" officeooo:rsid="001eb3ec" officeooo:paragraph-rsid="001eb3ec"/>
    </style:style>
    <style:style style:name="P2" style:family="paragraph" style:parent-style-name="Title">
      <style:text-properties style:font-name="Times New Roman" fo:font-size="28pt" style:font-size-asian="28pt" style:font-size-complex="28pt"/>
    </style:style>
    <style:style style:name="P3" style:family="paragraph" style:parent-style-name="Contents_20_1">
      <style:paragraph-properties>
        <style:tab-stops>
          <style:tab-stop style:position="9.9264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9.7299in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9.5327in" style:type="right" style:leader-style="dotted" style:leader-text="."/>
        </style:tab-stops>
      </style:paragraph-properties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Text_20_body">
      <style:text-properties fo:language="en" fo:country="US" officeooo:paragraph-rsid="001eb3ec"/>
    </style:style>
    <style:style style:name="P8" style:family="paragraph" style:parent-style-name="Heading_20_2">
      <style:text-properties officeooo:rsid="001eb3ec" officeooo:paragraph-rsid="001eb3ec"/>
    </style:style>
    <style:style style:name="P9" style:family="paragraph" style:parent-style-name="Heading_20_3">
      <style:text-properties officeooo:rsid="001eb3ec" officeooo:paragraph-rsid="001eb3ec"/>
    </style:style>
    <style:style style:name="P10" style:family="paragraph" style:parent-style-name="Heading_20_3">
      <style:text-properties officeooo:rsid="001fecfd" officeooo:paragraph-rsid="001fecfd"/>
    </style:style>
    <style:style style:name="P11" style:family="paragraph" style:parent-style-name="Heading_20_3">
      <style:paragraph-properties fo:margin-top="0in" fo:margin-bottom="0in" style:contextual-spacing="false"/>
    </style:style>
    <style:style style:name="P12" style:family="paragraph" style:parent-style-name="Text_20_body">
      <style:paragraph-properties fo:break-before="page"/>
    </style:style>
    <style:style style:name="fr1" style:family="graphic" style:parent-style-name="Inline_20_Heading">
      <style:graphic-properties style:vertical-pos="middle" style:vertical-rel="text"/>
    </style:style>
    <style:style style:name="fr2" style:family="graphic" style:parent-style-name="Inline_20_Heading">
      <style:graphic-properties style:vertical-pos="middle" style:vertical-rel="tex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14118_2365495780"/><draw:frame draw:style-name="fr1" draw:name="Frame1" text:anchor-type="as-char" draw:z-index="0"><draw:text-box fo:min-height="0in" fo:min-width="0in"><text:p text:style-name="P2"><text:bookmark-start text:name="__RefHeading___Toc14116_2365495780"/>Interactive Beat Annotation GUI<text:bookmark-end text:name="__RefHeading___Toc14116_2365495780"/></text:p></draw:text-box></draw:frame><text:bookmark-end text:name="__RefHeading___Toc14118_2365495780"/></text:h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<text:a xlink:type="simple" xlink:href="#__RefHeading___Toc14118_2365495780" text:style-name="Index_20_Link" text:visited-style-name="Index_20_Link"><text:tab/>1</text:a></text:p>
          <text:p text:style-name="P4"><text:a xlink:type="simple" xlink:href="#__RefHeading___Toc14120_2365495780" text:style-name="Index_20_Link" text:visited-style-name="Index_20_Link">Introduction<text:tab/>1</text:a></text:p>
          <text:p text:style-name="P4"><text:a xlink:type="simple" xlink:href="#__RefHeading___Toc16566_2365495780" text:style-name="Index_20_Link" text:visited-style-name="Index_20_Link">State of the Art<text:tab/>1</text:a></text:p>
          <text:p text:style-name="P5"><text:a xlink:type="simple" xlink:href="#__RefHeading___Toc16568_2365495780" text:style-name="Index_20_Link" text:visited-style-name="Index_20_Link">Beat tracking Research<text:tab/>1</text:a></text:p>
          <text:p text:style-name="P5"><text:a xlink:type="simple" xlink:href="#__RefHeading___Toc16570_2365495780" text:style-name="Index_20_Link" text:visited-style-name="Index_20_Link">Beat Annotation Methods<text:tab/>1</text:a></text:p>
          <text:p text:style-name="P5"><text:a xlink:type="simple" xlink:href="#__RefHeading___Toc16572_2365495780" text:style-name="Index_20_Link" text:visited-style-name="Index_20_Link">Existing Tools for Beat Annotation<text:tab/>1</text:a></text:p>
          <text:p text:style-name="P5"><text:a xlink:type="simple" xlink:href="#__RefHeading___Toc16564_2365495780" text:style-name="Index_20_Link" text:visited-style-name="Index_20_Link">HIL Approach for BT<text:tab/>1</text:a></text:p>
          <text:p text:style-name="P5"><text:a xlink:type="simple" xlink:href="#__RefHeading___Toc16574_2365495780" text:style-name="Index_20_Link" text:visited-style-name="Index_20_Link">Identified Gaps<text:tab/>2</text:a></text:p>
          <text:p text:style-name="P4"><text:a xlink:type="simple" xlink:href="#__RefHeading___Toc16576_2365495780" text:style-name="Index_20_Link" text:visited-style-name="Index_20_Link">Work Plan<text:tab/>2</text:a></text:p>
          <text:p text:style-name="P4"><text:a xlink:type="simple" xlink:href="#__RefHeading___Toc16578_2365495780" text:style-name="Index_20_Link" text:visited-style-name="Index_20_Link">Bibliography<text:tab/>2</text:a></text:p>
        </text:index-body>
      </text:table-of-content>
      <text:p text:style-name="Text_20_body"/>
      <text:h text:style-name="P6" text:outline-level="2"><text:bookmark-start text:name="__RefHeading___Toc14120_2365495780"/>Introduction<text:bookmark-end text:name="__RefHeading___Toc14120_2365495780"/></text:h>
      <text:p text:style-name="P7"/>
      <text:h text:style-name="P8" text:outline-level="2"><text:bookmark-start text:name="__RefHeading___Toc16566_2365495780"/>State of the Art<text:bookmark-end text:name="__RefHeading___Toc16566_2365495780"/></text:h>
      <text:p text:style-name="Text_20_body"/>
      <text:h text:style-name="P9" text:outline-level="3"><text:bookmark-start text:name="__RefHeading___Toc16568_2365495780"/>Beat tracking Research<text:bookmark-end text:name="__RefHeading___Toc16568_2365495780"/></text:h>
      <text:p text:style-name="Text_20_body"/>
      <text:h text:style-name="P10" text:outline-level="3"><text:bookmark-start text:name="__RefHeading___Toc16570_2365495780"/>Beat Annotation Methods<text:bookmark-end text:name="__RefHeading___Toc16570_2365495780"/></text:h>
      <text:p text:style-name="Text_20_body"/>
      <text:h text:style-name="Heading_20_3" text:outline-level="3"><text:bookmark-start text:name="__RefHeading___Toc16572_2365495780"/>Existing Tools for Beat Annotation<text:bookmark-end text:name="__RefHeading___Toc16572_2365495780"/></text:h>
      <text:p text:style-name="Text_20_body"/>
      <text:p text:style-name="Text_20_body"><draw:frame draw:style-name="fr2" draw:name="Frame2" text:anchor-type="as-char" draw:z-index="1"><draw:text-box fo:min-height="0in" fo:min-width="0in"><text:h text:style-name="P11" text:outline-level="3"><text:bookmark-start text:name="__RefHeading___Toc16564_2365495780"/>HIL Approach for BT<text:bookmark-end text:name="__RefHeading___Toc16564_2365495780"/></text:h></draw:text-box></draw:frame><text:line-break/></text:p>
      <text:h text:style-name="Heading_20_3" text:outline-level="3"><text:bookmark-start text:name="__RefHeading___Toc16574_2365495780"/>Identified Gaps<text:bookmark-end text:name="__RefHeading___Toc16574_2365495780"/></text:h>
      <text:p text:style-name="P12"/>
      <text:h text:style-name="Heading_20_2" text:outline-level="2"><text:bookmark-start text:name="__RefHeading___Toc16576_2365495780"/>Work Plan<text:bookmark-end text:name="__RefHeading___Toc16576_2365495780"/></text:h>
      <text:p text:style-name="Text_20_body"/>
      <text:h text:style-name="Heading_20_2" text:outline-level="2"><text:bookmark-start text:name="__RefHeading___Toc16578_2365495780COPY_IS_MOVE"/>Bibliography<text:bookmark-end text:name="__RefHeading___Toc16578_2365495780COPY_IS_MOVE"/></text:h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imes New Roman2" fo:font-family="'Times New Roman'" style:font-style-name="Regular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style:font-name="Times New Roman1" fo:font-family="'Times New Roman'" style:font-style-name="Bold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style:font-name="Times New Roman1" fo:font-family="'Times New Roman'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style:font-name="Times New Roman1" fo:font-family="'Times New Roman'" style:font-style-name="Bold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Inline_20_Heading" style:display-name="Inline Heading" style:family="graphic">
      <style:graphic-properties fo:min-width="0in" fo:min-height="0in"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pt" fo:country="PT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6T14:51:16.167864000</meta:creation-date>
    <dc:date>2026-02-06T15:30:01.100790000</dc:date>
    <meta:editing-duration>PT3M53S</meta:editing-duration>
    <meta:editing-cycles>1</meta:editing-cycles>
    <meta:generator>LibreOffice/25.2.2.2$MacOSX_X86_64 LibreOffice_project/7370d4be9e3cf6031a51beef54ff3bda878e3fac</meta:generator>
    <meta:document-statistic meta:table-count="0" meta:image-count="0" meta:object-count="0" meta:page-count="1" meta:paragraph-count="23" meta:word-count="67" meta:character-count="393" meta:non-whitespace-character-count="345"/>
  </office:meta>
</office:document-meta>
</file>