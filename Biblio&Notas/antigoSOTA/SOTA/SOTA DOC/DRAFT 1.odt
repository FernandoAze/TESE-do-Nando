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dale Mono" svg:font-family="'Andale Mono'" style:font-pitch="fixed"/>
    <style:font-face style:name="Arial Unicode MS" svg:font-family="'Arial Unicode MS'" style:font-family-generic="swiss"/>
    <style:font-face style:name="Arial Unicode MS1" svg:font-family="'Arial Unicode MS'" style:font-family-generic="system" style:font-pitch="variable"/>
    <style:font-face style:name="Lexand" svg:font-family="Lexand"/>
    <style:font-face style:name="Lexend" svg:font-family="Lexen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
      <loext:graphic-properties draw:fill="none"/>
      <style:paragraph-properties fo:margin-left="0.1965in" fo:margin-right="0in" fo:text-indent="0in" style:auto-text-indent="false" style:page-number="auto" fo:background-color="transparent"/>
      <style:text-properties fo:color="#ffa500" loext:opacity="100%" style:font-name="Lexend" fo:font-style="italic" fo:font-weight="normal" officeooo:rsid="0008e1c5" officeooo:paragraph-rsid="0008e1c5"/>
    </style:style>
    <style:style style:name="P2" style:family="paragraph" style:parent-style-name="Text_20_body" style:master-page-name="">
      <loext:graphic-properties draw:fill="none"/>
      <style:paragraph-properties fo:margin-left="0.9846in" fo:margin-right="0in" fo:margin-top="0in" fo:margin-bottom="0in" style:contextual-spacing="false" fo:line-height="115%" fo:text-indent="0in" style:auto-text-indent="false" style:page-number="auto" fo:background-color="transparent"/>
      <style:text-properties fo:color="#008000" loext:opacity="100%" style:font-name="Lexend" fo:font-size="6pt" officeooo:rsid="0008e1c5" style:font-size-asian="6pt" style:font-size-complex="6pt"/>
    </style:style>
    <style:style style:name="P3" style:family="paragraph" style:parent-style-name="Text_20_body">
      <loext:graphic-properties draw:fill="none"/>
      <style:paragraph-properties fo:margin-left="0.9846in" fo:margin-right="0in" fo:line-height="115%" fo:text-indent="0in" style:auto-text-indent="false" fo:background-color="transparent"/>
      <style:text-properties fo:color="#008000" loext:opacity="100%" style:font-name="Lexend" fo:font-size="6pt" officeooo:rsid="0008e1c5" officeooo:paragraph-rsid="001b32e9" style:font-size-asian="6pt" style:font-size-complex="6pt"/>
    </style:style>
    <style:style style:name="P4" style:family="paragraph" style:parent-style-name="Standard" style:list-style-name="L1">
      <loext:graphic-properties draw:fill="none"/>
      <style:paragraph-properties fo:background-color="transparent"/>
      <style:text-properties fo:color="#008000" loext:opacity="100%" style:font-name="Lexend" fo:font-size="6pt" fo:font-style="normal" fo:font-weight="normal" officeooo:rsid="0008e1c5" officeooo:paragraph-rsid="001b32e9" style:font-size-asian="6pt" style:font-style-asian="normal" style:font-size-complex="6pt" style:font-style-complex="normal"/>
    </style:style>
    <style:style style:name="P5" style:family="paragraph" style:parent-style-name="Standard" style:list-style-name="L1">
      <loext:graphic-properties draw:fill="none"/>
      <style:paragraph-properties fo:background-color="transparent"/>
      <style:text-properties fo:color="#008000" loext:opacity="100%" style:font-name="Lexend" fo:font-size="6pt" fo:font-style="normal" fo:font-weight="normal" officeooo:rsid="0008e1c5" officeooo:paragraph-rsid="004909c5" style:font-size-asian="6pt" style:font-style-asian="normal" style:font-size-complex="6pt" style:font-style-complex="normal"/>
    </style:style>
    <style:style style:name="P6" style:family="paragraph" style:parent-style-name="Standard">
      <loext:graphic-properties draw:fill="none"/>
      <style:paragraph-properties fo:margin-left="0.9846in" fo:text-indent="0in" style:auto-text-indent="false" fo:background-color="transparent"/>
      <style:text-properties fo:color="#008000" loext:opacity="100%" style:font-name="Lexend" fo:font-size="6pt" fo:font-style="normal" fo:font-weight="normal" officeooo:rsid="004909c5" officeooo:paragraph-rsid="004909c5" style:font-size-asian="6pt" style:font-style-asian="normal" style:font-size-complex="6pt" style:font-style-complex="normal"/>
    </style:style>
    <style:style style:name="P7" style:family="paragraph" style:parent-style-name="Text_20_body">
      <loext:graphic-properties draw:fill="none"/>
      <style:paragraph-properties fo:line-height="115%" fo:text-align="left" style:justify-single-word="false" fo:background-color="transparent"/>
      <style:text-properties fo:color="#faebd7" loext:opacity="100%" style:font-name="Lexend" officeooo:rsid="0008e1c5" officeooo:paragraph-rsid="003dbda2"/>
    </style:style>
    <style:style style:name="P8" style:family="paragraph" style:parent-style-name="Text_20_body" style:list-style-name="L2">
      <loext:graphic-properties draw:fill="none"/>
      <style:paragraph-properties fo:line-height="115%" fo:text-align="left" style:justify-single-word="false" fo:background-color="transparent"/>
      <style:text-properties fo:color="#faebd7" loext:opacity="100%" style:font-name="Times New Roman" fo:font-size="12pt" fo:font-style="normal" style:text-underline-style="none" fo:font-weight="normal" officeooo:rsid="003dbda2" officeooo:paragraph-rsid="003dbda2" style:font-size-asian="12pt" style:font-style-asian="normal" style:font-size-complex="12pt" style:font-style-complex="normal"/>
    </style:style>
    <style:style style:name="P9" style:family="paragraph" style:parent-style-name="Text_20_body" style:list-style-name="L2">
      <loext:graphic-properties draw:fill="none"/>
      <style:paragraph-properties fo:line-height="115%" fo:text-align="left" style:justify-single-word="false" fo:background-color="transparent"/>
      <style:text-properties fo:color="#faebd7" loext:opacity="100%" style:font-name="Times New Roman" fo:font-size="12pt" style:text-underline-style="none" officeooo:rsid="003dbda2" officeooo:paragraph-rsid="003dbda2" style:font-size-asian="12pt" style:font-size-complex="12pt"/>
    </style:style>
    <style:style style:name="P10" style:family="paragraph" style:parent-style-name="Text_20_body" style:list-style-name="L2">
      <loext:graphic-properties draw:fill="none"/>
      <style:paragraph-properties fo:line-height="115%" fo:text-align="left" style:justify-single-word="false" fo:background-color="transparent"/>
      <style:text-properties fo:color="#faebd7" loext:opacity="100%" style:font-name="Times New Roman" fo:font-size="12pt" style:text-underline-style="none" officeooo:rsid="003dbda2" officeooo:paragraph-rsid="004909c5" style:font-size-asian="12pt" style:font-size-complex="12pt"/>
    </style:style>
    <style:style style:name="P11" style:family="paragraph" style:parent-style-name="Text_20_body">
      <loext:graphic-properties draw:fill="none"/>
      <style:paragraph-properties fo:margin-left="0in" fo:line-height="115%" fo:text-align="left" style:justify-single-word="false" fo:text-indent="0in" style:auto-text-indent="false" fo:background-color="transparent"/>
      <style:text-properties fo:color="#faebd7" loext:opacity="100%" style:font-name="Times New Roman" fo:font-size="12pt" style:text-underline-style="none" officeooo:rsid="004b0704" officeooo:paragraph-rsid="004b0704" style:font-size-asian="12pt" style:font-size-complex="12pt"/>
    </style:style>
    <style:style style:name="P12" style:family="paragraph" style:parent-style-name="Text_20_body" style:list-style-name="L3">
      <loext:graphic-properties draw:fill="none"/>
      <style:paragraph-properties fo:line-height="115%" fo:text-align="left" style:justify-single-word="false" fo:background-color="transparent"/>
      <style:text-properties officeooo:paragraph-rsid="0049efe7"/>
    </style:style>
    <style:style style:name="P13" style:family="paragraph" style:parent-style-name="Text_20_body" style:list-style-name="L3">
      <loext:graphic-properties draw:fill="none"/>
      <style:paragraph-properties fo:line-height="115%" fo:text-align="left" style:justify-single-word="false" fo:background-color="transparent"/>
      <style:text-properties officeooo:paragraph-rsid="004bbe4a"/>
    </style:style>
    <style:style style:name="P14" style:family="paragraph" style:parent-style-name="Text_20_body">
      <loext:graphic-properties draw:fill="none"/>
      <style:paragraph-properties fo:line-height="115%" fo:text-align="left" style:justify-single-word="false" fo:background-color="transparent"/>
      <style:text-properties officeooo:paragraph-rsid="004b0704"/>
    </style:style>
    <style:style style:name="P15" style:family="paragraph" style:parent-style-name="Text_20_body" style:list-style-name="L4">
      <loext:graphic-properties draw:fill="none"/>
      <style:paragraph-properties fo:line-height="115%" fo:text-align="left" style:justify-single-word="false" fo:background-color="transparent"/>
      <style:text-properties officeooo:paragraph-rsid="004bbe4a"/>
    </style:style>
    <style:style style:name="P16" style:family="paragraph" style:parent-style-name="Text_20_body" style:list-style-name="L4">
      <loext:graphic-properties draw:fill="none"/>
      <style:paragraph-properties fo:line-height="115%" fo:text-align="left" style:justify-single-word="false" fo:background-color="transparent"/>
      <style:text-properties fo:color="#faebd7" loext:opacity="100%" style:font-name="Times New Roman" fo:font-size="12pt" fo:font-style="normal" style:text-underline-style="none" fo:font-weight="normal" officeooo:rsid="004bbe4a" officeooo:paragraph-rsid="004c1be2" style:font-size-asian="12pt" style:font-style-asian="normal" style:font-size-complex="12pt" style:font-style-complex="normal"/>
    </style:style>
    <style:style style:name="P17" style:family="paragraph" style:parent-style-name="Text_20_body">
      <loext:graphic-properties draw:fill="none"/>
      <style:paragraph-properties fo:line-height="115%" fo:text-align="left" style:justify-single-word="false" fo:background-color="transparent"/>
      <style:text-properties officeooo:paragraph-rsid="004ee147"/>
    </style:style>
    <style:style style:name="P18" style:family="paragraph" style:parent-style-name="Text_20_body"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ab-stops>
          <style:tab-stop style:position="0.0346in"/>
        </style:tab-stops>
      </style:paragraph-properties>
      <style:text-properties fo:color="#ffa500" loext:opacity="100%" style:font-name="Lexend" fo:font-style="italic" fo:font-weight="normal" officeooo:rsid="0008e1c5" officeooo:paragraph-rsid="005092ec"/>
    </style:style>
    <style:style style:name="P19" style:family="paragraph" style:parent-style-name="Text_20_body">
      <loext:graphic-properties draw:fill="none"/>
      <style:paragraph-properties fo:margin-left="0.1965in" fo:margin-right="0in" fo:margin-top="0in" fo:margin-bottom="0.0972in" style:contextual-spacing="false" fo:line-height="115%" fo:text-align="left" style:justify-single-word="false" fo:text-indent="0in" style:auto-text-indent="false" fo:break-before="page" fo:background-color="transparent">
        <style:tab-stops>
          <style:tab-stop style:position="0.0346in"/>
        </style:tab-stops>
      </style:paragraph-properties>
      <style:text-properties fo:color="#ffa500" loext:opacity="100%" style:font-name="Lexend" fo:font-style="normal" fo:font-weight="normal" officeooo:rsid="0008e1c5" officeooo:paragraph-rsid="005092ec" style:font-style-asian="normal" style:font-style-complex="normal"/>
    </style:style>
    <style:style style:name="P20" style:family="paragraph" style:parent-style-name="Text_20_body">
      <loext:graphic-properties draw:fill="none"/>
      <style:paragraph-properties fo:margin-left="0.689in" fo:margin-right="0in" fo:margin-top="0in" fo:margin-bottom="0.0972in" style:contextual-spacing="false" fo:line-height="115%" fo:text-align="left" style:justify-single-word="false" fo:text-indent="0in" style:auto-text-indent="false" fo:background-color="transparent">
        <style:tab-stops>
          <style:tab-stop style:position="0.0346in"/>
        </style:tab-stops>
      </style:paragraph-properties>
      <style:text-properties officeooo:paragraph-rsid="001e4af9"/>
    </style:style>
    <style:style style:name="P21" style:family="paragraph" style:parent-style-name="Text_20_body">
      <loext:graphic-properties draw:fill="none"/>
      <style:paragraph-properties fo:margin-left="1.4772in" fo:margin-right="0in" fo:margin-top="0in" fo:margin-bottom="0.0972in" style:contextual-spacing="false" fo:line-height="115%" fo:text-align="left" style:justify-single-word="false" fo:text-indent="0in" style:auto-text-indent="false" fo:background-color="transparent">
        <style:tab-stops>
          <style:tab-stop style:position="0.0346in"/>
        </style:tab-stops>
      </style:paragraph-properties>
      <style:text-properties fo:color="#008000" loext:opacity="100%" style:font-name="Andale Mono" fo:font-weight="normal" officeooo:rsid="002d2873" officeooo:paragraph-rsid="00340781"/>
    </style:style>
    <style:style style:name="P22" style:family="paragraph" style:parent-style-name="Text_20_body">
      <loext:graphic-properties draw:fill="none"/>
      <style:paragraph-properties fo:margin-left="0.9846in" fo:margin-right="0in" fo:margin-top="0in" fo:margin-bottom="0.0972in" style:contextual-spacing="false" fo:line-height="115%" fo:text-align="left" style:justify-single-word="false" fo:text-indent="0in" style:auto-text-indent="false" fo:background-color="transparent">
        <style:tab-stops>
          <style:tab-stop style:position="0.0346in"/>
        </style:tab-stops>
      </style:paragraph-properties>
      <style:text-properties fo:color="#008000" loext:opacity="100%" style:font-name="Andale Mono" fo:font-size="9pt" fo:font-weight="normal" officeooo:rsid="002d2873" officeooo:paragraph-rsid="00340781" style:font-size-asian="9pt" style:font-size-complex="9pt"/>
    </style:style>
    <style:style style:name="P23" style:family="paragraph" style:parent-style-name="Text_20_body">
      <style:paragraph-properties fo:margin-left="0.9846in" fo:text-indent="0in" style:auto-text-indent="false">
        <style:tab-stops>
          <style:tab-stop style:position="0.0346in"/>
        </style:tab-stops>
      </style:paragraph-properties>
      <style:text-properties fo:color="#008000" loext:opacity="100%" style:font-name="Andale Mono" fo:font-size="9pt" officeooo:rsid="002d2873" style:font-size-asian="9pt" style:font-size-complex="9pt"/>
    </style:style>
    <style:style style:name="P24" style:family="paragraph" style:parent-style-name="Text_20_body">
      <loext:graphic-properties draw:fill="none"/>
      <style:paragraph-properties fo:line-height="115%" fo:text-align="left" style:justify-single-word="false" fo:background-color="transparent"/>
      <style:text-properties officeooo:paragraph-rsid="0063a9c2"/>
    </style:style>
    <style:style style:name="P25" style:family="paragraph" style:parent-style-name="Text_20_body">
      <style:paragraph-properties fo:margin-left="0.9846in" fo:text-indent="0in" style:auto-text-indent="false">
        <style:tab-stops>
          <style:tab-stop style:position="0.0346in"/>
        </style:tab-stops>
      </style:paragraph-properties>
      <style:text-properties fo:color="#008000" loext:opacity="100%" style:font-name="Andale Mono" fo:font-size="9pt" officeooo:rsid="002d2873" officeooo:paragraph-rsid="005f8d60" style:font-size-asian="9pt" style:font-size-complex="9pt"/>
    </style:style>
    <style:style style:name="P26" style:family="paragraph" style:parent-style-name="Heading_20_3">
      <style:paragraph-properties fo:margin-left="0in" fo:margin-top="0in" fo:margin-bottom="0.0972in" style:contextual-spacing="false" fo:line-height="115%"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5f8d60" officeooo:paragraph-rsid="0069423b" style:font-size-asian="12pt" style:font-style-asian="normal" style:font-size-complex="12pt" style:font-style-complex="normal"/>
    </style:style>
    <style:style style:name="P27" style:family="paragraph" style:parent-style-name="Heading_20_3">
      <style:paragraph-properties fo:margin-left="0in" fo:margin-top="0in" fo:margin-bottom="0.0972in" style:contextual-spacing="false" fo:line-height="115%"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5f8d60" officeooo:paragraph-rsid="006d6f59" style:font-size-asian="12pt" style:font-style-asian="normal" style:font-size-complex="12pt" style:font-style-complex="normal"/>
    </style:style>
    <style:style style:name="P28" style:family="paragraph" style:parent-style-name="Heading_20_3">
      <style:paragraph-properties fo:margin-left="0.9846in" fo:margin-top="0in" fo:margin-bottom="0.0972in" style:contextual-spacing="false" fo:line-height="115%" fo:text-indent="0in" style:auto-text-indent="false">
        <style:tab-stops>
          <style:tab-stop style:position="0.0346in"/>
        </style:tab-stops>
      </style:paragraph-properties>
      <style:text-properties fo:color="#008000" loext:opacity="100%" style:font-name="Andale Mono" fo:font-size="12pt" officeooo:rsid="002d2873" officeooo:paragraph-rsid="00674a14" style:font-size-asian="12pt" style:font-size-complex="12pt"/>
    </style:style>
    <style:style style:name="P29" style:family="paragraph" style:parent-style-name="Text_20_body">
      <style:paragraph-properties fo:margin-left="0.9846in" fo:text-indent="0in" style:auto-text-indent="false">
        <style:tab-stops>
          <style:tab-stop style:position="0.0346in"/>
        </style:tab-stops>
      </style:paragraph-properties>
      <style:text-properties fo:color="#008000" loext:opacity="100%" style:font-name="Andale Mono" fo:font-size="9pt" officeooo:rsid="002d2873" officeooo:paragraph-rsid="006fa2cc" style:font-size-asian="9pt" style:font-size-complex="9pt"/>
    </style:style>
    <style:style style:name="P30" style:family="paragraph" style:parent-style-name="Text_20_body">
      <style:paragraph-properties fo:margin-left="0in"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6fa2cc" officeooo:paragraph-rsid="007381f3" style:font-size-asian="12pt" style:font-style-asian="normal" style:font-size-complex="12pt" style:font-style-complex="normal"/>
    </style:style>
    <style:style style:name="P31" style:family="paragraph" style:parent-style-name="Text_20_body">
      <style:paragraph-properties fo:margin-left="0in"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69423b" officeooo:paragraph-rsid="007381f3" style:font-size-asian="12pt" style:font-style-asian="normal" style:font-size-complex="12pt" style:font-style-complex="normal"/>
    </style:style>
    <style:style style:name="P32" style:family="paragraph" style:parent-style-name="Text_20_body">
      <style:paragraph-properties fo:margin-left="0in"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7381f3" officeooo:paragraph-rsid="007381f3" style:font-size-asian="12pt" style:font-style-asian="normal" style:font-size-complex="12pt" style:font-style-complex="normal"/>
    </style:style>
    <style:style style:name="P33" style:family="paragraph" style:parent-style-name="Text_20_body">
      <style:paragraph-properties fo:margin-left="0in"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7391a7" officeooo:paragraph-rsid="007391a7" style:font-size-asian="12pt" style:font-style-asian="normal" style:font-size-complex="12pt" style:font-style-complex="normal"/>
    </style:style>
    <style:style style:name="P34" style:family="paragraph" style:parent-style-name="Heading_20_3">
      <style:paragraph-properties fo:margin-left="0.9846in" fo:margin-top="0in" fo:margin-bottom="0.0972in" style:contextual-spacing="false" fo:line-height="115%" fo:text-indent="0in" style:auto-text-indent="false">
        <style:tab-stops>
          <style:tab-stop style:position="0.0346in"/>
        </style:tab-stops>
      </style:paragraph-properties>
      <style:text-properties fo:color="#008000" loext:opacity="100%" style:font-name="Andale Mono" fo:font-size="12pt" fo:font-weight="normal" officeooo:rsid="002d2873" style:font-size-asian="12pt" style:font-size-complex="12pt"/>
    </style:style>
    <style:style style:name="P35" style:family="paragraph" style:parent-style-name="Text_20_body">
      <style:paragraph-properties fo:margin-left="0in" fo:text-indent="0in" style:auto-text-indent="false">
        <style:tab-stops>
          <style:tab-stop style:position="0.0346in"/>
        </style:tab-stops>
      </style:paragraph-properties>
      <style:text-properties fo:color="#faebd7" loext:opacity="100%" style:font-name="Times New Roman" fo:font-size="12pt" fo:font-style="normal" style:text-underline-style="none" fo:font-weight="normal" officeooo:rsid="0073c159" officeooo:paragraph-rsid="00781b80" style:font-size-asian="12pt" style:font-style-asian="normal" style:font-size-complex="12pt" style:font-style-complex="normal"/>
    </style:style>
    <style:style style:name="P36" style:family="paragraph" style:parent-style-name="Text_20_body">
      <style:paragraph-properties fo:margin-left="0in"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73c159" officeooo:paragraph-rsid="00781b80" style:font-size-asian="12pt" style:font-style-asian="normal" style:font-size-complex="12pt" style:font-style-complex="normal"/>
    </style:style>
    <style:style style:name="P37" style:family="paragraph" style:parent-style-name="Text_20_body">
      <style:paragraph-properties fo:margin-left="0in"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74a815" officeooo:paragraph-rsid="00781b80" style:font-size-asian="12pt" style:font-style-asian="normal" style:font-size-complex="12pt" style:font-style-complex="normal"/>
    </style:style>
    <style:style style:name="P38" style:family="paragraph" style:parent-style-name="Text_20_body">
      <style:paragraph-properties fo:margin-left="0in" fo:text-indent="0in" style:auto-text-indent="false">
        <style:tab-stops>
          <style:tab-stop style:position="0.0346in"/>
        </style:tab-stops>
      </style:paragraph-properties>
      <style:text-properties fo:color="#ffff00" loext:opacity="100%" officeooo:paragraph-rsid="00781b80"/>
    </style:style>
    <style:style style:name="P39" style:family="paragraph" style:parent-style-name="Text_20_body">
      <style:paragraph-properties fo:margin-left="0in" fo:text-indent="0in" style:auto-text-indent="false">
        <style:tab-stops>
          <style:tab-stop style:position="0.0346in"/>
        </style:tab-stops>
      </style:paragraph-properties>
      <style:text-properties fo:color="#ffff00" loext:opacity="100%" style:font-name="Times New Roman" fo:font-size="12pt" fo:font-style="normal" style:text-underline-style="none" fo:font-weight="normal" officeooo:rsid="0078da0c" officeooo:paragraph-rsid="00781b80" style:font-size-asian="12pt" style:font-style-asian="normal" style:font-size-complex="12pt" style:font-style-complex="normal"/>
    </style:style>
    <style:style style:name="P40" style:family="paragraph" style:parent-style-name="Heading_20_3">
      <style:paragraph-properties fo:margin-left="0.9846in" fo:margin-top="0in" fo:margin-bottom="0.0972in" style:contextual-spacing="false" fo:line-height="115%" fo:text-indent="0in" style:auto-text-indent="false">
        <style:tab-stops>
          <style:tab-stop style:position="0.0346in"/>
        </style:tab-stops>
      </style:paragraph-properties>
      <style:text-properties fo:color="#008000" loext:opacity="100%" style:font-name="Andale Mono" fo:font-size="9pt" fo:font-weight="normal" officeooo:rsid="002d2873" style:font-size-asian="9pt" style:font-size-complex="9pt"/>
    </style:style>
    <style:style style:name="P41" style:family="paragraph" style:parent-style-name="Standard">
      <style:paragraph-properties fo:margin-left="0in" fo:line-height="115%" fo:text-indent="0in" style:auto-text-indent="false">
        <style:tab-stops>
          <style:tab-stop style:position="0.0346in"/>
        </style:tab-stops>
      </style:paragraph-properties>
      <style:text-properties fo:color="#ffff00" loext:opacity="100%" style:font-name="Times New Roman" fo:font-size="12pt" fo:font-style="normal" style:text-underline-style="none" officeooo:rsid="0078da0c" officeooo:paragraph-rsid="0078da0c" style:font-size-asian="12pt" style:font-style-asian="normal" style:font-size-complex="12pt" style:font-style-complex="normal"/>
    </style:style>
    <style:style style:name="P42" style:family="paragraph" style:parent-style-name="Standard" style:list-style-name="L1">
      <loext:graphic-properties draw:fill="none"/>
      <style:paragraph-properties fo:background-color="transparent"/>
      <style:text-properties fo:color="#ffffff" loext:opacity="100%" style:font-name="Lexend" fo:font-style="italic" fo:font-weight="normal" officeooo:rsid="0008e1c5" officeooo:paragraph-rsid="000bfa3d"/>
    </style:style>
    <style:style style:name="P43" style:family="paragraph" style:parent-style-name="Standard" style:list-style-name="L1">
      <loext:graphic-properties draw:fill="none"/>
      <style:paragraph-properties fo:background-color="transparent"/>
      <style:text-properties fo:color="#ffffff" loext:opacity="100%" style:font-name="Lexend" fo:font-style="normal" fo:font-weight="normal" officeooo:rsid="0008e1c5" officeooo:paragraph-rsid="00386323" style:font-style-asian="normal" style:font-style-complex="normal"/>
    </style:style>
    <style:style style:name="P44" style:family="paragraph" style:parent-style-name="Standard" style:list-style-name="L1">
      <loext:graphic-properties draw:fill="none"/>
      <style:paragraph-properties fo:background-color="transparent"/>
      <style:text-properties fo:color="#008000" loext:opacity="100%" style:font-name="Andale Mono" fo:font-size="9pt" fo:font-style="normal" fo:font-weight="normal" officeooo:rsid="002d2873" officeooo:paragraph-rsid="00386323" style:font-size-asian="9pt" style:font-style-asian="normal" style:font-size-complex="9pt" style:font-style-complex="normal"/>
    </style:style>
    <style:style style:name="P45" style:family="paragraph" style:parent-style-name="Standard" style:list-style-name="L1">
      <loext:graphic-properties draw:fill="none"/>
      <style:paragraph-properties fo:background-color="transparent"/>
      <style:text-properties fo:color="#ffffff" loext:opacity="100%" style:font-name="Times New Roman" fo:font-size="12pt" fo:font-style="normal" style:text-underline-style="none" fo:font-weight="normal" officeooo:rsid="007c79c3" officeooo:paragraph-rsid="007c79c3" style:font-size-asian="12pt" style:font-style-asian="normal" style:font-size-complex="12pt" style:font-style-complex="normal"/>
    </style:style>
    <style:style style:name="P46" style:family="paragraph" style:parent-style-name="Standard">
      <loext:graphic-properties draw:fill="none"/>
      <style:paragraph-properties fo:background-color="transparent"/>
      <style:text-properties fo:color="#ffe4c4" loext:opacity="100%" style:font-name="Times New Roman" fo:font-size="12pt" fo:font-style="normal" style:text-underline-style="none" fo:font-weight="normal" officeooo:rsid="007c79c3" officeooo:paragraph-rsid="007c79c3" style:font-size-asian="12pt" style:font-style-asian="normal" style:font-size-complex="12pt" style:font-style-complex="normal"/>
    </style:style>
    <style:style style:name="P47" style:family="paragraph" style:parent-style-name="Standard" style:list-style-name="L5">
      <loext:graphic-properties draw:fill="none"/>
      <style:paragraph-properties fo:background-color="transparent"/>
      <style:text-properties fo:color="#ffe4c4" loext:opacity="100%" style:font-name="Times New Roman" fo:font-size="12pt" fo:font-style="normal" style:text-underline-style="none" fo:font-weight="normal" officeooo:rsid="007c79c3" officeooo:paragraph-rsid="007c79c3" style:font-size-asian="12pt" style:font-style-asian="normal" style:font-size-complex="12pt" style:font-style-complex="normal"/>
    </style:style>
    <style:style style:name="P48" style:family="paragraph" style:parent-style-name="Standard" style:list-style-name="L5">
      <loext:graphic-properties draw:fill="none"/>
      <style:paragraph-properties fo:background-color="transparent"/>
      <style:text-properties fo:color="#ffe4c4" loext:opacity="100%" style:font-name="Times New Roman" fo:font-size="12pt" fo:font-style="normal" style:text-underline-style="none" fo:font-weight="normal" officeooo:rsid="007cdf5f" officeooo:paragraph-rsid="007cdf5f" style:font-size-asian="12pt" style:font-style-asian="normal" style:font-size-complex="12pt" style:font-style-complex="normal"/>
    </style:style>
    <style:style style:name="P49" style:family="paragraph" style:parent-style-name="Standard">
      <loext:graphic-properties draw:fill="none"/>
      <style:paragraph-properties fo:background-color="transparent"/>
      <style:text-properties fo:color="#ffffff" loext:opacity="100%" style:font-name="Lexend" fo:font-style="italic" fo:font-weight="normal" officeooo:rsid="0008e1c5" officeooo:paragraph-rsid="007c79c3"/>
    </style:style>
    <style:style style:name="P50" style:family="paragraph" style:parent-style-name="Text_20_body"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ext-properties fo:color="#ffa500" loext:opacity="100%" style:font-name="Lexend" fo:font-style="italic" fo:font-weight="bold" officeooo:rsid="0008e1c5" style:font-weight-asian="bold" style:font-weight-complex="bold"/>
    </style:style>
    <style:style style:name="P51" style:family="paragraph" style:parent-style-name="Text_20_body" style:list-style-name="L6"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ext-properties fo:color="#ffa500" loext:opacity="100%" style:font-name="Lexend" fo:font-style="italic" fo:font-weight="bold" officeooo:rsid="0008e1c5" style:font-weight-asian="bold" style:font-weight-complex="bold"/>
    </style:style>
    <style:style style:name="P52" style:family="paragraph" style:parent-style-name="Text_20_body"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ext-properties fo:font-variant="normal" fo:text-transform="none" fo:color="#ffffff" loext:opacity="100%" style:font-name="Lexend" fo:font-style="normal" fo:font-weight="normal" officeooo:rsid="0008e1c5"/>
    </style:style>
    <style:style style:name="P53" style:family="paragraph" style:parent-style-name="Text_20_body" style:list-style-name="L7"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ext-properties fo:color="#ffa500" loext:opacity="100%" style:font-name="Lexend" fo:font-style="italic" fo:font-weight="bold" officeooo:rsid="0008e1c5" style:font-weight-asian="bold" style:font-weight-complex="bold"/>
    </style:style>
    <style:style style:name="P54" style:family="paragraph" style:parent-style-name="Text_20_body"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ext-properties fo:font-variant="normal" fo:text-transform="none" fo:color="#ffffff" loext:opacity="100%" style:font-name="Lexend" fo:font-style="normal" fo:font-weight="normal" officeooo:rsid="0008e1c5" officeooo:paragraph-rsid="003bd54c"/>
    </style:style>
    <style:style style:name="P55" style:family="paragraph" style:parent-style-name="Text_20_body" style:list-style-name="L8"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ext-properties fo:color="#ffa500" loext:opacity="100%" style:font-name="Lexend" fo:font-style="italic" fo:font-weight="bold" officeooo:rsid="0008e1c5" style:font-weight-asian="bold" style:font-weight-complex="bold"/>
    </style:style>
    <style:style style:name="P56" style:family="paragraph" style:parent-style-name="Text_20_body" style:list-style-name="L9" style:master-page-name="">
      <loext:graphic-properties draw:fill="none"/>
      <style:paragraph-properties fo:margin-left="0.1965in" fo:margin-right="0in" fo:margin-top="0in" fo:margin-bottom="0.0972in" style:contextual-spacing="false" fo:line-height="115%" fo:text-align="left" style:justify-single-word="false" fo:text-indent="0in" style:auto-text-indent="false" style:page-number="auto" fo:background-color="transparent"/>
      <style:text-properties fo:color="#ffa500" loext:opacity="100%" style:font-name="Lexend" fo:font-style="italic" fo:font-weight="bold" officeooo:rsid="0008e1c5" style:font-weight-asian="bold" style:font-weight-complex="bold"/>
    </style:style>
    <style:style style:name="P57" style:family="paragraph" style:parent-style-name="Text_20_body" style:master-page-name="">
      <loext:graphic-properties draw:fill="none"/>
      <style:paragraph-properties fo:margin-left="0.1965in" fo:margin-right="0in" fo:margin-top="0in" fo:margin-bottom="0in" style:contextual-spacing="false" fo:line-height="115%" fo:text-align="left" style:justify-single-word="false" fo:text-indent="0in" style:auto-text-indent="false" style:page-number="auto" fo:background-color="transparent"/>
      <style:text-properties fo:color="#ffa500" loext:opacity="100%" style:font-name="Lexend" fo:font-style="italic" fo:font-weight="bold" officeooo:rsid="0008e1c5" style:font-weight-asian="bold" style:font-weight-complex="bold"/>
    </style:style>
    <style:style style:name="P58" style:family="paragraph" style:parent-style-name="Text_20_body" style:master-page-name="">
      <loext:graphic-properties draw:fill="none"/>
      <style:paragraph-properties fo:margin-left="0.1965in" fo:margin-right="0in" fo:margin-top="0in" fo:margin-bottom="0in" style:contextual-spacing="false" fo:line-height="115%" fo:text-align="left" style:justify-single-word="false" fo:text-indent="0in" style:auto-text-indent="false" style:page-number="auto" fo:background-color="transparent"/>
      <style:text-properties fo:font-variant="normal" fo:text-transform="none" fo:color="#ffffff" loext:opacity="100%" style:font-name="Lexend" fo:font-style="normal" fo:font-weight="normal" officeooo:rsid="0008e1c5"/>
    </style:style>
    <style:style style:name="P59" style:family="paragraph" style:parent-style-name="Text_20_body" style:master-page-name="">
      <loext:graphic-properties draw:fill="none"/>
      <style:paragraph-properties fo:margin-left="0.1965in" fo:margin-right="0in" fo:margin-top="0in" fo:margin-bottom="0in" style:contextual-spacing="false" fo:line-height="115%" fo:text-align="left" style:justify-single-word="false" fo:text-indent="0in" style:auto-text-indent="false" style:page-number="auto" fo:background-color="transparent"/>
      <style:text-properties fo:color="#ffa500" loext:opacity="100%" style:font-name="Lexend" fo:font-style="italic" fo:font-weight="normal" officeooo:rsid="0008e1c5"/>
    </style:style>
    <style:style style:name="P60" style:family="paragraph" style:parent-style-name="Text_20_body" style:master-page-name="">
      <loext:graphic-properties draw:fill="none"/>
      <style:paragraph-properties fo:margin-left="0.1965in" fo:margin-right="0in" fo:margin-top="0in" fo:margin-bottom="0in" style:contextual-spacing="false" fo:line-height="115%" fo:text-align="left" style:justify-single-word="false" fo:text-indent="0in" style:auto-text-indent="false" style:page-number="auto" fo:background-color="transparent"/>
      <style:text-properties fo:font-variant="normal" fo:text-transform="none" fo:color="#ffffff" loext:opacity="100%" style:font-name="Times New Roman" fo:font-size="12pt" fo:font-style="normal" fo:font-weight="normal" officeooo:rsid="0008e1c5" officeooo:paragraph-rsid="004909c5" style:font-size-asian="12pt" style:font-size-complex="12pt"/>
    </style:style>
    <style:style style:name="P61" style:family="paragraph" style:parent-style-name="Text_20_body">
      <loext:graphic-properties draw:fill="none"/>
      <style:paragraph-properties fo:margin-left="0.1965in" fo:margin-right="0in" fo:margin-top="0in" fo:margin-bottom="0in" style:contextual-spacing="false" fo:line-height="115%" fo:text-align="left" style:justify-single-word="false" fo:text-indent="0in" style:auto-text-indent="false" fo:background-color="transparent"/>
      <style:text-properties fo:font-variant="normal" fo:text-transform="none" fo:color="#ffffff" loext:opacity="100%" style:font-name="Times New Roman" fo:font-size="12pt" fo:font-style="normal" fo:font-weight="normal" officeooo:rsid="004bbe4a" officeooo:paragraph-rsid="004bbe4a" style:font-size-asian="12pt" style:font-size-complex="12pt"/>
    </style:style>
    <style:style style:name="P62" style:family="paragraph" style:parent-style-name="Text_20_body">
      <loext:graphic-properties draw:fill="none"/>
      <style:paragraph-properties fo:margin-left="0.1965in" fo:margin-right="0in" fo:margin-top="0in" fo:margin-bottom="0in" style:contextual-spacing="false" fo:line-height="115%" fo:text-align="left" style:justify-single-word="false" fo:text-indent="0in" style:auto-text-indent="false" fo:background-color="transparent"/>
      <style:text-properties fo:font-variant="normal" fo:text-transform="none" fo:color="#ffffff" loext:opacity="100%" style:font-name="Times New Roman" fo:font-size="12pt" fo:font-style="normal" fo:font-weight="normal" officeooo:rsid="004d7cad" officeooo:paragraph-rsid="004d7cad" style:font-size-asian="12pt" style:font-size-complex="12pt"/>
    </style:style>
    <style:style style:name="P63" style:family="paragraph" style:parent-style-name="Text_20_body">
      <loext:graphic-properties draw:fill="none"/>
      <style:paragraph-properties fo:margin-left="0.1965in" fo:margin-right="0in" fo:margin-top="0in" fo:margin-bottom="0in" style:contextual-spacing="false" fo:line-height="115%" fo:text-align="left" style:justify-single-word="false" fo:text-indent="0in" style:auto-text-indent="false" fo:background-color="transparent"/>
      <style:text-properties fo:font-variant="normal" fo:text-transform="none" fo:color="#ffffff" loext:opacity="100%" style:font-name="Times New Roman" fo:font-size="12pt" fo:font-style="normal" fo:font-weight="normal" officeooo:rsid="005928a7" officeooo:paragraph-rsid="005928a7" style:font-size-asian="12pt" style:font-size-complex="12pt"/>
    </style:style>
    <style:style style:name="P64" style:family="paragraph" style:parent-style-name="Text_20_body">
      <loext:graphic-properties draw:fill="none"/>
      <style:paragraph-properties fo:margin-left="0.1965in" fo:margin-right="0in" fo:margin-top="0in" fo:margin-bottom="0in" style:contextual-spacing="false" fo:line-height="115%" fo:text-align="left" style:justify-single-word="false" fo:text-indent="0in" style:auto-text-indent="false" fo:background-color="transparent"/>
      <style:text-properties fo:font-variant="normal" fo:text-transform="none" fo:color="#ffffff" loext:opacity="100%" style:font-name="Times New Roman" fo:font-size="12pt" fo:font-style="normal" fo:font-weight="normal" officeooo:rsid="0059db7f" officeooo:paragraph-rsid="0059db7f" style:font-size-asian="12pt" style:font-size-complex="12pt"/>
    </style:style>
    <style:style style:name="P65" style:family="paragraph" style:parent-style-name="Text_20_body">
      <loext:graphic-properties draw:fill="none"/>
      <style:paragraph-properties fo:margin-left="0.1965in" fo:margin-right="0in" fo:margin-top="0in" fo:margin-bottom="0in" style:contextual-spacing="false" fo:line-height="115%" fo:text-align="left" style:justify-single-word="false" fo:text-indent="0in" style:auto-text-indent="false" fo:background-color="transparent"/>
      <style:text-properties fo:font-variant="normal" fo:text-transform="none" fo:color="#ffffff" loext:opacity="100%" style:font-name="Times New Roman" fo:font-size="12pt" fo:font-style="normal" fo:font-weight="normal" officeooo:rsid="00674a14" officeooo:paragraph-rsid="00674a14" style:font-size-asian="12pt" style:font-size-complex="12pt"/>
    </style:style>
    <style:style style:name="P66" style:family="paragraph" style:parent-style-name="Text_20_body">
      <loext:graphic-properties draw:fill="none"/>
      <style:paragraph-properties fo:margin-left="0.1965in" fo:margin-right="0in" fo:margin-top="0in" fo:margin-bottom="0in" style:contextual-spacing="false" fo:line-height="115%" fo:text-align="left" style:justify-single-word="false" fo:text-indent="0in" style:auto-text-indent="false" fo:background-color="transparent"/>
      <style:text-properties fo:font-variant="normal" fo:text-transform="none" fo:color="#ffffff" loext:opacity="100%" style:font-name="Times New Roman" fo:font-size="12pt" fo:font-style="normal" fo:font-weight="normal" officeooo:rsid="006c6eae" officeooo:paragraph-rsid="006f076c" style:font-size-asian="12pt" style:font-size-complex="12pt"/>
    </style:style>
    <style:style style:name="P67" style:family="paragraph" style:parent-style-name="Text_20_body">
      <loext:graphic-properties draw:fill="none"/>
      <style:paragraph-properties fo:margin-left="0.1965in" fo:margin-right="0in" fo:margin-top="0in" fo:margin-bottom="0in" style:contextual-spacing="false" fo:line-height="115%" fo:text-align="left" style:justify-single-word="false" fo:text-indent="0in" style:auto-text-indent="false" fo:background-color="transparent"/>
      <style:text-properties fo:font-variant="normal" fo:text-transform="none" fo:color="#ffffff" loext:opacity="100%" style:font-name="Times New Roman" fo:font-size="12pt" fo:font-style="normal" fo:font-weight="normal" officeooo:rsid="0008e1c5" officeooo:paragraph-rsid="004909c5" style:font-size-asian="12pt" style:font-size-complex="12pt"/>
    </style:style>
    <style:style style:name="P68" style:family="paragraph" style:parent-style-name="Standard">
      <style:text-properties fo:color="#ffa500" loext:opacity="100%" style:font-name="Lexand" officeooo:rsid="0008e1c5" officeooo:paragraph-rsid="0008e1c5"/>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variant="normal" fo:text-transform="none" fo:font-style="normal" fo:font-weight="normal"/>
    </style:style>
    <style:style style:name="T6" style:family="text">
      <style:text-properties fo:font-variant="normal" fo:text-transform="none" fo:font-style="normal" fo:font-weight="normal" officeooo:rsid="0017c78e"/>
    </style:style>
    <style:style style:name="T7" style:family="text">
      <style:text-properties fo:font-style="normal" style:text-underline-style="solid" style:text-underline-width="auto" style:text-underline-color="font-color" fo:font-weight="normal" officeooo:rsid="00122837" style:font-style-asian="normal" style:font-style-complex="normal"/>
    </style:style>
    <style:style style:name="T8" style:family="text">
      <style:text-properties fo:font-style="italic" style:text-underline-style="none" fo:font-weight="normal" officeooo:rsid="00122837" style:font-style-asian="italic" style:font-style-complex="italic"/>
    </style:style>
    <style:style style:name="T9" style:family="text">
      <style:text-properties fo:font-style="normal" style:text-underline-style="none" fo:font-weight="normal" officeooo:rsid="00122837" style:font-style-asian="normal" style:font-style-complex="normal"/>
    </style:style>
    <style:style style:name="T10" style:family="text">
      <style:text-properties fo:font-style="italic" style:font-style-asian="italic" style:font-style-complex="italic"/>
    </style:style>
    <style:style style:name="T11" style:family="text">
      <style:text-properties officeooo:rsid="000a46c6"/>
    </style:style>
    <style:style style:name="T12" style:family="text">
      <style:text-properties fo:font-style="italic" officeooo:rsid="00125cea" style:font-style-asian="italic" style:font-style-complex="italic"/>
    </style:style>
    <style:style style:name="T13" style:family="text">
      <style:text-properties fo:font-style="italic" officeooo:rsid="0017c78e" style:font-style-asian="italic" style:font-style-complex="italic"/>
    </style:style>
    <style:style style:name="T14" style:family="text">
      <style:text-properties officeooo:rsid="0017c78e"/>
    </style:style>
    <style:style style:name="T15" style:family="text">
      <style:text-properties fo:font-style="normal" fo:font-weight="normal" officeooo:rsid="0017c78e" style:font-style-asian="normal" style:font-style-complex="normal"/>
    </style:style>
    <style:style style:name="T16" style:family="text">
      <style:text-properties style:font-name="Times New Roman" fo:font-size="12pt" fo:font-style="normal" fo:font-weight="normal" officeooo:rsid="003dbda2" style:font-size-asian="12pt" style:font-style-asian="normal" style:font-size-complex="12pt" style:font-style-complex="normal"/>
    </style:style>
    <style:style style:name="T17" style:family="text">
      <style:text-properties fo:color="#faebd7" loext:opacity="100%" style:font-name="Times New Roman" fo:font-size="12pt" fo:font-style="normal" style:text-underline-style="solid" style:text-underline-width="auto" style:text-underline-color="font-color" fo:font-weight="normal" officeooo:rsid="004909c5" style:font-size-asian="12pt" style:font-style-asian="normal" style:font-size-complex="12pt" style:font-style-complex="normal"/>
    </style:style>
    <style:style style:name="T18" style:family="text">
      <style:text-properties fo:color="#faebd7" loext:opacity="100%" style:font-name="Times New Roman" fo:font-size="12pt" fo:font-style="normal" style:text-underline-style="none" fo:font-weight="normal" officeooo:rsid="004909c5" style:font-size-asian="12pt" style:font-style-asian="normal" style:font-size-complex="12pt" style:font-style-complex="normal"/>
    </style:style>
    <style:style style:name="T19" style:family="text">
      <style:text-properties fo:color="#faebd7" loext:opacity="100%" style:font-name="Times New Roman" fo:font-size="12pt" fo:font-style="normal" style:text-underline-style="none" fo:font-weight="normal" officeooo:rsid="0049efe7" style:font-size-asian="12pt" style:font-style-asian="normal" style:font-size-complex="12pt" style:font-style-complex="normal"/>
    </style:style>
    <style:style style:name="T20" style:family="text">
      <style:text-properties fo:color="#faebd7" loext:opacity="100%" style:font-name="Times New Roman" fo:font-size="12pt" fo:font-style="normal" style:text-underline-style="none" fo:font-weight="normal" officeooo:rsid="004835ba" style:font-size-asian="12pt" style:font-style-asian="normal" style:font-size-complex="12pt" style:font-style-complex="normal"/>
    </style:style>
    <style:style style:name="T21" style:family="text">
      <style:text-properties fo:color="#faebd7" loext:opacity="100%" style:font-name="Times New Roman" fo:font-size="12pt" fo:font-style="normal" style:text-underline-style="solid" style:text-underline-width="auto" style:text-underline-color="font-color" fo:font-weight="normal" officeooo:rsid="00459b9c" style:font-size-asian="12pt" style:font-style-asian="normal" style:font-size-complex="12pt" style:font-style-complex="normal"/>
    </style:style>
    <style:style style:name="T22" style:family="text">
      <style:text-properties fo:color="#faebd7" loext:opacity="100%" style:font-name="Times New Roman" fo:font-size="12pt" fo:font-style="normal" style:text-underline-style="none" fo:font-weight="normal" officeooo:rsid="00459b9c" style:font-size-asian="12pt" style:font-style-asian="normal" style:font-size-complex="12pt" style:font-style-complex="normal"/>
    </style:style>
    <style:style style:name="T23" style:family="text">
      <style:text-properties fo:color="#faebd7" loext:opacity="100%" style:font-name="Times New Roman" fo:font-size="12pt" fo:font-style="normal" style:text-underline-style="none" fo:font-weight="normal" officeooo:rsid="00472cc3" style:font-size-asian="12pt" style:font-style-asian="normal" style:font-size-complex="12pt" style:font-style-complex="normal"/>
    </style:style>
    <style:style style:name="T24" style:family="text">
      <style:text-properties fo:color="#faebd7" loext:opacity="100%" style:font-name="Times New Roman" fo:font-size="12pt" fo:font-style="normal" style:text-underline-style="solid" style:text-underline-width="auto" style:text-underline-color="font-color" fo:font-weight="normal" officeooo:rsid="0049efe7" style:font-size-asian="12pt" style:font-style-asian="normal" style:font-size-complex="12pt" style:font-style-complex="normal"/>
    </style:style>
    <style:style style:name="T25" style:family="text">
      <style:text-properties fo:color="#faebd7" loext:opacity="100%" style:font-name="Times New Roman" fo:font-size="12pt" fo:font-style="normal" style:text-underline-style="none" fo:font-weight="normal" officeooo:rsid="004b0704" style:font-size-asian="12pt" style:font-style-asian="normal" style:font-size-complex="12pt" style:font-style-complex="normal"/>
    </style:style>
    <style:style style:name="T26" style:family="text">
      <style:text-properties fo:color="#faebd7" loext:opacity="100%" style:font-name="Times New Roman" fo:font-size="12pt" fo:font-style="italic" style:text-underline-style="solid" style:text-underline-width="auto" style:text-underline-color="font-color" fo:font-weight="normal" officeooo:rsid="004bbe4a" style:font-size-asian="12pt" style:font-style-asian="italic" style:font-size-complex="12pt" style:font-style-complex="italic"/>
    </style:style>
    <style:style style:name="T27" style:family="text">
      <style:text-properties fo:color="#faebd7" loext:opacity="100%" style:font-name="Times New Roman" fo:font-size="12pt" fo:font-style="normal" style:text-underline-style="solid" style:text-underline-width="auto" style:text-underline-color="font-color" fo:font-weight="normal" officeooo:rsid="004bbe4a" style:font-size-asian="12pt" style:font-style-asian="normal" style:font-size-complex="12pt" style:font-style-complex="normal"/>
    </style:style>
    <style:style style:name="T28" style:family="text">
      <style:text-properties fo:color="#faebd7" loext:opacity="100%" style:font-name="Times New Roman" fo:font-size="12pt" fo:font-style="normal" style:text-underline-style="none" fo:font-weight="normal" officeooo:rsid="004bbe4a" style:font-size-asian="12pt" style:font-style-asian="normal" style:font-size-complex="12pt" style:font-style-complex="normal"/>
    </style:style>
    <style:style style:name="T29" style:family="text">
      <style:text-properties fo:color="#faebd7" loext:opacity="100%" style:font-name="Times New Roman" fo:font-size="12pt" fo:font-style="normal" style:text-underline-style="none" fo:font-weight="normal" officeooo:rsid="003dbda2" style:font-size-asian="12pt" style:font-style-asian="normal" style:font-size-complex="12pt" style:font-style-complex="normal"/>
    </style:style>
    <style:style style:name="T30" style:family="text">
      <style:text-properties fo:color="#faebd7" loext:opacity="100%" style:font-name="Times New Roman" fo:font-size="12pt" fo:font-style="italic" style:text-underline-style="none" fo:font-weight="normal" officeooo:rsid="003dbda2" style:font-size-asian="12pt" style:font-style-asian="italic" style:font-size-complex="12pt" style:font-style-complex="italic"/>
    </style:style>
    <style:style style:name="T31" style:family="text">
      <style:text-properties fo:color="#faebd7" loext:opacity="100%" style:font-name="Times New Roman" fo:font-size="12pt" fo:font-style="italic" style:text-underline-style="none" fo:font-weight="normal" officeooo:rsid="004bbe4a" style:font-size-asian="12pt" style:font-style-asian="italic" style:font-size-complex="12pt" style:font-style-complex="italic"/>
    </style:style>
    <style:style style:name="T32" style:family="text">
      <style:text-properties fo:color="#faebd7" loext:opacity="100%" style:font-name="Times New Roman" fo:font-size="12pt" fo:font-style="normal" style:text-underline-style="none" fo:font-weight="normal" officeooo:rsid="004c1be2" style:font-size-asian="12pt" style:font-style-asian="normal" style:font-size-complex="12pt" style:font-style-complex="normal"/>
    </style:style>
    <style:style style:name="T33" style:family="text">
      <style:text-properties fo:color="#faebd7" loext:opacity="100%" style:font-name="Times New Roman" fo:font-size="12pt" fo:font-style="normal" style:text-underline-style="none" fo:font-weight="normal" officeooo:rsid="004ca7e5" style:font-size-asian="12pt" style:font-style-asian="normal" style:font-size-complex="12pt" style:font-style-complex="normal"/>
    </style:style>
    <style:style style:name="T34" style:family="text">
      <style:text-properties fo:color="#faebd7" loext:opacity="100%" style:font-name="Times New Roman" fo:font-size="12pt" fo:font-style="normal" style:text-underline-style="none" fo:font-weight="normal" officeooo:rsid="004d7cad" style:font-size-asian="12pt" style:font-style-asian="normal" style:font-size-complex="12pt" style:font-style-complex="normal"/>
    </style:style>
    <style:style style:name="T35" style:family="text">
      <style:text-properties fo:color="#faebd7" loext:opacity="100%" style:font-name="Times New Roman" fo:font-size="12pt" fo:font-style="normal" style:text-underline-style="none" fo:font-weight="normal" officeooo:rsid="0063a9c2" style:font-size-asian="12pt" style:font-style-asian="normal" style:font-size-complex="12pt" style:font-style-complex="normal"/>
    </style:style>
    <style:style style:name="T36" style:family="text">
      <style:text-properties fo:color="#faebd7" loext:opacity="100%" style:font-name="Times New Roman" fo:font-size="12pt" fo:font-style="normal" style:text-underline-style="none" fo:font-weight="normal" officeooo:rsid="004d91c3" style:font-size-asian="12pt" style:font-style-asian="normal" style:font-size-complex="12pt" style:font-style-complex="normal"/>
    </style:style>
    <style:style style:name="T37" style:family="text">
      <style:text-properties fo:color="#faebd7" loext:opacity="100%" style:font-name="Times New Roman" fo:font-size="12pt" fo:font-style="normal" style:text-underline-style="none" fo:font-weight="normal" officeooo:rsid="004ee147" style:font-size-asian="12pt" style:font-style-asian="normal" style:font-size-complex="12pt" style:font-style-complex="normal"/>
    </style:style>
    <style:style style:name="T38" style:family="text">
      <style:text-properties fo:color="#faebd7" loext:opacity="100%" style:font-name="Times New Roman" fo:font-size="12pt" fo:font-style="normal" style:text-underline-style="none" fo:font-weight="normal" officeooo:rsid="00532f03" style:font-size-asian="12pt" style:font-style-asian="normal" style:font-size-complex="12pt" style:font-style-complex="normal"/>
    </style:style>
    <style:style style:name="T39" style:family="text">
      <style:text-properties fo:color="#faebd7" loext:opacity="100%" style:font-name="Times New Roman" fo:font-size="12pt" fo:font-style="normal" style:text-underline-style="none" fo:font-weight="normal" officeooo:rsid="005092ec" style:font-size-asian="12pt" style:font-style-asian="normal" style:font-size-complex="12pt" style:font-style-complex="normal"/>
    </style:style>
    <style:style style:name="T40" style:family="text">
      <style:text-properties fo:color="#faebd7" loext:opacity="100%" style:font-name="Lexend" fo:font-size="12pt" fo:font-style="normal" style:text-underline-style="none" fo:font-weight="normal" officeooo:rsid="00459b9c" style:font-size-asian="12pt" style:font-style-asian="normal" style:font-size-complex="12pt" style:font-style-complex="normal"/>
    </style:style>
    <style:style style:name="T41" style:family="text">
      <style:text-properties fo:color="#ffa500" loext:opacity="100%" style:font-name="Lexand" fo:font-style="normal" fo:font-weight="normal" officeooo:rsid="0008e1c5" style:font-style-asian="normal" style:font-style-complex="normal"/>
    </style:style>
    <style:style style:name="T42" style:family="text">
      <style:text-properties fo:color="#0000cd" loext:opacity="100%" style:font-name="Lexand" fo:font-size="3pt" fo:font-style="normal" fo:font-weight="normal" officeooo:rsid="0008e1c5" style:font-size-asian="3pt" style:font-style-asian="normal" style:font-size-complex="3pt" style:font-style-complex="normal"/>
    </style:style>
    <style:style style:name="T43" style:family="text">
      <style:text-properties fo:color="#0000cd" loext:opacity="100%" style:font-name="Lexand" fo:font-size="3pt" fo:font-style="normal" fo:font-weight="normal" officeooo:rsid="001e4af9" style:font-size-asian="3pt" style:font-style-asian="normal" style:font-size-complex="3pt" style:font-style-complex="normal"/>
    </style:style>
    <style:style style:name="T44" style:family="text">
      <style:text-properties fo:color="#0000cd" loext:opacity="100%" style:font-name="Andale Mono" fo:font-size="3pt" fo:font-style="normal" fo:font-weight="normal" officeooo:rsid="001e4af9" style:font-size-asian="3pt" style:font-style-asian="normal" style:font-size-complex="3pt" style:font-style-complex="normal"/>
    </style:style>
    <style:style style:name="T45" style:family="text">
      <style:text-properties fo:color="#0000cd" loext:opacity="100%" style:font-name="Andale Mono" fo:font-size="3pt" fo:font-style="normal" fo:font-weight="normal" officeooo:rsid="002fe63f" style:font-size-asian="3pt" style:font-style-asian="normal" style:font-size-complex="3pt" style:font-style-complex="normal"/>
    </style:style>
    <style:style style:name="T46" style:family="text">
      <style:text-properties fo:color="#0000cd" loext:opacity="100%" style:font-name="Andale Mono" fo:font-size="3pt" fo:font-style="normal" fo:font-weight="normal" officeooo:rsid="001fc709" style:font-size-asian="3pt" style:font-style-asian="normal" style:font-size-complex="3pt" style:font-style-complex="normal"/>
    </style:style>
    <style:style style:name="T47" style:family="text">
      <style:text-properties fo:color="#0000cd" loext:opacity="100%" style:font-name="Andale Mono" fo:font-size="3pt" fo:font-style="normal" fo:font-weight="normal" officeooo:rsid="001fa17f" style:font-size-asian="3pt" style:font-style-asian="normal" style:font-size-complex="3pt" style:font-style-complex="normal"/>
    </style:style>
    <style:style style:name="T48" style:family="text">
      <style:text-properties fo:color="#0000cd" loext:opacity="100%" style:font-name="Andale Mono" fo:font-size="3pt" fo:font-style="normal" fo:font-weight="normal" officeooo:rsid="00210576" style:font-size-asian="3pt" style:font-style-asian="normal" style:font-size-complex="3pt" style:font-style-complex="normal"/>
    </style:style>
    <style:style style:name="T49" style:family="text">
      <style:text-properties fo:color="#0000cd" loext:opacity="100%" style:font-name="Andale Mono" fo:font-size="3pt" fo:font-style="normal" fo:font-weight="normal" officeooo:rsid="002078da" style:font-size-asian="3pt" style:font-style-asian="normal" style:font-size-complex="3pt" style:font-style-complex="normal"/>
    </style:style>
    <style:style style:name="T50" style:family="text">
      <style:text-properties fo:color="#0000cd" loext:opacity="100%" style:font-name="Andale Mono" fo:font-size="3pt" fo:font-style="normal" fo:font-weight="normal" officeooo:rsid="0022855c" style:font-size-asian="3pt" style:font-style-asian="normal" style:font-size-complex="3pt" style:font-style-complex="normal"/>
    </style:style>
    <style:style style:name="T51" style:family="text">
      <style:text-properties fo:color="#0000cd" loext:opacity="100%" style:font-name="Andale Mono" fo:font-size="3pt" fo:font-style="normal" fo:font-weight="normal" officeooo:rsid="0024119b" style:font-size-asian="3pt" style:font-style-asian="normal" style:font-size-complex="3pt" style:font-style-complex="normal"/>
    </style:style>
    <style:style style:name="T52" style:family="text">
      <style:text-properties fo:color="#0000cd" loext:opacity="100%" style:font-name="Andale Mono" fo:font-size="3pt" fo:font-style="normal" fo:font-weight="normal" officeooo:rsid="00249e49" style:font-size-asian="3pt" style:font-style-asian="normal" style:font-size-complex="3pt" style:font-style-complex="normal"/>
    </style:style>
    <style:style style:name="T53" style:family="text">
      <style:text-properties fo:color="#0000cd" loext:opacity="100%" style:font-name="Andale Mono" fo:font-size="3pt" fo:font-style="normal" fo:font-weight="normal" officeooo:rsid="00260077" style:font-size-asian="3pt" style:font-style-asian="normal" style:font-size-complex="3pt" style:font-style-complex="normal"/>
    </style:style>
    <style:style style:name="T54" style:family="text">
      <style:text-properties fo:color="#0000cd" loext:opacity="100%" style:font-name="Andale Mono" fo:font-size="3pt" fo:font-style="normal" fo:font-weight="normal" officeooo:rsid="00262853" style:font-size-asian="3pt" style:font-style-asian="normal" style:font-size-complex="3pt" style:font-style-complex="normal"/>
    </style:style>
    <style:style style:name="T55" style:family="text">
      <style:text-properties fo:color="#0000cd" loext:opacity="100%" style:font-name="Andale Mono" fo:font-size="3pt" fo:font-style="normal" fo:font-weight="normal" officeooo:rsid="0026aef2" style:font-size-asian="3pt" style:font-style-asian="normal" style:font-size-complex="3pt" style:font-style-complex="normal"/>
    </style:style>
    <style:style style:name="T56" style:family="text">
      <style:text-properties fo:color="#0000cd" loext:opacity="100%" style:font-name="Andale Mono" fo:font-size="3pt" fo:font-style="normal" fo:font-weight="normal" officeooo:rsid="0028709e" style:font-size-asian="3pt" style:font-style-asian="normal" style:font-size-complex="3pt" style:font-style-complex="normal"/>
    </style:style>
    <style:style style:name="T57" style:family="text">
      <style:text-properties fo:color="#0000cd" loext:opacity="100%" style:font-name="Andale Mono" fo:font-size="3pt" fo:font-style="normal" fo:font-weight="normal" officeooo:rsid="00297d76" style:font-size-asian="3pt" style:font-style-asian="normal" style:font-size-complex="3pt" style:font-style-complex="normal"/>
    </style:style>
    <style:style style:name="T58" style:family="text">
      <style:text-properties fo:color="#0000cd" loext:opacity="100%" style:font-name="Andale Mono" fo:font-size="3pt" fo:font-style="normal" fo:font-weight="normal" officeooo:rsid="0029dc21" style:font-size-asian="3pt" style:font-style-asian="normal" style:font-size-complex="3pt" style:font-style-complex="normal"/>
    </style:style>
    <style:style style:name="T59" style:family="text">
      <style:text-properties fo:color="#0000cd" loext:opacity="100%" style:font-name="Andale Mono" fo:font-size="3pt" fo:font-style="normal" fo:font-weight="normal" officeooo:rsid="0029873b" style:font-size-asian="3pt" style:font-style-asian="normal" style:font-size-complex="3pt" style:font-style-complex="normal"/>
    </style:style>
    <style:style style:name="T60" style:family="text">
      <style:text-properties fo:color="#0000cd" loext:opacity="100%" style:font-name="Andale Mono" fo:font-size="3pt" fo:font-style="normal" fo:font-weight="normal" officeooo:rsid="00299ac7" style:font-size-asian="3pt" style:font-style-asian="normal" style:font-size-complex="3pt" style:font-style-complex="normal"/>
    </style:style>
    <style:style style:name="T61" style:family="text">
      <style:text-properties fo:color="#0000cd" loext:opacity="100%" style:font-name="Andale Mono" fo:font-size="3pt" fo:font-style="normal" fo:font-weight="normal" officeooo:rsid="002d2873" style:font-size-asian="3pt" style:font-style-asian="normal" style:font-size-complex="3pt" style:font-style-complex="normal"/>
    </style:style>
    <style:style style:name="T62" style:family="text">
      <style:text-properties fo:color="#0000cd" loext:opacity="100%" style:font-name="Andale Mono" fo:font-size="3pt" fo:font-style="normal" fo:font-weight="normal" officeooo:rsid="002b436a" style:font-size-asian="3pt" style:font-style-asian="normal" style:font-size-complex="3pt" style:font-style-complex="normal"/>
    </style:style>
    <style:style style:name="T63" style:family="text">
      <style:text-properties fo:color="#faebd7" loext:opacity="100%" style:font-name="Times New Roman" fo:font-style="normal" style:text-underline-style="none" fo:font-weight="normal" officeooo:rsid="00539315" style:font-style-asian="normal" style:font-style-complex="normal"/>
    </style:style>
    <style:style style:name="T64" style:family="text">
      <style:text-properties fo:color="#faebd7" loext:opacity="100%" style:font-name="Times New Roman" fo:font-style="normal" style:text-underline-style="none" fo:font-weight="normal" officeooo:rsid="00542974" style:font-style-asian="normal" style:font-style-complex="normal"/>
    </style:style>
    <style:style style:name="T65" style:family="text">
      <style:text-properties fo:color="#faebd7" loext:opacity="100%" style:font-name="Times New Roman" fo:font-style="normal" style:text-underline-style="none" fo:font-weight="normal" officeooo:rsid="0056dc22" style:font-style-asian="normal" style:font-style-complex="normal"/>
    </style:style>
    <style:style style:name="T66" style:family="text">
      <style:text-properties fo:color="#faebd7" loext:opacity="100%" style:font-name="Times New Roman" fo:font-style="normal" style:text-underline-style="none" fo:font-weight="normal" officeooo:rsid="0057be5a" style:font-style-asian="normal" style:font-style-complex="normal"/>
    </style:style>
    <style:style style:name="T67" style:family="text">
      <style:text-properties fo:color="#faebd7" loext:opacity="100%" style:font-name="Times New Roman" fo:font-style="normal" style:text-underline-style="none" fo:font-weight="normal" officeooo:rsid="005e60ff" style:font-style-asian="normal" style:font-style-complex="normal"/>
    </style:style>
    <style:style style:name="T68" style:family="text">
      <style:text-properties fo:color="#faebd7" loext:opacity="100%" style:font-name="Times New Roman" fo:font-style="normal" style:text-underline-style="none" fo:font-weight="normal" officeooo:rsid="0055ae4e" style:font-style-asian="normal" style:font-style-complex="normal"/>
    </style:style>
    <style:style style:name="T69" style:family="text">
      <style:text-properties fo:color="#faebd7" loext:opacity="100%" style:font-name="Times New Roman" fo:font-style="normal" style:text-underline-style="none" fo:font-weight="normal" officeooo:rsid="0064da2c" style:font-style-asian="normal" style:font-style-complex="normal"/>
    </style:style>
    <style:style style:name="T70" style:family="text">
      <style:text-properties fo:color="#ffff00" loext:opacity="100%" style:font-name="Times New Roman" fo:font-style="normal" style:text-underline-style="none" fo:font-weight="normal" officeooo:rsid="00542974" style:font-style-asian="normal" style:font-style-complex="normal"/>
    </style:style>
    <style:style style:name="T71" style:family="text">
      <style:text-properties fo:color="#ffff00" loext:opacity="100%" style:font-name="Times New Roman" fo:font-style="normal" style:text-underline-style="none" fo:font-weight="normal" officeooo:rsid="0057be5a" style:font-style-asian="normal" style:font-style-complex="normal"/>
    </style:style>
    <style:style style:name="T72" style:family="text">
      <style:text-properties fo:color="#ffff00" loext:opacity="100%" style:font-name="Times New Roman" fo:font-style="normal" style:text-underline-style="none" fo:font-weight="normal" officeooo:rsid="0055ae4e" style:font-style-asian="normal" style:font-style-complex="normal"/>
    </style:style>
    <style:style style:name="T73" style:family="text">
      <style:text-properties fo:color="#ffff00" loext:opacity="100%" style:font-name="Times New Roman" fo:font-style="normal" style:text-underline-style="none" fo:font-weight="normal" officeooo:rsid="0063a9c2" style:font-style-asian="normal" style:font-style-complex="normal"/>
    </style:style>
    <style:style style:name="T74" style:family="text">
      <style:text-properties fo:color="#ffff00" loext:opacity="100%" style:font-name="Times New Roman" fo:font-style="normal" style:text-underline-style="none" fo:font-weight="normal" officeooo:rsid="0064da2c" style:font-style-asian="normal" style:font-style-complex="normal"/>
    </style:style>
    <style:style style:name="T75" style:family="text">
      <style:text-properties fo:color="#faebd7" loext:opacity="100%" style:font-name="Times New Roman" fo:font-style="normal" style:text-underline-style="none" fo:font-weight="normal" officeooo:rsid="0063a9c2" style:font-style-asian="normal" style:font-style-complex="normal"/>
    </style:style>
    <style:style style:name="T76" style:family="text">
      <style:text-properties fo:color="#faebd7" loext:opacity="100%" style:font-name="Times New Roman" fo:font-style="normal" style:text-underline-style="none" fo:font-weight="normal" officeooo:rsid="0059db7f" style:font-style-asian="normal" style:font-style-complex="normal"/>
    </style:style>
    <style:style style:name="T77" style:family="text">
      <style:text-properties fo:color="#faebd7" loext:opacity="100%" style:font-name="Times New Roman" fo:font-style="normal" style:text-underline-style="none" fo:font-weight="normal" officeooo:rsid="005928a7" style:font-style-asian="normal" style:font-style-complex="normal"/>
    </style:style>
    <style:style style:name="T78" style:family="text">
      <style:text-properties fo:color="#000080" loext:opacity="100%" style:font-name="Times New Roman" fo:font-style="normal" style:text-underline-style="solid" style:text-underline-width="auto" style:text-underline-color="font-color" fo:font-weight="normal" officeooo:rsid="0059db7f" style:font-style-asian="normal" style:font-style-complex="normal"/>
    </style:style>
    <style:style style:name="T79" style:family="text">
      <style:text-properties fo:color="#faebd7" loext:opacity="100%" style:font-name="Times New Roman" fo:font-style="normal" style:text-underline-style="none" fo:font-weight="normal" officeooo:rsid="007f91b7" style:font-style-asian="normal" style:font-style-complex="normal"/>
    </style:style>
    <style:style style:name="T80" style:family="text">
      <style:text-properties fo:color="#008000" loext:opacity="100%" style:font-name="Andale Mono" fo:font-size="12pt" fo:font-weight="normal" officeooo:rsid="002d2873" style:font-size-asian="12pt" style:font-size-complex="12pt"/>
    </style:style>
    <style:style style:name="T81" style:family="text">
      <style:text-properties fo:color="#008000" loext:opacity="100%" style:font-name="Andale Mono" fo:font-size="9pt" fo:font-weight="normal" officeooo:rsid="002d2873" style:font-size-asian="9pt" style:font-size-complex="9pt"/>
    </style:style>
    <style:style style:name="T82" style:family="text">
      <style:text-properties fo:font-size="12pt" fo:font-weight="normal" style:font-size-asian="12pt" style:font-size-complex="12pt"/>
    </style:style>
    <style:style style:name="T83" style:family="text">
      <style:text-properties fo:font-weight="normal"/>
    </style:style>
    <style:style style:name="T84" style:family="text">
      <style:text-properties officeooo:rsid="006686c2"/>
    </style:style>
    <style:style style:name="T85" style:family="text">
      <style:text-properties officeooo:rsid="00674a14"/>
    </style:style>
    <style:style style:name="T86" style:family="text">
      <style:text-properties officeooo:rsid="0069423b"/>
    </style:style>
    <style:style style:name="T87" style:family="text">
      <style:text-properties officeooo:rsid="0085b862"/>
    </style:style>
    <style:style style:name="T88" style:family="text">
      <style:text-properties officeooo:rsid="005fabaa"/>
    </style:style>
    <style:style style:name="T89" style:family="text">
      <style:text-properties officeooo:rsid="006b3a71"/>
    </style:style>
    <style:style style:name="T90" style:family="text">
      <style:text-properties officeooo:rsid="006f076c"/>
    </style:style>
    <style:style style:name="T91" style:family="text">
      <style:text-properties officeooo:rsid="006c6eae"/>
    </style:style>
    <style:style style:name="T92" style:family="text">
      <style:text-properties officeooo:rsid="006d6f59"/>
    </style:style>
    <style:style style:name="T93" style:family="text">
      <style:text-properties officeooo:rsid="006f0c81"/>
    </style:style>
    <style:style style:name="T94" style:family="text">
      <style:text-properties fo:font-size="9pt" fo:font-weight="normal" style:font-size-asian="9pt" style:font-size-complex="9pt"/>
    </style:style>
    <style:style style:name="T95" style:family="text">
      <style:text-properties fo:color="#faebd7" loext:opacity="100%" style:font-name="Times New Roman" fo:font-style="normal" style:text-underline-style="none" fo:font-weight="normal" officeooo:rsid="00674a14" style:font-style-asian="normal" style:font-style-complex="normal"/>
    </style:style>
    <style:style style:name="T96" style:family="text">
      <style:text-properties officeooo:rsid="006fa2cc"/>
    </style:style>
    <style:style style:name="T97" style:family="text">
      <style:text-properties fo:font-style="italic" officeooo:rsid="006fa2cc" style:font-style-asian="italic" style:font-style-complex="italic"/>
    </style:style>
    <style:style style:name="T98" style:family="text">
      <style:text-properties officeooo:rsid="00705f89"/>
    </style:style>
    <style:style style:name="T99" style:family="text">
      <style:text-properties officeooo:rsid="0071b504"/>
    </style:style>
    <style:style style:name="T100" style:family="text">
      <style:text-properties officeooo:rsid="00722684"/>
    </style:style>
    <style:style style:name="T101" style:family="text">
      <style:text-properties officeooo:rsid="007381f3"/>
    </style:style>
    <style:style style:name="T102" style:family="text">
      <style:text-properties officeooo:rsid="007f91b7"/>
    </style:style>
    <style:style style:name="T103" style:family="text">
      <style:text-properties officeooo:rsid="0073c159"/>
    </style:style>
    <style:style style:name="T104" style:family="text">
      <style:text-properties fo:font-style="italic" officeooo:rsid="0073c159" style:font-style-asian="italic" style:font-style-complex="italic"/>
    </style:style>
    <style:style style:name="T105" style:family="text">
      <style:text-properties fo:font-style="italic" officeooo:rsid="007f91b7" style:font-style-asian="italic" style:font-style-complex="italic"/>
    </style:style>
    <style:style style:name="T106" style:family="text">
      <style:text-properties fo:font-size="9pt" style:font-size-asian="9pt" style:font-size-complex="9pt"/>
    </style:style>
    <style:style style:name="T107" style:family="text">
      <style:text-properties fo:color="#ffff00" loext:opacity="100%"/>
    </style:style>
    <style:style style:name="T108" style:family="text">
      <style:text-properties fo:color="#ffff00" loext:opacity="100%" officeooo:rsid="0074a815"/>
    </style:style>
    <style:style style:name="T109" style:family="text">
      <style:text-properties officeooo:rsid="0074a815"/>
    </style:style>
    <style:style style:name="T110" style:family="text">
      <style:text-properties style:font-name="Times New Roman" fo:font-size="12pt" fo:font-style="normal" style:text-underline-style="none" fo:font-weight="normal" officeooo:rsid="0075f331" style:font-size-asian="12pt" style:font-style-asian="normal" style:font-size-complex="12pt" style:font-style-complex="normal"/>
    </style:style>
    <style:style style:name="T111" style:family="text">
      <style:text-properties style:font-name="Times New Roman" fo:font-size="12pt" fo:font-style="normal" style:text-underline-style="none" fo:font-weight="normal" officeooo:rsid="007707aa" style:font-size-asian="12pt" style:font-style-asian="normal" style:font-size-complex="12pt" style:font-style-complex="normal"/>
    </style:style>
    <style:style style:name="T112" style:family="text">
      <style:text-properties style:font-name="Times New Roman" fo:font-size="12pt" fo:font-style="normal" style:text-underline-style="none" fo:font-weight="normal" officeooo:rsid="00781b80" style:font-size-asian="12pt" style:font-style-asian="normal" style:font-size-complex="12pt" style:font-style-complex="normal"/>
    </style:style>
    <style:style style:name="T113" style:family="text">
      <style:text-properties style:font-name="Times New Roman" fo:font-size="12pt" fo:font-style="normal" style:text-underline-style="none" fo:font-weight="normal" officeooo:rsid="0078da0c" style:font-size-asian="12pt" style:font-style-asian="normal" style:font-size-complex="12pt" style:font-style-complex="normal"/>
    </style:style>
    <style:style style:name="T114" style:family="text">
      <style:text-properties officeooo:rsid="007a9265"/>
    </style:style>
    <style:style style:name="T115" style:family="text">
      <style:text-properties fo:font-style="italic" officeooo:rsid="007a9265" style:font-style-asian="italic" style:font-style-complex="italic"/>
    </style:style>
    <style:style style:name="T116" style:family="text">
      <style:text-properties officeooo:rsid="007c79c3"/>
    </style:style>
    <style:style style:name="T117" style:family="text">
      <style:text-properties fo:color="#ffa500" loext:opacity="100%" officeooo:rsid="00122837"/>
    </style:style>
    <style:style style:name="T118" style:family="text">
      <style:text-properties fo:color="#ffa500" loext:opacity="100%"/>
    </style:style>
    <style:style style:name="T119" style:family="text">
      <style:text-properties fo:color="#0000cd" loext:opacity="100%" style:font-name="Andale Mono" fo:font-size="5pt" officeooo:rsid="0034f312" style:font-size-asian="5pt" style:font-size-complex="5pt"/>
    </style:style>
    <style:style style:name="T120" style:family="text">
      <style:text-properties fo:color="#0000cd" loext:opacity="100%" style:font-name="Andale Mono" fo:font-size="5pt" officeooo:rsid="0036343c" style:font-size-asian="5pt" style:font-size-complex="5pt"/>
    </style:style>
    <style:style style:name="T121" style:family="text">
      <style:text-properties fo:color="#0000cd" loext:opacity="100%" style:font-name="Andale Mono" fo:font-size="5pt" officeooo:rsid="00376c32" style:font-size-asian="5pt" style:font-size-complex="5pt"/>
    </style:style>
    <style:style style:name="T122" style:family="text">
      <style:text-properties fo:color="#0000cd" loext:opacity="100%" style:font-name="Andale Mono" fo:font-size="5pt" officeooo:rsid="00386323" style:font-size-asian="5pt" style:font-size-complex="5pt"/>
    </style:style>
    <style:style style:name="T123" style:family="text">
      <style:text-properties fo:color="#0000cd" loext:opacity="100%" style:font-name="Andale Mono" officeooo:rsid="00386323"/>
    </style:style>
    <style:style style:name="T124" style:family="text">
      <style:text-properties officeooo:rsid="007cdf5f"/>
    </style:style>
    <style:style style:name="T125" style:family="text">
      <style:text-properties style:font-name="Times New Roman" fo:font-size="12pt" fo:font-style="normal" style:text-underline-style="none" officeooo:rsid="007c79c3" style:font-size-asian="12pt" style:font-style-asian="normal" style:font-size-complex="12pt" style:font-style-complex="normal"/>
    </style:style>
    <style:style style:name="T126" style:family="text">
      <style:text-properties fo:color="#008000" loext:opacity="100%" officeooo:rsid="0039d8da"/>
    </style:style>
    <style:style style:name="T127" style:family="text">
      <style:text-properties fo:color="#008000" loext:opacity="100%" officeooo:rsid="003bd54c"/>
    </style:style>
    <style:style style:name="T128" style:family="text">
      <style:text-properties fo:color="#008000" loext:opacity="100%" officeooo:rsid="007cdf5f"/>
    </style:style>
    <style:style style:name="T129" style:family="text">
      <style:text-properties officeooo:rsid="004909c5"/>
    </style:style>
    <style:style style:name="T130" style:family="text">
      <style:text-properties officeooo:rsid="004b0704"/>
    </style:style>
    <style:style style:name="T131" style:family="text">
      <style:text-properties officeooo:rsid="005e60f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2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4925in" fo:text-indent="-0.25in" fo:margin-left="3.492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line-break/><text:line-break/>An introduction chapter, with the </text:span><text:span text:style-name="T2">contextualization</text:span><text:span text:style-name="T1"> of the topic, identification of the </text:span><text:span text:style-name="T2">problem</text:span><text:span text:style-name="T1">, and </text:span><text:span text:style-name="T2">research questions</text:span><text:span text:style-name="T1">;</text:span><text:line-break/><text:tab/><text:span text:style-name="T3">Contextualization:</text:span></text:p>
      <text:p text:style-name="P2"><text:span text:style-name="T4">Music Information Retrival (MIR</text:span>)<text:span text:style-name="T5">: </text:span><text:span text:style-name="T6">r</text:span>esearch field that focuses on developing computational methods to analyze, interpret and retrieve information from music and audio.</text:p>
      <text:p text:style-name="P3"><text:span text:style-name="T4">Beat Tracking (BT)</text:span>: is a field within MIR that aims to computationally detect and follow the temporal positions of beats in music.<text:line-break/><text:span text:style-name="T7">Beat Tracking is a complex computational task</text:span><text:span text:style-name="T8"> </text:span><text:span text:style-name="T9">why?<text:line-break/></text:span></text:p>
      <text:list xml:id="list2567424613" text:style-name="L1">
        <text:list-item>
          <text:list>
            <text:list-item>
              <text:list>
                <text:list-item>
                  <text:list>
                    <text:list-item>
                      <text:list>
                        <text:list-item>
                          <text:list>
                            <text:list-item>
                              <text:list>
                                <text:list-item>
                                  <text:p text:style-name="P4">“<text:span text:style-name="T10">Many MIR systems first analyze the beats as the starting point, assume the results would be correct, and use them as a unit for further processing.</text:span>” K. Yamamoto [<text:span text:style-name="T11">HIL Paper</text:span>]</text:p>
                                </text:list-item>
                                <text:list-item>
                                  <text:p text:style-name="P4">Beat definition can be context based and differ from person to person.</text:p>
                                </text:list-item>
                                <text:list-item>
                                  <text:p text:style-name="P4">Beat can vary along a musical piece.</text:p>
                                </text:list-item>
                                <text:list-item>
                                  <text:p text:style-name="P5">Beat Analysis is the basis for many MIR algorithms.</text:p>
                                </text:list-item>
                              </text:list>
                            </text:list-item>
                          </text:list>
                        </text:list-item>
                      </text:list>
                    </text:list-item>
                  </text:list>
                </text:list-item>
              </text:list>
            </text:list-item>
          </text:list>
        </text:list-item>
      </text:list>
      <text:p text:style-name="P6">“<text:span text:style-name="T12">Although current SoTA BT methods, predominantly based on neural networks (CNNs, TCNs, Transformers) </text:span><text:span text:style-name="T13">can achieve excellent performance on steady 4/4 rhythms with percussive instruments, they struggle with expressive music, complex meters and non percussive textures. often achieving accuracy below 0.5. These limitations stem from dependence on large annotated datasets and poor generalization to unseen musical complexities.”</text:span><text:span text:style-name="T14"> [Thesis Proposal]</text:span></text:p>
      <text:p text:style-name="P7"><text:span text:style-name="T15"><text:line-break/></text:span><text:span text:style-name="T16">Music Information Retrieval (MIR) is a research field that aims to develop computational methods to analyze, interpret and retrieve music information from audio. <text:s/>One of the most relevant areas of study within MIR is Beat Tracking (BT) that aims to retrieve musical Beat information <text:s/>from a music recording or audio file. This may include: </text:span></text:p>
      <text:list text:style-name="L2">
        <text:list-item>
          <text:p text:style-name="P8">BPM of the audio</text:p>
        </text:list-item>
        <text:list-item>
          <text:p text:style-name="P9">Beats position</text:p>
        </text:list-item>
        <text:list-item>
          <text:p text:style-name="P10">Time signature detection</text:p>
        </text:list-item>
        <text:list-item>
          <text:p text:style-name="P10">Measure count.</text:p>
        </text:list-item>
      </text:list>
      <text:p text:style-name="P11">In order to understand Beat Tracking, we first need to define it’s musical related terms: </text:p>
      <text:list text:style-name="L3">
        <text:list-header>
          <text:p text:style-name="P12"><text:span text:style-name="T17">Rhythm</text:span><text:span text:style-name="T18">: “Often refers to the organization of events in time, such that they combine perceptually into groups or induce a sense of meter. In this sense, </text:span><text:span text:style-name="T19">rhythm is not a objective property of music, it is an experience that has both objective and subjective components. The experience of rhythm arises from the interaction of various materials of music – pitch, intensity, timbre and so forth – within the individual listener.” </text:span><text:span text:style-name="T20">[1]</text:span></text:p>
          <text:p text:style-name="P12"><text:span text:style-name="T21">Beat:</text:span><text:span text:style-name="T22"> “… a series of perceived pulses marking su</text:span><text:span text:style-name="T23">b</text:span><text:span text:style-name="T22">jectively equal units </text:span><text:span text:style-name="T23">in temporal continuum. Although the sense of beat is generally established, and supported by objectively occurring musical events, beat is a subjective experience. Once a sense of beat has been established, it continues in the mind of the listener, even after the supporting stimulus ceased. The experience of beat is necessary for the experience of meter. The term “tempo” refers to a rate (beats per unit time) </text:span><text:span text:style-name="T20">at wich beats occour.” [1]</text:span></text:p>
          <text:p text:style-name="P13"><text:span text:style-name="T24">Meter:</text:span><text:span text:style-name="T19"> “as it is traditionally defined, refers to the measurement of the number of beats between more or less regularly recurring accents. (…) in order for met</text:span><text:span text:style-name="T25">er to exist, the listener must feel some beats to be accented relative to others. Accented beats are called “strong”, while unaccented beats are called “weak”. [1]</text:span></text:p>
          <text:p text:style-name="P13"><text:span text:style-name="T25"><text:line-break/></text:span><text:span text:style-name="T26">Tactus</text:span><text:span text:style-name="T27">:</text:span><text:span text:style-name="T28"> It is the human natural feel for beat. It can be characterized by the level at which the listener “taps their foot” to music.<text:line-break/></text:span></text:p>
        </text:list-header>
      </text:list>
      <text:p text:style-name="P14"><text:span text:style-name="T29">Beat Tracking is a fundamental pillar </text:span><text:span text:style-name="T25">for</text:span><text:span text:style-name="T29"> MIR because it forms the basis for a lot of MIR </text:span><text:span text:style-name="T25">computational models: </text:span><text:span text:style-name="T29">“</text:span><text:span text:style-name="T30">Many MIR systems first analyze the beats as the starting point, assume the results would be correct, and use them as a unit for further processing.</text:span><text:span text:style-name="T29">” </text:span><text:span text:style-name="T25">[2] . Now we can understand the complexity and importance that BT represents in MIR due to the fact that:</text:span></text:p>
      <text:list text:style-name="L4">
        <text:list-item>
          <text:p text:style-name="P15"><text:span text:style-name="T25">Musical beat </text:span><text:span text:style-name="T28">can fluctuate and change along a musical recording. </text:span></text:p>
        </text:list-item>
        <text:list-item>
          <text:p text:style-name="P15"><text:span text:style-name="T28">The </text:span><text:span text:style-name="T31">tactus</text:span><text:span text:style-name="T28"> <text:s/>(beat feel) can be differ from individuals: “...several musicians may judge the beat rate to belong to unequal levels of the pulse hierarchy: for example, one might tap twice or three times faster than the other. Yet, both will internalize musical meter in a comparable way, and thus will remain able to play together.” [3]</text:span></text:p>
        </text:list-item>
        <text:list-item>
          <text:p text:style-name="P16">Beat can vary along a musical piece. Measures can change their time signatures, strong and weak beats can also be music specific, or specific for a certain genre, piece, musician etc. </text:p>
        </text:list-item>
      </text:list>
      <text:p text:style-name="P17"><text:span text:style-name="T32">Alt</text:span><text:span text:style-name="T33">hough BT algorithms already work well enough for music with steady and predictable tempo (such as Pop music)</text:span><text:span text:style-name="T34">, there is still significant progress to be made when it comes to music in which the beat may vary or with complex rhythms[4], this includes Classical, Jazz, World music and more generally speaking, music that is “acoustically” performed, highly expressive </text:span><text:span text:style-name="T35">or rhythmically complex or unconventional</text:span><text:span text:style-name="T34"> music. In these cases, even SoTA BT autonomous algorithms still perform poorly </text:span><text:span text:style-name="T36">[2]</text:span><text:span text:style-name="T34">. <text:s/></text:span><text:span text:style-name="T36">Even though BT is a field that is growing fast, there is still a long way to go for achieving a reliable autonomous BT algorithm that can consistently perform </text:span><text:span text:style-name="T35">reliably (&gt;0.9 F1 Measure)</text:span><text:span text:style-name="T36">. </text:span><text:span text:style-name="T35">H</text:span><text:span text:style-name="T36">uman made beat tracking still is the most reliable way to access these cases. That being said, it is </text:span><text:span text:style-name="T37">important to note that although a lot of effort is being put for </text:span><text:span text:style-name="T38">researching and developing</text:span><text:span text:style-name="T37"> autonomous BT solutions, the same is not being done to the same degree, for human made Beat Tracking t</text:span><text:span text:style-name="T39">echnology</text:span><text:span text:style-name="T37">. Software such as Audacity and Sonic Visualizer allow for beat tracking of audio files, yet the process is still very much made “beat-to-beat” where users either have to introduce and adjust beats one by one, or at least verify that a SoTA BT prediction </text:span><text:span text:style-name="T39">is </text:span><text:span text:style-name="T37">correct from end-to-end. Besides this, most software that allows for BT, is either outdated for this task or at the very least, not optimized for </text:span><text:span text:style-name="T38">it</text:span><text:span text:style-name="T37">.<text:line-break/><text:tab/></text:span><text:span text:style-name="T40"><text:tab/></text:span></text:p>
      <text:p text:style-name="P18"><text:tab/><text:tab/></text:p>
      <text:p text:style-name="P19">Identification of the problem:</text:p>
      <text:p text:style-name="P20"><text:span text:style-name="T41"><text:line-break/></text:span><text:span text:style-name="T42">“</text:span><text:span text:style-name="T43">Lets work on the</text:span><text:span text:style-name="T44"> def</text:span><text:span text:style-name="T45">i</text:span><text:span text:style-name="T44">nition/Identification of the problem. <text:line-break/><text:tab/><text:line-break/>First things first, my supervisor told me to shit on the collaborative features for the UI. </text:span><text:span text:style-name="T46">Also My work is on Beat Annotation UI, I need to focus on how to in some way improve the UI/UX of current programs used for Beat Annotation (such as Audacity but mostly Sonic Visualizer which is the most important for Beat Annotation). Therefore I do not need to go in depth about BT algorithms, because although related and relevant to the field, my work is not about algorithms, I shall integrate SoTA BT algorithms on my GUI program, but that’s it.</text:span><text:span text:style-name="T44"><text:line-break/>It is clear that Sonic Visualizer (SV) is the go-to </text:span><text:span text:style-name="T47">software</text:span><text:span text:style-name="T44"> for </text:span><text:span text:style-name="T47">various</text:span><text:span text:style-name="T44"> MIR tasks, including Beat Annotation. Although SV is regarded as the best audio analysis and visualization tool, with very powerful and detailed visualization tools, </text:span><text:span text:style-name="T47">labeling features and the myriad of features SV provides and the plus of being completely open source. However, for Beat Annotation task SV is UI/UX wise (in my opinion) outdated because: <text:line-break/><text:line-break/><text:tab/>1 – No integration of SoTA Beat Tracking algorithms (SV is compatible with VAMP plugins, but none of the SoTA BT algorithms redly available as VAMP plugins) so for the most part Beat annotators stick with old VAMP plugins like BeatRoot that are outdated by like ta least 15years (in my opinion). </text:span><text:span text:style-name="T48">Even if a user knows how to get and run a SoTA BT, it will most likely lead into a user specific solution that most likely requires him to use software/compile the BT prediction outside of SV and then Import the annotation to SV via .txt file.</text:span><text:span text:style-name="T47"> <text:line-break/><text:tab/>2- Even the process of Manual Beat Annotation is outdated </text:span><text:span text:style-name="T46">(stated by me)</text:span><text:span text:style-name="T47">. Manual Beat Annotation is based on going beat by beat, either marking on the fly while tapping ‘Shift+,’ although seems ok at first, there are a few problems </text:span><text:span text:style-name="T46">with this. <text:line-break/> First, </text:span><text:span text:style-name="T49">tapping along although helpful, it is not enough to do the most accurate Beat Annotations. “The 40ms Perception Limit”, “Motor Noise and Jitter”, “Latency”, “Preceding or Lagging”, “Reaction Time and Lags” </text:span><text:span text:style-name="T48">and others very well described and studied by J. Driedger on his paper “TOWARDS AUTOMATICALLY CORRECTING TAPPED BEAT ANNOTATIONS FOR MUSIC RECORDINGS”. So this will inevitably lead into manual adjusting and alignment of the tapped beat with the actual onset or moment the beat is defined. <text:line-break/> Another thing that makes the process of beat tracking </text:span><text:span text:style-name="T50">time consuming is the fact that in SV every individual Beat has to be individually introduced </text:span><text:span text:style-name="T51">and</text:span><text:span text:style-name="T50"> adjusted.<text:line-break/> </text:span><text:span text:style-name="T51">Something I believe could be beneficial, is the ability to introduce in a given segment of audio a specific time signature and/or steady bpm and instantly introduce the time instants that are in that time interval: Ex. </text:span><text:span text:style-name="T52">The user makes</text:span><text:span text:style-name="T51"> a selection starting at 00:30 and ending at 01:00, and </text:span><text:span text:style-name="T52">he </text:span><text:span text:style-name="T51">set</text:span><text:span text:style-name="T52">s</text:span><text:span text:style-name="T51"> the bpm of that section to be 60bpm with a 5/4 time signature. This would create 30 time-instances evenly spaced </text:span><text:span text:style-name="T52">starting at 00:30</text:span><text:span text:style-name="T51"> with downbeat, beat and the respective 6 compasses </text:span><text:span text:style-name="T52">correctly </text:span><text:span text:style-name="T51">accessed. </text:span><text:span text:style-name="T52">This could also enable the user to compare this steady bpm with an overlayed time instances of a Beat Tracking algorithm assessment. If the Beat Track prediction is for example Double-Time/Half-Time, the user could</text:span><text:span text:style-name="T53"> </text:span><text:span text:style-name="T52">correct the BT assessment, and </text:span><text:span text:style-name="T53">do something like:</text:span><text:span text:style-name="T52"> “Keep the Beat Tracked beats that are closest to the bpm I set”. This would introduce: a way of inputing </text:span><text:span text:style-name="T53">or correcting </text:span><text:span text:style-name="T52">lots of time instances quickly, the ability to easily </text:span><text:span text:style-name="T53">correct one of the most common Beat Tracking errors the integer multiplier/division of beats (half-time, double-time, triplet-time detection etc).<text:line-break/> 3- <text:s/>Importance and novelty of Audio-to-Score alignment in the context of Beat Annotation and Beat Tracking. Beat Annotation for a musical piece with no score or musical sheet can be prone to a person’s bias, </text:span><text:span text:style-name="T54">ex. what one person might consider a ¾ another person might consider-it to be a 6/8 (If you find a more relevant example say, this example just came up on my mind). However, if a musical piece has a traditional western style score (and the performer does not stray away from the written score), beats can be accurately and unarguably assessed. </text:span><text:span text:style-name="T55">O</text:span><text:span text:style-name="T54">ne just needs to </text:span><text:span text:style-name="T55">follow along the score with the recording, and set the beat annotations with the onsets that correspond to each beat on score. <text:line-break/> Now my supervisor, who is an expert on Beat Annotation System</text:span><text:span text:style-name="T56">s</text:span><text:span text:style-name="T55"> and Beat Tracking</text:span><text:span text:style-name="T54"> </text:span><text:span text:style-name="T55">(), believes that there is little to no research made on the correlation between Audio-to-Score </text:span><text:span text:style-name="T56">al</text:span><text:span text:style-name="T55">i</text:span><text:span text:style-name="T56">g</text:span><text:span text:style-name="T55">nment, with </text:span><text:span text:style-name="T56">a spectrogram view of audio and how this can be quite beneficial for BT and MIR fields.<text:line-break/> Piano Precision, is the closest attempt of this, although it has a clear focus on Score to Audio follow-along (not BT). The truth is that for Piano pieces it is quite impressively accurate. Although it is not accurate enough for Beat Tracking, it is accurate for the act of following a score along a recording, even if the </text:span><text:span text:style-name="T57">beat/tempo</text:span><text:span text:style-name="T56"> of the performance is extremely </text:span><text:span text:style-name="T57">uncertain, fluctuating or complex, Piano Precision wil</text:span><text:span text:style-name="T58">l</text:span><text:span text:style-name="T57"> follow along the score accurately for it’s purpose. This happens because Piano Precision analyzes the onsets of the recording and compares each to a given event on the score. I’m probably oversimplifying the process of alignment. But my point (and my supervisor’s point), is that Piano Precision has all the data and processing capabilities already embedded in it to make close to accurate Beat Annotations </text:span><text:span text:style-name="T59">of otherwise difficult for even modern SoTA BT algorithms to beat track.<text:line-break/> Using Piano Precision as a basis for Beat Tracking western </text:span><text:span text:style-name="T60">score written</text:span><text:span text:style-name="T59"> piano solo </text:span><text:span text:style-name="T60">music, I’m certain will be a way of accurately beat track a huge catalog of recordings as close to accurately one can get with autonomous beat tracking.<text:line-break/> Now the reason why Score-to-Audio (or lets say Score-to-Spectogram) alignment can be a helpful tool for beat annotation, is that, it can prove helpful for annotating beat for any given composition with score. Orchestral, choral, ensemble, solo, duo, trio etc music with any given instrument. If we are beat tracking a recording that follows a western style score, </text:span><text:span text:style-name="T58">we’ll on the one hand, improving the UX of many beat annotators that already would be trying to follow along a recording with it’s corresponding score probably with a printed score and with their Beat Annotation software of choice open at the same time, or following along the score on a secondary display or having to split-screen a single monitor all the while annotating the beat, most likely by tapping along the recording (which we already established is a flawed and ineffective way to make an accurate beat track as Jonathan Driedger, Hendrik Schreiber, W. Bas de Haas, and Meinard Müller state). With this, I believe it is quite apparent why having a </text:span><text:span text:style-name="T61">s</text:span><text:span text:style-name="T58">ystem that </text:span><text:span text:style-name="T62">aligns</text:span><text:span text:style-name="T58"> score with the playback of a recording can be at the very least benefit a lot of beat annotators aiding them to make beat alignments not only more accurat</text:span><text:span text:style-name="T62">ely</text:span><text:span text:style-name="T58">, but also more </text:span><text:span text:style-name="T62">efficiently and faster.</text:span><text:span text:style-name="T59"><text:line-break/> 4- I also believe (and I’m certain my supervisor agrees) that Spetogram usage for beat annotation is crucial and often undermined. The reason being, although clas</text:span><text:span text:style-name="T62">s</text:span><text:span text:style-name="T59">ic waveform </text:span><text:span text:style-name="T62">can show energy and transient information accurately, the same does not apply for note, melodic and interpretive visual data. So while waveform beat tracking for music with heavy transient or percussive elements might help, the same does not happen if the music in question does not have these elements. </text:span><text:span text:style-name="T61">T</text:span><text:span text:style-name="T62">ake string ensembles for example,</text:span><text:span text:style-name="T61"> because of their timbre nature, with slow and/or, sustain characteristics, legatto, vibratto and variable release nature, it becomes evident why having only waveform view can be misleading for performance analysis. <text:line-break/> 5 – Lastly although there are various softwares/programs that enables beat annotation (ex. SV and Audacity), there is (at least for my current knowledge) no single open-source (or commercial) program available design solely for beat annotation/Beat tracking.”</text:span></text:p>
      <text:p text:style-name="P21"/>
      <text:p text:style-name="P22">1. Lack of Dedicated Beat Annotation Software</text:p>
      <text:p text:style-name="P23">There is currently no software—open-source or commercial—designed specifically for beat annotation. Existing tools (e.g., Sonic Visualiser, Audacity) treat beat annotation as a secondary feature rather than a primary design goal, resulting in workflows that are inefficient and poorly adapted to the task.</text:p>
      <text:p text:style-name="P23"/>
      <text:p text:style-name="P24"><text:span text:style-name="T63">Although Beat Tracking </text:span><text:span text:style-name="T64">is a research file</text:span><text:span text:style-name="T65">d that can go as far back as</text:span><text:span text:style-name="T66"> </text:span><text:span text:style-name="T65">199</text:span><text:span text:style-name="T66">5 at least </text:span><text:span text:style-name="T67">[8],</text:span><text:span text:style-name="T68"> </text:span><text:span text:style-name="T67">t</text:span><text:span text:style-name="T64">he tools being used for this task stayed largely the same for a years. </text:span><text:span text:style-name="T67">N</text:span><text:span text:style-name="T64">ot only that, software that allows for Beat Tracking, such as Audacity and Sonic Visualizer (SV) are programs that are designed for a multitude of other </text:span><text:span text:style-name="T69">audio related</text:span><text:span text:style-name="T64"> tasks. When it comes to Beat Tracking optimized software, there are few options </text:span><text:span text:style-name="T67">if none</text:span><text:span text:style-name="T64">. </text:span><text:span text:style-name="T70">In 2023 Yamamoto propose</text:span><text:span text:style-name="T71">d</text:span><text:span text:style-name="T70"> a H</text:span><text:span text:style-name="T71">uman-</text:span><text:span text:style-name="T70">I</text:span><text:span text:style-name="T71">n-the-</text:span><text:span text:style-name="T70">L</text:span><text:span text:style-name="T71">oop approach for</text:span><text:span text:style-name="T70"> BT </text:span><text:span text:style-name="T72">[2], the problem is, </text:span><text:span text:style-name="T71">although this paper seems promising,</text:span><text:span text:style-name="T72"> the software developed for this paper is close</text:span><text:span text:style-name="T73">d-</text:span><text:span text:style-name="T72">source</text:span><text:span text:style-name="T71">d,</text:span><text:span text:style-name="T72"> property of Yamaha Corp. </text:span><text:span text:style-name="T74">and thus, it is not likely to be publicly accessible. </text:span><text:span text:style-name="T68"><text:line-break/><text:line-break/></text:span><text:span text:style-name="T75">There are </text:span><text:span text:style-name="T65">lots of </text:span><text:span text:style-name="T66">software </text:span><text:span text:style-name="T76">for </text:span><text:span text:style-name="T65">all sorts of MIR tasks. </text:span><text:span text:style-name="T77">Due to it´s open source nature, SV has enabled a lot of different MIR task specific software to be developed </text:span><text:span text:style-name="T67">such as </text:span><text:a xlink:type="simple" xlink:href="https://github.com/yucongj/piano-precision" text:style-name="Internet_20_link" text:visited-style-name="Visited_20_Internet_20_Link"><text:span text:style-name="T78">Piano Precision</text:span></text:a><text:span text:style-name="T76"> [7]: for score to audio “follow along”. </text:span><text:span text:style-name="T77">T</text:span><text:span text:style-name="T66">here have been attempts to make web-based technology for enabling active listening and collaboration on</text:span><text:span text:style-name="T76"> various</text:span><text:span text:style-name="T66"> MIR </text:span><text:span text:style-name="T67">tasks</text:span><text:span text:style-name="T66">, examples include Songle </text:span><text:span text:style-name="T76">(2011) </text:span><text:span text:style-name="T77">[5]</text:span><text:span text:style-name="T66"> and Dezran</text:span><text:span text:style-name="T77">n </text:span><text:span text:style-name="T76">(2025)</text:span><text:span text:style-name="T77"> </text:span><text:span text:style-name="T76">[6]. </text:span><text:span text:style-name="T79">But crucially, none are BT focused. </text:span><text:span text:style-name="T68"><text:line-break/></text:span><text:span text:style-name="T80"><text:line-break/><text:tab/><text:tab/></text:span><text:span text:style-name="T81">2. Outdated UI/UX in Existing Tools</text:span></text:p>
      <text:p text:style-name="P25">Although Sonic Visualiser is the standard tool for MIR annotation, its beat annotation interface is outdated. The interaction paradigm does not reflect modern UX principles or the practical needs of annotators working with long recordings, complex meters, or expressive timing.<text:line-break/><text:line-break/><text:span text:style-name="T82"><text:tab/></text:span><text:span text:style-name="T83">3. Absence of Integrated SoTA Beat Tracking Algorithms</text:span></text:p>
      <text:p text:style-name="P25">Current beat annotation tools do not natively integrate state-of-the-art beat tracking algorithms. Available VAMP plugins are largely obsolete, forcing users to rely on external, fragmented workflows (offline processing and manual import), which reduces usability and consistency.</text:p>
      <text:h text:style-name="P26" text:outline-level="3">Sonic Visualizer is still the go-to software for scientific and MIR purposed audio analysis. However when it comes to BT, SV is ou<text:span text:style-name="T84">t</text:span>dated due to it’s <text:s/>inefficient BT labeling process, that is still very much manual and cumbersome [2]. SV also is heavily reliant on VAMP plug-ins, modern SoTA BT algorithms are complex ML applications that may be difficult to implement into VAMP plug-ins and/or there is no <text:span text:style-name="T85">direct or valued </text:span>incentive for making these algorithms available as VAMP plug-ins. </text:h>
      <text:h text:style-name="P27" text:outline-level="3"><text:line-break/>Time Instances <text:span text:style-name="T86">inside SV (name of the </text:span><text:span text:style-name="T87">main </text:span><text:span text:style-name="T86">tool in SV for BT),</text:span> can be exported and imported as simple .txt files. Thus, for one to benefit from a SoTA <text:span text:style-name="T84">BT</text:span> algorithm, <text:span text:style-name="T84">one needs to follow a few steps</text:span>: Firs<text:span text:style-name="T84">t</text:span>, one needs to have access the algorithm in itself which might involve not only browsing, but also probably, accessing some <text:span text:style-name="T84">publicly available</text:span> <text:span text:style-name="T86">source-code </text:span>repository. Secondly, one needs to know how to compile and run the program and export the retrieved data <text:span text:style-name="T86">in</text:span>to a .txt file that SV can read. <text:span text:style-name="T88">Besides this, we also need to take into account that to accomplish these steps, one needs at least, </text:span><text:span text:style-name="T85">to</text:span><text:span text:style-name="T88"> be minimally </text:span><text:span text:style-name="T84">literate/</text:span><text:span text:style-name="T88">experienced with programming.<text:line-break/><text:line-break/></text:span><text:span text:style-name="T86">One problem with this, is that other users who may not be experienced in programming or literate in MIR research will rely on the most easily accessible BT algorithm inside SV, and </text:span><text:span text:style-name="T89">these will probably </text:span><text:span text:style-name="T90">be</text:span><text:span text:style-name="T89"> Beat Trackers like: BeatRoot </text:span><text:span text:style-name="T91">(2001)</text:span><text:span text:style-name="T89"> [11], </text:span><text:span text:style-name="T92">Tempo and Beat Tracker - </text:span><text:span text:style-name="T90">Q</text:span><text:span text:style-name="T91">ueen Mary University of London </text:span><text:span text:style-name="T92">(2009) </text:span><text:span text:style-name="T90">[12] and</text:span><text:span text:style-name="T91"> </text:span><text:span text:style-name="T89">IBT – I</text:span><text:span text:style-name="T91">NESC Beat Tracker (2010) [1</text:span><text:span text:style-name="T90">3</text:span><text:span text:style-name="T91">] </text:span><text:span text:style-name="T90">among others. </text:span><text:span text:style-name="T92">The reason being that, although they don’t come pre-installed with SV, they can be added via </text:span><text:span text:style-name="T93">a</text:span><text:span text:style-name="T92"> SV </text:span><text:span text:style-name="T90">native feature</text:span><text:span text:style-name="T92"> that allows to browse and install VAMP plugins without exiting the program </text:span><text:span text:style-name="T93">(referring to the “Find Transform” <text:s/>SV feature)</text:span><text:span text:style-name="T92">. </text:span><text:span text:style-name="T90">Crucially it is important to note that, as of the writing of this paper, you will not find any </text:span><text:span text:style-name="T93">SoTA BT using this SV built in feature, in fact one will only find outdated BT that are at least one decade old. <text:s/></text:span></text:h>
      <text:h text:style-name="P28" text:outline-level="3"><text:span text:style-name="T83"><text:s/><text:line-break/></text:span><text:span text:style-name="T94">4. Inefficient and Error-Prone Manual Annotation Workflow </text:span><text:span text:style-name="T95">[9], [10]</text:span></text:h>
      <text:p text:style-name="P29">Manual beat annotation is primarily based on real-time tapping and individual beat placement. This approach is fundamentally limited by human perceptual and motor constraints (e.g., reaction time, jitter, latency), leading to systematic errors and extensive manual correction. Additionally, annotators must insert and adjust beats one by one, making the process unnecessarily time-consuming. <text:line-break/></text:p>
      <text:p text:style-name="P30">For music in which autonomous SoTA BT systems aren’t efficient enough, relaying on human made beat annotations still might be preferable to the annotator: </text:p>
      <text:p text:style-name="P31"><text:span text:style-name="T96"><text:line-break/>“</text:span><text:span text:style-name="T97">A common method to create beat annotations for music recordings is to let a human annotator tap along with them.</text:span><text:span text:style-name="T96">” </text:span><text:span text:style-name="T98">[10]</text:span></text:p>
      <text:p text:style-name="P31"><text:span text:style-name="T96"><text:line-break/></text:span><text:span text:style-name="T98">The problem with this, is that these annotations will probably not be accurate enough even if the user preforming them is an experienced musician. There are multiple reasons that stem from </text:span><text:span text:style-name="T99">perception, </text:span><text:span text:style-name="T100">human motor noise, jitter and system latency </text:span><text:span text:style-name="T101">[10]</text:span><text:span text:style-name="T100">. </text:span><text:span text:style-name="T101">Thus when tapping, there is the need to shift marked beats in order to make them accurate: <text:line-break/></text:span></text:p>
      <text:p text:style-name="P32">“<text:span text:style-name="T10">This shifting operation is particularly relevant when correcting tapped beats, which can be subject to human motor noise as well as jitter and latency during acquisition.</text:span>” [9]</text:p>
      <text:p text:style-name="P29"><text:span text:style-name="T82"><text:line-break/></text:span><text:span text:style-name="T83">5. Lack of Structured, High-Level Beat Input Mechanisms</text:span></text:p>
      <text:p text:style-name="P23">Existing tools provide no support for structured beat entry based on musical context (e.g., steady BPM regions, time signatures, metrical grids). This makes it difficult to rapidly generate or correct large numbers of beats and to resolve common beat tracking errors such as half-time or double-time ambiguities.</text:p>
      <text:p text:style-name="P33">One of the most common BT assessment mistakes are the Double/Half time errors, in which the BT algorithm might mark the beat in orders of integer multiplication (or division) from the <text:span text:style-name="T102">actually correct </text:span>beat. <text:span text:style-name="T102">Ano</text:span>ther common mistake might be inducing multiple closely sequenced markings in the place where only one should be, or the contrary, omitting/skipping beats. For correcting these type of mistakes, current Beat Tracking software only allow correcting beats one-by-one. A simple workaround <text:span text:style-name="T103">for this</text:span> mistake would be to develop a feature in which the user could select<text:span text:style-name="T102">s </text:span>a time region of beats and perform <text:span text:style-name="T103">an</text:span> operation such as: ‘<text:span text:style-name="T10">In this region, </text:span><text:span text:style-name="T104">that start at </text:span><text:span text:style-name="T105">xx:xx</text:span><text:span text:style-name="T104"> and ends at </text:span><text:span text:style-name="T105">xx:xx </text:span><text:span text:style-name="T10">, the tempo is a steady X bpm with Y/</text:span><text:span text:style-name="T104">Z</text:span><text:span text:style-name="T10"> time</text:span><text:span text:style-name="T104">S</text:span><text:span text:style-name="T10">ignature</text:span>’ <text:span text:style-name="T103">the program would then shift/eliminate/highlight marked beats that deviate from the “user statement”. </text:span></text:p>
      <text:h text:style-name="P34" text:outline-level="3"><text:line-break/><text:span text:style-name="T106">6. Missing Integration of Audio-to-Score Alignment</text:span></text:h>
      <text:p text:style-name="P23">Beat annotation tools do not exploit audio-to-score alignment, even though it can significantly reduce annotator bias and improve accuracy for music that follows a written score. Systems capable of accurate score following exist, but their potential for supporting beat annotation remains largely unexplored and unintegrated.</text:p>
      <text:p text:style-name="P35"><text:span text:style-name="T107">Something that is not very well documented is the relevance and importance of following along a music score when beat tapping. Besides helping the annotator follow along more accurately the recordging, a score might notice the annotator in advance of any bpm or time signature changes. Besides that, when using a Spectrogram-Based view of the recording, one can distinctively align a specific onset to a concrete and exact </text:span><text:span text:style-name="T108">moment in the recording timeline, this is essential to know if a beat is accurately assessed or not.</text:span><text:span text:style-name="T109"><text:line-break/><text:line-break/></text:span><text:span text:style-name="T108">Piano Precision [7] is an example of an SV fork that was designed for displaying musical scores alongside audio recordings in a unified graphical interface. This program works surprisingly well for Solo Piano pieces. Now there are two question that arrive from this: </text:span></text:p>
      <text:p text:style-name="P36"/>
      <text:p text:style-name="P37">One is that, by following along the music sheet, Beat Tracking autonomously should be as straight forward as making the program align a beat marking with the respective note onsets that are marked in the score. </text:p>
      <text:p text:style-name="P37"/>
      <text:p text:style-name="P38"><text:span text:style-name="T110">The other would be to integrate this idea of Audio-to-Score alignment with a Spectral View of the recording. </text:span><text:span text:style-name="T111">I</text:span><text:span text:style-name="T110">n PianoPrecision this is done via a side-window that displays the a single A4 page </text:span><text:span text:style-name="T111">of the score</text:span><text:span text:style-name="T110">, one at a time. </text:span><text:span text:style-name="T111">When the user hits play, a darkened highlight displays the current playback position in the score, while in another window a spectral view of the audio is is following along the playback position horizontally. </text:span><text:span text:style-name="T112">T</text:span><text:span text:style-name="T111">his allows for a musically natural follow-</text:span><text:span text:style-name="T112">along </text:span><text:span text:style-name="T111">of </text:span><text:span text:style-name="T112">the</text:span><text:span text:style-name="T111"> score, </text:span><text:span text:style-name="T112">mimicking how a musical score is actually read.</text:span><text:span text:style-name="T111"> </text:span><text:span text:style-name="T112">However, </text:span><text:span text:style-name="T111">for audio analysis and visualization </text:span><text:span text:style-name="T112">purposes</text:span><text:span text:style-name="T111">, it could be beneficial for the score to </text:span><text:span text:style-name="T112">be </text:span><text:span text:style-name="T111">aligned </text:span><text:span text:style-name="T112">and viewed along side the playback position, meaning, horizontally and with note onsets that are aligned with their respective absolute position in the timeline. For BT this could allow the user to “grab a beat” and position it on the </text:span><text:span text:style-name="T113">it’s </text:span><text:span text:style-name="T112">corresponding position on top of the spectogram representation. </text:span><text:span text:style-name="T113">Also this could be beneficial for more easily detecting beats that should be shifted.</text:span></text:p>
      <text:p text:style-name="P39"/>
      <text:h text:style-name="P40" text:outline-level="3">7. Underutilization of Spectrogram-Based Interaction</text:h>
      <text:p text:style-name="P23">Waveform-centric annotation is insufficient for many musical styles, particularly non-percussive or sustained-sound music. While spectrograms are available, current tools do not adequately leverage spectral information as a primary aid for beat annotation, limiting accuracy in complex or expressive performances.</text:p>
      <text:p text:style-name="P41"><text:span text:style-name="T83">Yamamoto’s Human-In-the-Loop proposal [2] seems to be a step in the right direction for a BT UI. However, </text:span>a flaw with his paper is, that it fails to mention how a spectrogram<text:span text:style-name="T114">s </text:span>can be beneficial as opposed to the more conventional waveform <text:span text:style-name="T114">representations</text:span>, for the act of beat tracking. While a waveform representation can be useful for <text:span text:style-name="T114">identifying transients and general differences in energy <text:s/>along audio file. Spectograms can besides that, represent more accurately information related with spectral energy in time. A clear example of this would be: In a waveform, one can distinguish a <text:s/></text:span><text:span text:style-name="T115">ff</text:span><text:span text:style-name="T114"> section of from a </text:span><text:span text:style-name="T115">pp</text:span><text:span text:style-name="T114"> in a recording. In a spectogram, one can not only distinguish these, but also understand if </text:span><text:span text:style-name="T116">a particular section </text:span><text:span text:style-name="T114">would be chord hit, or a</text:span><text:span text:style-name="T116">n</text:span><text:span text:style-name="T114"> </text:span><text:span text:style-name="T115">arpeggio, </text:span><text:span text:style-name="T116">along side noticing where these note onsets would be located pitch wise. </text:span></text:p>
      <text:list text:continue-list="list2567424613" text:style-name="L1">
        <text:list-item>
          <text:list>
            <text:list-item>
              <text:list>
                <text:list-item>
                  <text:list>
                    <text:list-item>
                      <text:list>
                        <text:list-item>
                          <text:list>
                            <text:list-header>
                              <text:p text:style-name="P42"/>
                            </text:list-header>
                          </text:list>
                        </text:list-item>
                      </text:list>
                    </text:list-item>
                  </text:list>
                  <text:p text:style-name="P43"><text:span text:style-name="T117">R</text:span><text:span text:style-name="T118">esearch questions:<text:line-break/><text:line-break/></text:span><text:span text:style-name="T119">“How can we improve the contemporary Beat An</text:span><text:span text:style-name="T120">n</text:span><text:span text:style-name="T119">otation process?” - </text:span><text:span text:style-name="T120">This is the whole point of the research. Associated questions:<text:line-break/><text:line-break/></text:span><text:span text:style-name="T119">“How can we align </text:span><text:span text:style-name="T120">Music Scores with a Spectral Audio representation.” – How can we make Audio-to-Score alignment, Scores are not a time based (aka. The duration of a 1/16th can vary and in real terms a 1/16ths can occupy the same space as a 1/4th, </text:span><text:span text:style-name="T121">a given measure can be 10seg long and the same recording another measure can be 15sec long or any value</text:span><text:span text:style-name="T120">).<text:line-break/><text:line-break/>“</text:span><text:span text:style-name="T121">What tools/actions can be most helpful for Beat Annotations.” – Onset/BeatEstimation </text:span><text:span text:style-name="T122">Beat Annotation Snap/Quantize feature? Region annotation Corrections? </text:span><text:span text:style-name="T123"><text:line-break/></text:span></text:p>
                  <text:list text:continue-numbering="true">
                    <text:list-header>
                      <text:p text:style-name="P44">How can the design of a dedicated user interface improve the accuracy, efficiency, and usability of contemporary beat annotation workflows in MIR?<text:line-break/><text:line-break/>Which interaction mechanisms and annotation tools (e.g., structured tempo input, snapping, region-based editing, algorithm-assisted correction) most effectively improve beat annotation speed and precision?<text:line-break/><text:line-break/>How can audio-to-score alignment be integrated into a beat annotation interface to support more accurate and less biased beat placement in score-based music?</text:p>
                      <text:list>
                        <text:list-header>
                          <text:p text:style-name="P45"/>
                        </text:list-header>
                      </text:list>
                    </text:list-header>
                  </text:list>
                </text:list-item>
              </text:list>
            </text:list-item>
          </text:list>
        </text:list-item>
      </text:list>
      <text:p text:style-name="P46">With this, there are a couple of research question that summarize the problems that we intend to tackle:</text:p>
      <text:list text:style-name="L5">
        <text:list-item>
          <text:p text:style-name="P47">How can we improve the accuracy and efficiency <text:span text:style-name="T124">of contemporary beat annotation workflows?</text:span></text:p>
        </text:list-item>
        <text:list-item>
          <text:p text:style-name="P48">How can we make an effective music score representation, that can be aligned to show notes in their absolute time positions?</text:p>
        </text:list-item>
        <text:list-item>
          <text:p text:style-name="P48">How can we make such score align with a spectogram view of the recording?<text:line-break/></text:p>
          <text:p text:style-name="P48"/>
        </text:list-item>
      </text:list>
      <text:p text:style-name="P49"><text:span text:style-name="T125"><text:s/></text:span><text:tab/></text:p>
      <text:p text:style-name="P50">A chapter that corresponds to the state of the art. This should:</text:p>
      <text:list text:style-name="L6">
        <text:list-item>
          <text:p text:style-name="P51">present related work in order to show what exists in the same field as the thesis and what problems have been encountered; </text:p>
        </text:list-item>
      </text:list>
      <text:p text:style-name="P52"><text:tab/><text:span text:style-name="T126">HIL Beat UI, yamamoto. Piano Precision. SV. ScoreWrap. </text:span></text:p>
      <text:list text:style-name="L7">
        <text:list-item>
          <text:p text:style-name="P53">make clear that there is an opportunity for the contribution that covers some concrete gap;</text:p>
        </text:list-item>
      </text:list>
      <text:p text:style-name="P54"><text:tab/><text:span text:style-name="T126">This will benefit beat annotators. </text:span><text:span text:style-name="T127">The current process of beat annotation is slow and can be inaccurate. <text:s text:c="2"/></text:span></text:p>
      <text:list text:style-name="L8">
        <text:list-item>
          <text:p text:style-name="P55">contain a technological review of the main tools that can be used in the scope of the project (if applicable), justifying future choices;</text:p>
        </text:list-item>
      </text:list>
      <text:p text:style-name="P52"><text:tab/><text:span text:style-name="T127">Piano Precision Fork as starting point. </text:span><text:span text:style-name="T128">wavesurfer.js.</text:span><text:span text:style-name="T127"> BeatThis repository. </text:span><text:span text:style-name="T128">ScoreWrap. ShiftIfYouCan</text:span></text:p>
      <text:list text:style-name="L9">
        <text:list-item>
          <text:p text:style-name="P56">be strongly supported by references, with a particular focus on scientific references whenever possible - journal and conference papers, books - and less on websites;</text:p>
        </text:list-item>
      </text:list>
      <text:p text:style-name="P57">A work plan chapter for the following months, identifying the main tasks clearly (do not use generic task names such as "development"), with a short description paragraph, and a schedule, which should be illustrated in a Gantt diagram or similar;</text:p>
      <text:p text:style-name="P58"><text:tab/>XXX</text:p>
      <text:p text:style-name="P59"><text:span text:style-name="T1">Bibliography.</text:span> </text:p>
      <text:p text:style-name="P60"><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 text:key2="E. W. Large and J. F. Kolen, “Resonance and the perception of musical meter,” Conn. Sci., vol. 6, no. 2-3, pp. 177–208, 1994."/><text:alphabetical-index-mark text:string-value="5" text:key1="E. W. Large and J. F. Kolen, “Resonance and the perception of musical meter,” Conn. Sci., vol. 6, no. 2-3, pp. 177–208, 1994." text:key2="E. W. Large and J. F. Kolen, “Resonance and the perception of musical meter,” Conn. Sci., vol. 6, no. 2-3, pp. 177–208, 1994."/><text:alphabetical-index-mark text:string-value="5" text:key1="E. W. Large and J. F. Kolen, “Resonance and the perception of musical meter,” Conn. Sci., vol. 6, no. 2-3, pp. 177–208, 1994." text:key2="E. W. Large and J. F. Kolen, “Resonance and the perception of musical meter,” Conn. Sci., vol. 6, no. 2-3, pp. 177–208, 1994."/><text:alphabetical-index-mark text:string-value="5" text:key1="E. W. Large and J. F. Kolen, “Resonance and the perception of musical meter,” Conn. Sci., vol. 6, no. 2-3, pp. 177–208, 1994." text:key2="E. W. Large and J. F. Kolen, “Resonance and the perception of musical meter,” Conn. Sci., vol. 6, no. 2-3, pp. 177–208, 1994."/><text:span text:style-name="T129">[1] E. W. Large and J. F. Kolen, “Resonance and the perception of musical meter,” Conn. Sci., vol. 6, no. 2-3, pp. 177–208, 1994.<text:line-break/></text:span><text:span text:style-name="T130">[2] Yamamoto, K. (2021). "Human-in-the-Loop Adaptation for Interactive Musical Beat Tracking." In Proceedings of the 22nd International Society for Music Information Retrieval Conference (ISMIR).</text:span><text:span text:style-name="T129"> </text:span></text:p>
      <text:p text:style-name="P61">[3] Desblancs, D., Lostanlen, V., &amp; Hennequin, R. (2023). "Zero-Note Samba: Self-Supervised Beat Tracking." IEEE/ACM Transactions on Audio, Speech, and Language Processing, vol. 31, pp. 2922–2934.</text:p>
      <text:p text:style-name="P62">[4] Foscarin, F., Schlüter, J., &amp; Widmer, G. (2024). "Beat this! Accurate beat tracking without DBN postprocessing". In Proceedings of the 25th International Society for Music Information Retrieval Conference (ISMIR 2024), San Francisco, United States</text:p>
      <text:p text:style-name="P63">[5] Goto, M., Yoshii, K., Fujihara, H., Mauch, M., &amp; Nakano, T. (2011). "Songle: A Web Service for Active Music Listening Improved by User Contributions." In Proceedings of the 12th International Society for Music Information Retrieval Conference (ISMIR).</text:p>
      <text:p text:style-name="P63">[6] Ballester, C., et al. (2025). "Interacting with annotated and synchronized music corpora on the Dezrann web platform." Transactions of the International Society for Music Information Retrieval (TISMIR).</text:p>
      <text:p text:style-name="P64">[7] Jiang, Y., Weigl, D. M., &amp; Goebl, W. (2025). "Piano Precision: Advancing Music Performance Analysis by Integrating User-Correctable Audio-to-Score Alignment." In Proceedings of the International Computer Music Conference (ICMC).<text:line-break/><text:span text:style-name="T131">[8] Large, E. W. (1996). "Modeling Beat Perception with a Nonlinear Oscillator." In Proceedings of the 18th Annual Conference of the Cognitive Science Society.</text:span></text:p>
      <text:p text:style-name="P65">[9] Sá Pinto, A., Domingues, I., &amp; Davies, M. E. P. (2020). "Shift If You Can: Counting and Visualising Correction Operations for Beat Tracking Evaluation." In Extended Abstracts for the Late-Breaking Demo Session of the 21st International Society for Music Information Retrieval Conference (ISMIR)<text:line-break/>[10] Driedger, J., Schreiber, H., de Haas, W. B., &amp; Müller, M. (2019). "Towards Automatically Correcting Tapped Beat Annotations for Music Recordings." In Proceedings of the 20th International Society for Music Information Retrieval Conference (ISMIR)<text:line-break/><text:span text:style-name="T89">[11] Dixon, S. (2001). "An interactive beat tracking and visualisation system." In Proceedings of the International Computer Music Conference (ICMC), Havana, Cuba, pp. 215–218.</text:span></text:p>
      <text:p text:style-name="P66">[12] <text:span text:style-name="T90">Stark, A. M., Davies, M. E. P., &amp; Plumbley, M. D. (2009). "Real-time beat-synchronous analysis of musical audio." In Proceedings of the 12th International Conference on Digital Audio Effects (DAFx-09), Como, Italy.</text:span><text:line-break/><text:span text:style-name="T90">[13] </text:span>Oliveira, J. L., Gouyon, F., Martins, L. G., &amp; Reis, L. P. (2010). "IBT: A Real-Time Tempo and Beat Tracking System." In Proceedings of the 11th International Society for Music Information Retrieval Conference (ISMIR). </text:p>
      <text:p text:style-name="P67"><text:tab/></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dale Mono" svg:font-family="'Andale Mono'" style:font-pitch="fixed"/>
    <style:font-face style:name="Arial Unicode MS" svg:font-family="'Arial Unicode MS'" style:font-family-generic="swiss"/>
    <style:font-face style:name="Arial Unicode MS1" svg:font-family="'Arial Unicode MS'" style:font-family-generic="system" style:font-pitch="variable"/>
    <style:font-face style:name="Lexand" svg:font-family="Lexand"/>
    <style:font-face style:name="Lexend" svg:font-family="Lexen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PT"/>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1:36:50.621497000</meta:creation-date>
    <meta:generator>LibreOffice/26.2.0.3$MacOSX_X86_64 LibreOffice_project/afbbd0df0edb6d40b450b0337ac646b0913a760c</meta:generator>
    <dc:date>2026-02-07T18:13:01.570711000</dc:date>
    <meta:editing-duration>PT10H46M37S</meta:editing-duration>
    <meta:editing-cycles>20</meta:editing-cycles>
    <meta:document-statistic meta:table-count="0" meta:image-count="0" meta:object-count="0" meta:page-count="1" meta:paragraph-count="77" meta:word-count="4667" meta:character-count="29148" meta:non-whitespace-character-count="24475"/>
  </office:meta>
</office:document-meta>
</file>