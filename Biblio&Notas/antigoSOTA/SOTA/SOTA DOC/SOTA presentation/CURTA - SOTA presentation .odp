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BB8000006985BFDB5D2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style:protect="position size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outline1">
      <style:graphic-properties draw:textarea-horizontal-align="left" fo:min-height="0.101cm" style:protect="position size" loext:decorative="false"/>
      <style:paragraph-properties style:writing-mode="lr-tb"/>
    </style:style>
    <style:style style:name="pr8" style:family="presentation" style:parent-style-name="Midnightblue2-title">
      <style:graphic-properties fo:min-height="0.101cm" loext:decorative="false"/>
      <style:paragraph-properties style:writing-mode="lr-tb"/>
    </style:style>
    <style:style style:name="pr9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color="#ff8000" loext:opacity="100%" fo:background-color="#ff8000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text-properties fo:color="#ff8000" loext:opacity="100%"/>
    </style:style>
    <style:style style:name="P5" style:family="paragraph">
      <style:text-properties fo:color="#ffffff" loext:opacity="100%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text-properties fo:color="#ffffff" loext:opacity="100%" fo:font-weight="normal" style:font-weight-asian="normal" style:font-weight-complex="normal"/>
    </style:style>
    <style:style style:name="T1" style:family="text">
      <style:text-properties fo:color="#ff8000" loext:opacity="100%"/>
    </style:style>
    <style:style style:name="T2" style:family="text">
      <style:text-properties fo:color="#eeeeee" loext:opacity="100%"/>
    </style:style>
    <style:style style:name="T3" style:family="text">
      <style:text-properties fo:font-size="22pt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075cm" svg:x="1cm" svg:y="4.727cm" presentation:class="title" presentation:user-transformed="true">
          <draw:text-box>
            <text:p><text:span text:style-name="T1">Intermediate Presentation</text:span><text:span text:style-name="T1"><text:line-break/></text:span><text:span text:style-name="T1">- </text:span><text:span text:style-name="T2">Interactive Score Annotation for MIR - </text:span></text:p>
          </draw:text-box>
        </draw:frame>
        <draw:frame presentation:style-name="pr2" draw:text-style-name="P2" draw:layer="layout" svg:width="26cm" svg:height="4.125cm" svg:x="1.27cm" svg:y="10.795cm" presentation:class="subtitle" presentation:user-transformed="true">
          <draw:text-box>
            <text:p><text:span text:style-name="T3">Fernando Perry de Azeredo</text:span></text:p>
            <text:p><text:span text:style-name="T3"><text:a xlink:href="mailto:up202308655@up.pt" xlink:type="simple">up202308655@up.pt</text:a></text:span></text:p>
            <text:p><text:span text:style-name="T3">FEUP 2026 </text:span></text:p>
          </draw:text-box>
        </draw:frame>
        <presentation:notes draw:style-name="dp2">
          <draw:page-thumbnail draw:style-name="gr1" draw:layer="layout" svg:width="17cm" svg:height="9.56cm" svg:x="2cm" svg:y="2.419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Thesis &amp; Dissertation Goal</text:span></text:p>
          </draw:text-box>
        </draw:frame>
        <draw:frame presentation:style-name="pr5" draw:text-style-name="P5" draw:layer="layout" svg:width="25.4cm" svg:height="10.5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Work Timeline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item>
                <text:p>BeatMapJS <text:span text:style-name="T4">(Work Period)</text:span></text:p>
                <text:list>
                  <text:list-item>
                    <text:p>Goal: </text:p>
                  </text:list-item>
                  <text:list-item>
                    <text:p>Developed Features:</text:p>
                  </text:list-item>
                  <text:list-item>
                    <text:p>Pros&amp;Cons:</text:p>
                  </text:list-item>
                </text:list>
              </text:list-item>
              <text:list-item>
                <text:p text:style-name="P6"><text:span text:style-name="T5">MEI-Basic-Edit </text:span><text:span text:style-name="T4">(Work Period)</text:span></text:p>
                <text:list>
                  <text:list-item>
                    <text:p>Goal:</text:p>
                  </text:list-item>
                  <text:list-item>
                    <text:p>Developed Features:</text:p>
                  </text:list-item>
                  <text:list-item>
                    <text:p text:style-name="P7">Pros&amp;Cons:</text:p>
                  </text:list-item>
                </text:list>
              </text:list-item>
              <text:list-item>
                <text:p text:style-name="P6"><text:span text:style-name="T5">Piano-Precision Fork </text:span><text:span text:style-name="T4">(Work Period)</text:span></text:p>
                <text:list>
                  <text:list-item>
                    <text:p>Goal:</text:p>
                  </text:list-item>
                  <text:list-item>
                    <text:p>Developed Features:</text:p>
                  </text:list-item>
                  <text:list-item>
                    <text:p>Pros&amp;Cons: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Work Timeline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item>
                <text:p text:style-name="P6"><text:span text:style-name="T5">Score-Allignment.py <text:s/></text:span><text:span text:style-name="T4">(Work Period)</text:span></text:p>
                <text:list>
                  <text:list-item>
                    <text:p>Goal:</text:p>
                  </text:list-item>
                  <text:list-item>
                    <text:p>Developed Features:</text:p>
                  </text:list-item>
                  <text:list-item>
                    <text:p>Pros&amp;Cons:</text:p>
                  </text:list-item>
                </text:list>
              </text:list-item>
              <text:list-item>
                <text:p text:style-name="P6"><text:span text:style-name="T5">Score-Allignment.js </text:span><text:span text:style-name="T4">(Work Period)</text:span></text:p>
                <text:list>
                  <text:list-item>
                    <text:p>Goal:</text:p>
                  </text:list-item>
                  <text:list-item>
                    <text:p>Developed Features:</text:p>
                  </text:list-item>
                  <text:list-item>
                    <text:p>Pros&amp;Cons:<text:line-break/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Sota Timeline and Goals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6"><text:line-break/></text:p>
                <text:p/>
              </text:list-header>
            </text:list>
          </draw:text-box>
        </draw:frame>
        <draw:frame draw:style-name="gr2" draw:text-style-name="P8" draw:layer="layout" svg:width="27.99cm" svg:height="15.749cm" svg:x="0.069cm" svg:y="0.038cm">
          <draw:image xlink:href="Pictures/1000000100000BB8000006985BFDB5D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What went well so far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6"><text:line-break/></text:p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What went bad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6"><text:line-break/></text:p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Updated Workplan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6"><text:line-break/></text:p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Status</text:span></text:p>
          </draw:text-box>
        </draw:frame>
        <draw:frame presentation:style-name="pr5" draw:text-style-name="P5" draw:layer="layout" svg:width="25.4cm" svg:height="10.5cm" svg:x="0.635cm" svg:y="3.81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>Current work status: <text:span text:style-name="T6">Normal to Late</text:span></text:p>
              </text:list-item>
              <text:list-item>
                <text:p><text:span text:style-name="T7">Conclusion forecast:</text:span><text:span text:style-name="T6"> Probable</text:span></text:p>
                <text:p><text:span text:style-name="T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.286cm" svg:y="0.627cm" presentation:class="title" presentation:user-transformed="true">
          <draw:text-box>
            <text:p><text:span text:style-name="T1">References</text:span></text:p>
          </draw:text-box>
        </draw:frame>
        <draw:frame presentation:style-name="pr7" draw:text-style-name="P9" draw:layer="layout" svg:width="25.4cm" svg:height="10.5cm" svg:x="0.635cm" svg:y="3.81cm" presentation:class="outline" presentation:user-transformed="true">
          <draw:text-box>
            <text:list text:style-name="L3">
              <text:list-item>
                <text:p><text:span text:style-name="T8">Dixon, S. (2007). Evaluation of the Audio Beat Tracking System BeatRoot. Journal of New Music Research, 36(1), 39–50. DOI: 10.1080/09298210701653310</text:span></text:p>
              </text:list-item>
              <text:list-item>
                <text:p><text:span text:style-name="T8">Masataka Goto, Kazuyoshi Yoshii, Hiromasa Fujihara, Matthias Mauch, and Tomoyasu Nakano. "Songle: A Web Service for Active Music Listening Improved by User Contributions." In Proceedings of the 12th International Society for Music Information Retrieval Conference (ISMIR 2011)</text:span></text:p>
              </text:list-item>
              <text:list-item>
                <text:p text:style-name="P6"><text:span text:style-name="T8">Yamamoto, K. (2021). “Human-in-the-Loop Adaptation for Interactive Musical Beat Tracking.” In Proceedings of the 22nd International Society for Music Information Retrieval Conference (ISMIR)</text:span></text:p>
              </text:list-item>
              <text:list-item>
                <text:p text:style-name="P6"><text:span text:style-name="T8">Desblancs, D., Lostanlen, V., &amp; Hennequin, R. (2023). "Zero-Note Samba: Self-Supervised Beat Tracking." IEEE/ACM Transactions on Audio, Speech, and Language Processing, vol. 31, pp. 2922–2934. DOI: 10.1109/TASLP.2023.3297963</text:span></text:p>
              </text:list-item>
              <text:list-item>
                <text:p><text:span text:style-name="T8">Foscarin, F., Schlüter, J., &amp; Widmer, G. (2024). "Beat this! Accurate beat tracking without DBN postprocessing". In Proceedings of the 25th International Society for Music Information Retrieval Conference (ISMIR 2024), San Francisco, United States</text:span></text:p>
              </text:list-item>
              <text:list-item>
                <text:p text:style-name="P6"><text:span text:style-name="T8">Jiang, Y., Weigl, D. M., &amp; Goebl, W. (2025). “Piano Precision: Advancing Music Performance Analysis by Integrating User-Correctable Audio-to-Score Alignment”</text:span></text:p>
              </text:list-item>
              <text:list-item>
                <text:p text:style-name="P6"><text:span text:style-name="T8">Liu, Z., &amp; Donahue, C. (2025). "OSU2MIR: Beat Tracking Dataset Derived From Osu! Data." In Extended Abstracts for the Late-Breaking Demo Session of the 26th International Society for Music Information Retrieval Conference (ISMIR 2025), Daejeon, South Korea.</text:span></text:p>
              </text:list-item>
              <text:list-item>
                <text:p text:style-name="P6"><text:span text:style-name="T8">Ru, G., Wang, J., Zhao, J., Wu, Y., Yu, Y., Jiang, N., Wang, W., &amp; Li, W. (2025). "HingeNet: A Harmonic-Aware Fine-Tuning Approach for Beat Tracking"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8:39:05.997872000</meta:creation-date>
    <dc:description>This work is licensed under a Creative Commons 0 License.
It makes use of the works of Jun NOGATA.</dc:description>
    <meta:generator>LibreOffice/26.2.0.3$MacOSX_X86_64 LibreOffice_project/afbbd0df0edb6d40b450b0337ac646b0913a760c</meta:generator>
    <dc:title>Midnightblue</dc:title>
    <meta:editing-duration>P2DT9H17M31S</meta:editing-duration>
    <meta:editing-cycles>27</meta:editing-cycles>
    <dc:date>2026-04-07T13:54:01.139481000</dc:date>
    <meta:print-date>2026-01-22T18:22:52.351177000</meta:print-date>
    <meta:printed-by>PDF files</meta:printed-by>
    <meta:document-statistic meta:object-count="94"/>
    <meta:template xlink:type="simple" xlink:actuate="onRequest" xlink:title="Midnightblue" xlink:href="../../../../../../Applications/LibreOffice.app/Contents/Resources/template/common/presnt/Midnightblue.otp" meta:date="2026-01-14T18:39:05.109063000"/>
  </office:meta>
</office:document-meta>
</file>