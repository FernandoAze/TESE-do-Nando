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769000003DBA479A638.png" manifest:media-type="image/png"/>
  <manifest:file-entry manifest:full-path="Pictures/1000000100000BB8000006985BFDB5D2.png" manifest:media-type="image/png"/>
  <manifest:file-entry manifest:full-path="Pictures/10000001000005770000043692700D01.png" manifest:media-type="image/png"/>
  <manifest:file-entry manifest:full-path="Pictures/1000000100000299000000EA862F284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l Nile" svg:font-family="'Al Nile'"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L" svg:font-family="'Nimbus Sans L'" style:font-family-generic="system"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Regular" style:font-family-generic="roman" style:font-pitch="variable"/>
  </office:font-face-decls>
  <office:automatic-styles>
    <style:style style:name="Table2" style:family="table">
      <style:table-properties style:width="177.15mm" table:align="center"/>
    </style:style>
    <style:style style:name="Table2.A" style:family="table-column">
      <style:table-column-properties style:column-width="31.91mm"/>
    </style:style>
    <style:style style:name="Table2.B" style:family="table-column">
      <style:table-column-properties style:column-width="29.1mm"/>
    </style:style>
    <style:style style:name="Table2.C" style:family="table-column">
      <style:table-column-properties style:column-width="116.13mm"/>
    </style:style>
    <style:style style:name="Table2.1" style:family="table-row">
      <style:table-row-properties style:min-row-height="9.93mm" fo:background-color="#ff950e">
        <style:background-image/>
      </style:table-row-properties>
    </style:style>
    <style:style style:name="Table2.A1" style:family="table-cell">
      <style:table-cell-properties style:vertical-align="middle" fo:background-color="transparent" fo:padding-left="1.99mm" fo:padding-right="1.99mm" fo:padding-top="1.01mm" fo:padding-bottom="1.01mm" fo:border-left="0.05pt solid #e8eaed" fo:border-right="none" fo:border-top="none" fo:border-bottom="0.05pt solid #e8eaed">
        <style:background-image/>
      </style:table-cell-properties>
    </style:style>
    <style:style style:name="Table2.C1" style:family="table-cell">
      <style:table-cell-properties style:vertical-align="middle" fo:background-color="transparent" fo:padding-left="1.99mm" fo:padding-right="1.99mm" fo:padding-top="1.01mm" fo:padding-bottom="1.01mm" fo:border-left="0.05pt solid #e8eaed" fo:border-right="0.05pt solid #e8eaed" fo:border-top="none" fo:border-bottom="0.05pt solid #e8eaed">
        <style:background-image/>
      </style:table-cell-properties>
    </style:style>
    <style:style style:name="Table2.2" style:family="table-row">
      <style:table-row-properties style:min-row-height="21.7mm"/>
    </style:style>
    <style:style style:name="Table2.A2"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2"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2"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3" style:family="table-row">
      <style:table-row-properties style:min-row-height="28.43mm"/>
    </style:style>
    <style:style style:name="Table2.A3"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3"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3"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4" style:family="table-row">
      <style:table-row-properties style:min-row-height="20.32mm"/>
    </style:style>
    <style:style style:name="Table2.A4"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4"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4"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5" style:family="table-row">
      <style:table-row-properties style:min-row-height="13.09mm"/>
    </style:style>
    <style:style style:name="Table2.A5"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5"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5" style:family="table-cell">
      <style:table-cell-properties style:vertical-align="bottom" fo:padding-left="1.99mm" fo:padding-right="1.99mm" fo:padding-top="1.01mm" fo:padding-bottom="1.01mm" fo:border-left="0.05pt solid #e8eaed" fo:border-right="0.05pt solid #e8eaed" fo:border-top="none" fo:border-bottom="0.05pt solid #e8eaed"/>
    </style:style>
    <style:style style:name="Table2.A6"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6"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6"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7" style:family="table-row">
      <style:table-row-properties style:min-row-height="15.93mm"/>
    </style:style>
    <style:style style:name="Table2.A7"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7"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7"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8" style:family="table-row">
      <style:table-row-properties style:min-row-height="15.89mm"/>
    </style:style>
    <style:style style:name="Table2.A8"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8"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8"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9" style:family="table-row">
      <style:table-row-properties style:min-row-height="5.7mm"/>
    </style:style>
    <style:style style:name="Table2.A9"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9"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9"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10" style:family="table-row">
      <style:table-row-properties style:min-row-height="5.7mm"/>
    </style:style>
    <style:style style:name="Table2.A10"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10"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10"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2.11" style:family="table-row">
      <style:table-row-properties style:min-row-height="1.99mm"/>
    </style:style>
    <style:style style:name="Table2.A11"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B11" style:family="table-cell">
      <style:table-cell-properties style:vertical-align="middle" fo:padding-left="1.99mm" fo:padding-right="1.99mm" fo:padding-top="1.01mm" fo:padding-bottom="1.01mm" fo:border-left="0.05pt solid #e8eaed" fo:border-right="none" fo:border-top="none" fo:border-bottom="0.05pt solid #e8eaed"/>
    </style:style>
    <style:style style:name="Table2.C11" style:family="table-cell">
      <style:table-cell-properties style:vertical-align="middle" fo:padding-left="1.99mm" fo:padding-right="1.99mm" fo:padding-top="1.01mm" fo:padding-bottom="1.01mm" fo:border-left="0.05pt solid #e8eaed" fo:border-right="0.05pt solid #e8eaed" fo:border-top="none" fo:border-bottom="0.05pt solid #e8eaed"/>
    </style:style>
    <style:style style:name="Table1" style:family="table">
      <style:table-properties style:width="135.36mm" table:align="center"/>
    </style:style>
    <style:style style:name="Table1.A" style:family="table-column">
      <style:table-column-properties style:column-width="22.65mm"/>
    </style:style>
    <style:style style:name="Table1.B" style:family="table-column">
      <style:table-column-properties style:column-width="43.78mm"/>
    </style:style>
    <style:style style:name="Table1.C" style:family="table-column">
      <style:table-column-properties style:column-width="31.96mm"/>
    </style:style>
    <style:style style:name="Table1.D" style:family="table-column">
      <style:table-column-properties style:column-width="36.97mm"/>
    </style:style>
    <style:style style:name="Table1.1" style:family="table-row">
      <style:table-row-properties style:min-row-height="11.91mm"/>
    </style:style>
    <style:style style:name="Table1.A1" style:family="table-cell">
      <style:table-cell-properties style:vertical-align="middle" fo:padding-left="0.49mm" fo:padding-right="0mm" fo:padding-top="0mm" fo:padding-bottom="0.49mm" fo:border-left="0.05pt solid #e8eaed" fo:border-right="none" fo:border-top="none" fo:border-bottom="0.05pt solid #e8eaed"/>
    </style:style>
    <style:style style:name="Table" style:family="table">
      <style:table-properties style:width="170mm" table:align="margins"/>
    </style:style>
    <style:style style:name="Table.A" style:family="table-column">
      <style:table-column-properties style:column-width="42.49mm" style:rel-column-width="16383*"/>
    </style:style>
    <style:style style:name="Table.D" style:family="table-column">
      <style:table-column-properties style:column-width="42.51mm" style:rel-column-width="16386*"/>
    </style:style>
    <style:style style:name="Table.1" style:family="table-row">
      <style:table-row-properties fo:background-color="#ff950e">
        <style:background-image/>
      </style:table-row-properties>
    </style:style>
    <style:style style:name="Table.A1" style:family="table-cell">
      <style:table-cell-properties fo:background-color="transparent" fo:padding-left="1.99mm" fo:padding-right="1.99mm" fo:padding-top="1.01mm" fo:padding-bottom="1.01mm" fo:border="none" style:writing-mode="page">
        <style:background-image/>
      </style:table-cell-properties>
    </style:style>
    <style:style style:name="Table.3" style:family="table-row">
      <style:table-row-properties style:min-row-height="11.34mm"/>
    </style:style>
    <style:style style:name="Table.A3" style:family="table-cell">
      <style:table-cell-properties style:vertical-align="middle" fo:padding-left="1.99mm" fo:padding-right="1.99mm" fo:padding-top="1.01mm" fo:padding-bottom="1.01mm" fo:border="none" style:writing-mode="page"/>
    </style:style>
    <style:style style:name="Table.4" style:family="table-row">
      <style:table-row-properties style:min-row-height="14.52mm"/>
    </style:style>
    <style:style style:name="Table.5" style:family="table-row">
      <style:table-row-properties style:min-row-height="18.86mm"/>
    </style:style>
    <style:style style:name="P1" style:family="paragraph" style:parent-style-name="Title">
      <style:paragraph-properties fo:text-align="left" style:justify-single-word="false"/>
      <style:text-properties style:font-name="Times New Roman" fo:font-size="28pt" officeooo:paragraph-rsid="008a5834" style:font-size-asian="28pt" style:font-size-complex="28pt"/>
    </style:style>
    <style:style style:name="P2" style:family="paragraph" style:parent-style-name="Text_20_body">
      <style:paragraph-properties fo:text-align="left" style:justify-single-word="false"/>
      <style:text-properties style:font-name="Times New Roman" fo:font-size="28pt" officeooo:paragraph-rsid="008a5834" style:font-size-asian="28pt" style:font-size-complex="28pt"/>
    </style:style>
    <style:style style:name="P3" style:family="paragraph" style:parent-style-name="Title">
      <style:paragraph-properties fo:text-align="center" style:justify-single-word="false"/>
      <style:text-properties style:font-name="Times New Roman" fo:font-size="28pt" officeooo:paragraph-rsid="00d2557b" style:font-size-asian="28pt" style:font-size-complex="28pt"/>
    </style:style>
    <style:style style:name="P4" style:family="paragraph" style:parent-style-name="Text_20_body">
      <style:paragraph-properties fo:text-align="center" style:justify-single-word="false"/>
      <style:text-properties style:font-name="Times New Roman" fo:font-size="28pt" officeooo:paragraph-rsid="00d2557b" style:font-size-asian="28pt" style:font-size-complex="28pt"/>
    </style:style>
    <style:style style:name="P5" style:family="paragraph" style:parent-style-name="author">
      <style:paragraph-properties fo:text-align="center" style:justify-single-word="false"/>
      <style:text-properties style:font-name="Times New Roman" fo:font-size="14pt" officeooo:rsid="00d2557b" officeooo:paragraph-rsid="00d2557b" style:font-size-asian="14pt" style:font-size-complex="14pt"/>
    </style:style>
    <style:style style:name="P6" style:family="paragraph" style:parent-style-name="author">
      <style:paragraph-properties fo:text-align="center" style:justify-single-word="false"/>
      <style:text-properties style:font-name="Times New Roman" fo:font-size="28pt" officeooo:paragraph-rsid="00d2557b" style:font-size-asian="28pt" style:font-size-complex="28pt"/>
    </style:style>
    <style:style style:name="P7" style:family="paragraph" style:parent-style-name="Text_20_body">
      <style:paragraph-properties fo:text-align="center" style:justify-single-word="false"/>
      <style:text-properties officeooo:paragraph-rsid="00d2557b"/>
    </style:style>
    <style:style style:name="P8" style:family="paragraph" style:parent-style-name="Text_20_body">
      <style:paragraph-properties fo:text-align="center" style:justify-single-word="false"/>
      <style:text-properties officeooo:rsid="00d2557b" officeooo:paragraph-rsid="00d2557b"/>
    </style:style>
    <style:style style:name="P9" style:family="paragraph" style:parent-style-name="Text_20_body">
      <style:paragraph-properties fo:break-before="page"/>
      <style:text-properties fo:language="en" fo:country="US" officeooo:rsid="001eb3ec" officeooo:paragraph-rsid="001eb3ec"/>
    </style:style>
    <style:style style:name="P10" style:family="paragraph" style:parent-style-name="Contents_20_1">
      <style:paragraph-properties>
        <style:tab-stops>
          <style:tab-stop style:position="169.99mm" style:type="right" style:leader-style="dotted" style:leader-text="."/>
        </style:tab-stops>
      </style:paragraph-properties>
    </style:style>
    <style:style style:name="P11" style:family="paragraph" style:parent-style-name="Contents_20_2">
      <style:paragraph-properties>
        <style:tab-stops>
          <style:tab-stop style:position="164.99mm" style:type="right" style:leader-style="dotted" style:leader-text="."/>
        </style:tab-stops>
      </style:paragraph-properties>
    </style:style>
    <style:style style:name="P12" style:family="paragraph" style:parent-style-name="Contents_20_3">
      <style:paragraph-properties>
        <style:tab-stops>
          <style:tab-stop style:position="159.98mm" style:type="right" style:leader-style="dotted" style:leader-text="."/>
        </style:tab-stops>
      </style:paragraph-properties>
    </style:style>
    <style:style style:name="P13" style:family="paragraph" style:parent-style-name="Contents_20_4">
      <style:paragraph-properties>
        <style:tab-stops>
          <style:tab-stop style:position="154.99mm" style:type="right" style:leader-style="dotted" style:leader-text="."/>
        </style:tab-stops>
      </style:paragraph-properties>
    </style:style>
    <style:style style:name="P14" style:family="paragraph" style:parent-style-name="Text_20_body">
      <style:text-properties officeooo:rsid="00893c52" officeooo:paragraph-rsid="008a5834"/>
    </style:style>
    <style:style style:name="P15" style:family="paragraph" style:parent-style-name="Heading_20_1">
      <style:paragraph-properties fo:break-before="page"/>
      <style:text-properties officeooo:rsid="00b25a82" officeooo:paragraph-rsid="00b25a82"/>
    </style:style>
    <style:style style:name="P16" style:family="paragraph" style:parent-style-name="Table">
      <style:paragraph-properties fo:text-align="center" style:justify-single-word="false" fo:keep-with-next="always"/>
      <style:text-properties fo:font-size="14pt" fo:font-style="normal" fo:font-weight="bold" officeooo:paragraph-rsid="00a4a58e" style:font-size-asian="14pt" style:font-style-asian="normal" style:font-weight-asian="bold" style:font-size-complex="14pt" style:font-style-complex="normal" style:font-weight-complex="bold"/>
    </style:style>
    <style:style style:name="P17" style:family="paragraph" style:parent-style-name="Table">
      <style:paragraph-properties fo:text-align="center" style:justify-single-word="false" fo:keep-with-next="always"/>
      <style:text-properties fo:font-size="14pt" fo:font-style="normal" fo:font-weight="bold" officeooo:rsid="00b43466" officeooo:paragraph-rsid="00b43466" style:font-size-asian="14pt" style:font-style-asian="normal" style:font-weight-asian="bold" style:font-size-complex="14pt" style:font-style-complex="normal" style:font-weight-complex="bold"/>
    </style:style>
    <style:style style:name="P18" style:family="paragraph" style:parent-style-name="Table">
      <style:paragraph-properties fo:text-align="center" style:justify-single-word="false" fo:keep-with-next="always"/>
      <style:text-properties officeooo:paragraph-rsid="00a4a58e"/>
    </style:style>
    <style:style style:name="P19" style:family="paragraph" style:parent-style-name="Text_20_body">
      <style:paragraph-properties fo:text-align="center" style:justify-single-word="false"/>
      <style:text-properties fo:font-size="11pt" fo:font-weight="bold" officeooo:rsid="00893c52" officeooo:paragraph-rsid="00893c52" style:font-size-asian="11pt" style:font-style-asian="normal" style:font-weight-asian="bold" style:font-size-complex="11pt" style:font-style-complex="normal" style:font-weight-complex="bold" style:text-overline-style="none" style:text-overline-color="font-color"/>
    </style:style>
    <style:style style:name="P20" style:family="paragraph" style:parent-style-name="Text_20_body">
      <style:paragraph-properties fo:text-align="left" style:justify-single-word="false"/>
      <style:text-properties fo:font-size="11pt" officeooo:rsid="00893c52" officeooo:paragraph-rsid="00893c52" style:font-size-asian="11pt" style:font-style-asian="normal" style:font-weight-asian="bold" style:font-size-complex="11pt" style:font-style-complex="normal" style:font-weight-complex="bold" style:text-overline-style="none" style:text-overline-color="font-color"/>
    </style:style>
    <style:style style:name="P21" style:family="paragraph" style:parent-style-name="Text_20_body">
      <style:paragraph-properties fo:text-align="left" style:justify-single-word="false"/>
      <style:text-properties fo:font-size="11pt" officeooo:rsid="00a4a58e" officeooo:paragraph-rsid="00a4a58e" style:font-size-asian="11pt" style:font-style-asian="normal" style:font-weight-asian="bold" style:font-size-complex="11pt" style:font-style-complex="normal" style:font-weight-complex="bold" style:text-overline-style="none" style:text-overline-color="font-color"/>
    </style:style>
    <style:style style:name="P22" style:family="paragraph" style:parent-style-name="Text_20_body">
      <style:paragraph-properties fo:text-align="left" style:justify-single-word="false"/>
      <style:text-properties fo:font-size="11pt" officeooo:rsid="00a4a58e" officeooo:paragraph-rsid="00aa8e7d" style:font-size-asian="11pt" style:font-style-asian="normal" style:font-weight-asian="bold" style:font-size-complex="11pt" style:font-style-complex="normal" style:font-weight-complex="bold" style:text-overline-style="none" style:text-overline-color="font-color"/>
    </style:style>
    <style:style style:name="P23" style:family="paragraph" style:parent-style-name="Text_20_body">
      <style:paragraph-properties fo:text-align="left" style:justify-single-word="false"/>
      <style:text-properties fo:font-size="11pt" officeooo:rsid="00893c52" officeooo:paragraph-rsid="00893c52"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ext_20_body">
      <style:paragraph-properties fo:text-align="left" style:justify-single-word="false"/>
      <style:text-properties fo:font-size="11pt" officeooo:rsid="00a4f5e8" officeooo:paragraph-rsid="00a4f5e8"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ext_20_body">
      <style:paragraph-properties fo:text-align="left" style:justify-single-word="false"/>
      <style:text-properties fo:font-size="11pt" officeooo:rsid="00a4f5e8" officeooo:paragraph-rsid="00b25a82"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ext_20_body">
      <style:paragraph-properties fo:text-align="center" style:justify-single-word="false"/>
      <style:text-properties fo:font-size="11pt" fo:font-weight="bold" officeooo:rsid="00bc88c7" officeooo:paragraph-rsid="00bc88c7"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ext_20_body">
      <style:paragraph-properties fo:text-align="left" style:justify-single-word="false"/>
      <style:text-properties fo:font-size="11pt" fo:font-weight="normal" officeooo:rsid="00bc88c7" officeooo:paragraph-rsid="00bc88c7"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ext_20_body">
      <style:paragraph-properties fo:text-align="center" style:justify-single-word="false"/>
      <style:text-properties fo:font-size="11pt" fo:font-weight="bold" officeooo:rsid="008a5834" officeooo:paragraph-rsid="008a5834"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Text_20_body">
      <style:paragraph-properties fo:text-align="left" style:justify-single-word="false"/>
      <style:text-properties fo:font-size="11pt" officeooo:rsid="008a5834" officeooo:paragraph-rsid="008a5834"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paragraph-properties fo:text-align="left" style:justify-single-word="false"/>
      <style:text-properties fo:font-size="11pt" officeooo:rsid="008a5834" officeooo:paragraph-rsid="00b58d29"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ext_20_body">
      <style:paragraph-properties fo:text-align="center" style:justify-single-word="false"/>
      <style:text-properties fo:font-size="11pt" fo:font-weight="bold" officeooo:rsid="00a25619" officeooo:paragraph-rsid="00a25619" style:font-size-asian="11pt" style:font-style-asian="normal" style:font-weight-asian="bold" style:font-size-complex="11pt" style:font-style-complex="normal" style:font-weight-complex="bold" style:text-overline-style="none" style:text-overline-color="font-color"/>
    </style:style>
    <style:style style:name="P32" style:family="paragraph" style:parent-style-name="Text_20_body">
      <style:paragraph-properties fo:text-align="left" style:justify-single-word="false"/>
      <style:text-properties fo:font-size="11pt" officeooo:rsid="00a25619" officeooo:paragraph-rsid="00a25619"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paragraph-properties fo:text-align="left" style:justify-single-word="false"/>
      <style:text-properties fo:font-size="11pt" officeooo:rsid="00b25a82" officeooo:paragraph-rsid="00b25a82"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text-align="justify" style:justify-single-word="false"/>
      <style:text-properties fo:language="en" fo:country="US" officeooo:rsid="002a3fc4" officeooo:paragraph-rsid="002a8018"/>
    </style:style>
    <style:style style:name="P35" style:family="paragraph" style:parent-style-name="Text_20_body">
      <style:paragraph-properties fo:text-align="justify" style:justify-single-word="false"/>
      <style:text-properties officeooo:paragraph-rsid="002a8018"/>
    </style:style>
    <style:style style:name="P36" style:family="paragraph" style:parent-style-name="Text_20_body">
      <style:paragraph-properties fo:text-align="justify" style:justify-single-word="false"/>
      <style:text-properties fo:language="en" fo:country="US" officeooo:rsid="0027afd5" officeooo:paragraph-rsid="002a8018"/>
    </style:style>
    <style:style style:name="P37" style:family="paragraph" style:parent-style-name="Text_20_body">
      <style:paragraph-properties fo:text-align="justify" style:justify-single-word="false"/>
      <style:text-properties officeooo:paragraph-rsid="00b6c980"/>
    </style:style>
    <style:style style:name="P38" style:family="paragraph" style:parent-style-name="Text_20_body">
      <style:paragraph-properties fo:text-align="justify" style:justify-single-word="false"/>
      <style:text-properties officeooo:paragraph-rsid="00383eec"/>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rsid="002c1a12" officeooo:paragraph-rsid="00b70293"/>
    </style:style>
    <style:style style:name="P41" style:family="paragraph" style:parent-style-name="Text_20_body">
      <style:paragraph-properties fo:text-align="justify" style:justify-single-word="false"/>
      <style:text-properties officeooo:rsid="00b70293" officeooo:paragraph-rsid="00b70293"/>
    </style:style>
    <style:style style:name="P42" style:family="paragraph" style:parent-style-name="Text_20_body">
      <style:paragraph-properties fo:text-align="justify" style:justify-single-word="false"/>
      <style:text-properties officeooo:rsid="0090a4ac" officeooo:paragraph-rsid="0096e51d"/>
    </style:style>
    <style:style style:name="P43" style:family="paragraph" style:parent-style-name="Text_20_body">
      <style:paragraph-properties fo:text-align="justify" style:justify-single-word="false"/>
      <style:text-properties officeooo:rsid="0091c51e" officeooo:paragraph-rsid="0096e51d"/>
    </style:style>
    <style:style style:name="P44" style:family="paragraph" style:parent-style-name="Text_20_body">
      <style:paragraph-properties fo:text-align="center" style:justify-single-word="false"/>
      <style:text-properties fo:font-size="14pt" fo:font-style="italic" style:text-underline-style="none" style:font-size-asian="14pt" style:font-style-asian="italic" style:font-size-complex="14pt" style:font-style-complex="italic"/>
    </style:style>
    <style:style style:name="P45" style:family="paragraph" style:parent-style-name="Heading_20_3">
      <style:text-properties officeooo:rsid="0096e51d"/>
    </style:style>
    <style:style style:name="P46" style:family="paragraph" style:parent-style-name="Text_20_body">
      <style:paragraph-properties fo:text-align="center" style:justify-single-word="false"/>
      <style:text-properties fo:font-size="14pt" fo:font-style="italic" officeooo:paragraph-rsid="0096e51d" style:font-size-asian="14pt" style:font-style-asian="italic" style:font-size-complex="14pt" style:font-style-complex="italic"/>
    </style:style>
    <style:style style:name="P47" style:family="paragraph" style:parent-style-name="Heading_20_4">
      <style:paragraph-properties fo:break-before="page"/>
      <style:text-properties officeooo:rsid="0096e7d1" officeooo:paragraph-rsid="0096e7d1"/>
    </style:style>
    <style:style style:name="P48" style:family="paragraph" style:parent-style-name="Text_20_body">
      <style:paragraph-properties fo:text-align="center" style:justify-single-word="false"/>
      <style:text-properties fo:font-size="14pt" fo:font-style="italic" officeooo:paragraph-rsid="0096e7d1" style:font-size-asian="14pt" style:font-style-asian="italic" style:font-size-complex="14pt" style:font-style-complex="italic"/>
    </style:style>
    <style:style style:name="P49" style:family="paragraph" style:parent-style-name="Text_20_body">
      <style:paragraph-properties fo:text-align="justify" style:justify-single-word="false"/>
      <style:text-properties officeooo:paragraph-rsid="00976868"/>
    </style:style>
    <style:style style:name="P50" style:family="paragraph" style:parent-style-name="Text_20_body">
      <style:text-properties officeooo:paragraph-rsid="00976868"/>
    </style:style>
    <style:style style:name="P51" style:family="paragraph" style:parent-style-name="Heading_20_4">
      <style:text-properties officeooo:paragraph-rsid="00976868"/>
    </style:style>
    <style:style style:name="P52" style:family="paragraph" style:parent-style-name="Text_20_body">
      <style:paragraph-properties fo:text-align="center" style:justify-single-word="false"/>
      <style:text-properties fo:font-size="6pt" fo:font-style="italic" style:font-size-asian="5.25pt" style:font-style-asian="italic" style:font-size-complex="6pt" style:font-style-complex="italic"/>
    </style:style>
    <style:style style:name="P53" style:family="paragraph" style:parent-style-name="Text_20_body">
      <style:paragraph-properties fo:text-align="center" style:justify-single-word="false"/>
      <style:text-properties fo:font-size="14pt" fo:font-style="italic" style:font-size-asian="14pt" style:font-style-asian="italic" style:font-size-complex="14pt" style:font-style-complex="italic"/>
    </style:style>
    <style:style style:name="P54" style:family="paragraph" style:parent-style-name="Text_20_body">
      <style:paragraph-properties fo:text-align="justify" style:justify-single-word="false"/>
      <style:text-properties officeooo:paragraph-rsid="00995e14"/>
    </style:style>
    <style:style style:name="P55" style:family="paragraph" style:parent-style-name="Text_20_body">
      <style:text-properties fo:font-size="6pt" officeooo:paragraph-rsid="00995e14" style:font-size-asian="5.25pt" style:font-size-complex="6pt"/>
    </style:style>
    <style:style style:name="P56" style:family="paragraph" style:parent-style-name="Heading_20_4">
      <style:text-properties officeooo:paragraph-rsid="00995e14"/>
    </style:style>
    <style:style style:name="P57" style:family="paragraph" style:parent-style-name="Text_20_body">
      <style:paragraph-properties fo:text-align="center" style:justify-single-word="false"/>
      <style:text-properties fo:font-style="italic" officeooo:paragraph-rsid="00995e14" style:font-style-asian="italic" style:font-style-complex="italic"/>
    </style:style>
    <style:style style:name="P58" style:family="paragraph" style:parent-style-name="Text_20_body">
      <style:paragraph-properties fo:text-align="left" style:justify-single-word="false"/>
      <style:text-properties fo:font-size="6pt" fo:font-style="italic" officeooo:paragraph-rsid="00995e14" style:font-size-asian="5.25pt" style:font-style-asian="italic" style:font-size-complex="6pt" style:font-style-complex="italic"/>
    </style:style>
    <style:style style:name="P59" style:family="paragraph" style:parent-style-name="Text_20_body">
      <style:paragraph-properties fo:text-align="justify" style:justify-single-word="false"/>
      <style:text-properties fo:font-style="normal" officeooo:rsid="00995e14" officeooo:paragraph-rsid="00bc27d6" style:font-style-asian="normal" style:font-style-complex="normal"/>
    </style:style>
    <style:style style:name="P60" style:family="paragraph" style:parent-style-name="Text_20_body">
      <style:text-properties fo:font-style="normal" officeooo:rsid="00995e14" officeooo:paragraph-rsid="00995e14" style:font-style-asian="normal" style:font-style-complex="normal"/>
    </style:style>
    <style:style style:name="P61" style:family="paragraph" style:parent-style-name="Heading_20_4">
      <style:text-properties officeooo:paragraph-rsid="009dfe96"/>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fo:text-align="justify" style:justify-single-word="false"/>
      <style:text-properties officeooo:rsid="009b3935" officeooo:paragraph-rsid="00be1f81"/>
    </style:style>
    <style:style style:name="P64" style:family="paragraph" style:parent-style-name="Text_20_body">
      <style:paragraph-properties fo:text-align="justify" style:justify-single-word="false"/>
      <style:text-properties officeooo:rsid="009b3935" officeooo:paragraph-rsid="00bc88c7"/>
    </style:style>
    <style:style style:name="P65" style:family="paragraph" style:parent-style-name="Text_20_body">
      <style:text-properties officeooo:rsid="009b3935" officeooo:paragraph-rsid="009b3935"/>
    </style:style>
    <style:style style:name="P66" style:family="paragraph" style:parent-style-name="Text_20_body">
      <style:paragraph-properties fo:text-align="center" style:justify-single-word="false"/>
      <style:text-properties officeooo:paragraph-rsid="009cabcf"/>
    </style:style>
    <style:style style:name="P67" style:family="paragraph" style:parent-style-name="Heading_20_1">
      <style:paragraph-properties fo:break-before="page"/>
    </style:style>
    <style:style style:name="P68" style:family="paragraph" style:parent-style-name="Text_20_body">
      <style:paragraph-properties fo:text-align="justify" style:justify-single-word="false"/>
      <style:text-properties officeooo:paragraph-rsid="00a3a0ae"/>
    </style:style>
    <style:style style:name="P69" style:family="paragraph" style:parent-style-name="Text_20_body">
      <style:paragraph-properties fo:text-align="justify" style:justify-single-word="false"/>
      <style:text-properties officeooo:paragraph-rsid="0084a203"/>
    </style:style>
    <style:style style:name="P70" style:family="paragraph" style:parent-style-name="Text_20_body">
      <style:paragraph-properties fo:text-align="justify" style:justify-single-word="false"/>
      <style:text-properties officeooo:paragraph-rsid="005ef617"/>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officeooo:rsid="004f81cc" officeooo:paragraph-rsid="004f81cc"/>
    </style:style>
    <style:style style:name="P73" style:family="paragraph" style:parent-style-name="Text_20_body" style:list-style-name="L1">
      <style:paragraph-properties fo:text-align="justify" style:justify-single-word="false"/>
      <style:text-properties officeooo:paragraph-rsid="004f81cc"/>
    </style:style>
    <style:style style:name="P74" style:family="paragraph" style:parent-style-name="Text_20_body">
      <style:paragraph-properties fo:text-align="justify" style:justify-single-word="false"/>
      <style:text-properties officeooo:paragraph-rsid="004f81cc"/>
    </style:style>
    <style:style style:name="P75" style:family="paragraph" style:parent-style-name="Text_20_body">
      <style:paragraph-properties fo:text-align="justify" style:justify-single-word="false"/>
      <style:text-properties officeooo:rsid="00553b4f" officeooo:paragraph-rsid="00566d69"/>
    </style:style>
    <style:style style:name="P76" style:family="paragraph" style:parent-style-name="Text_20_body" style:list-style-name="L2">
      <style:text-properties officeooo:rsid="00566d69" officeooo:paragraph-rsid="00566d69"/>
    </style:style>
    <style:style style:name="P77" style:family="paragraph" style:parent-style-name="Text_20_body" style:list-style-name="L2">
      <style:text-properties officeooo:rsid="00566d69" officeooo:paragraph-rsid="0059b897"/>
    </style:style>
    <style:style style:name="P78" style:family="paragraph" style:parent-style-name="Text_20_body" style:list-style-name="L2">
      <style:text-properties officeooo:paragraph-rsid="00566d69"/>
    </style:style>
    <style:style style:name="P79" style:family="paragraph" style:parent-style-name="Table">
      <style:paragraph-properties fo:text-align="center" style:justify-single-word="false"/>
      <style:text-properties officeooo:paragraph-rsid="00c0fcff"/>
    </style:style>
    <style:style style:name="P80" style:family="paragraph" style:parent-style-name="Figure">
      <style:paragraph-properties fo:text-align="center" style:justify-single-word="false" fo:keep-with-next="always"/>
      <style:text-properties officeooo:paragraph-rsid="00c0fcff"/>
    </style:style>
    <style:style style:name="P81" style:family="paragraph" style:parent-style-name="Heading_20_2">
      <style:paragraph-properties fo:break-before="page"/>
    </style:style>
    <style:style style:name="P82" style:family="paragraph" style:parent-style-name="Text_20_body">
      <style:paragraph-properties fo:margin-left="0mm" fo:text-align="justify" style:justify-single-word="false" fo:text-indent="0mm" style:auto-text-indent="false">
        <style:tab-stops>
          <style:tab-stop style:position="0.88mm"/>
        </style:tab-stops>
      </style:paragraph-properties>
      <style:text-properties style:use-window-font-color="true" loext:opacity="0%" style:font-name="Times New Roman" fo:font-size="12pt" fo:font-style="normal" style:text-underline-style="none" fo:font-weight="normal" officeooo:rsid="006fa2cc" officeooo:paragraph-rsid="0034d96e" style:font-size-asian="12pt" style:font-style-asian="normal" style:font-size-complex="12pt" style:font-style-complex="normal"/>
    </style:style>
    <style:style style:name="P83" style:family="paragraph" style:parent-style-name="Text_20_body">
      <style:paragraph-properties fo:text-align="center" style:justify-single-word="false"/>
      <style:text-properties officeooo:paragraph-rsid="00c0fcff"/>
    </style:style>
    <style:style style:name="P84" style:family="paragraph" style:parent-style-name="Text_20_body">
      <style:paragraph-properties fo:text-align="center" style:justify-single-word="false"/>
      <style:text-properties style:use-window-font-color="true" loext:opacity="0%" style:font-name="Times New Roman" fo:font-size="12pt" fo:font-style="normal" style:text-underline-style="none" fo:font-weight="normal" officeooo:rsid="006fa2cc" officeooo:paragraph-rsid="00c0fcff" style:font-size-asian="12pt" style:font-style-asian="normal" style:font-size-complex="12pt" style:font-style-complex="normal"/>
    </style:style>
    <style:style style:name="P85"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P86" style:family="paragraph" style:parent-style-name="Text_20_body">
      <style:paragraph-properties fo:text-align="justify" style:justify-single-word="false"/>
      <style:text-properties officeooo:paragraph-rsid="003a36a9"/>
    </style:style>
    <style:style style:name="P87"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7381f3" officeooo:paragraph-rsid="003a36a9" style:font-size-asian="12pt" style:font-style-asian="normal" style:font-size-complex="12pt" style:font-style-complex="normal"/>
    </style:style>
    <style:style style:name="P88" style:family="paragraph" style:parent-style-name="Text_20_body">
      <style:paragraph-properties fo:text-align="center" style:justify-single-word="false"/>
      <style:text-properties officeooo:paragraph-rsid="00c1e2ee"/>
    </style:style>
    <style:style style:name="P89" style:family="paragraph" style:parent-style-name="Text_20_body">
      <style:paragraph-properties fo:text-align="center" style:justify-single-word="false"/>
      <style:text-properties fo:font-variant="normal" fo:text-transform="none" style:text-position="0% 100%" fo:font-style="normal" style:text-underline-style="none" fo:font-weight="normal" officeooo:paragraph-rsid="00c1e2ee"/>
    </style:style>
    <style:style style:name="P90" style:family="paragraph" style:parent-style-name="Text_20_body">
      <style:paragraph-properties fo:text-align="justify" style:justify-single-word="false"/>
      <style:text-properties officeooo:paragraph-rsid="00c417b3"/>
    </style:style>
    <style:style style:name="P91" style:family="paragraph" style:parent-style-name="Heading_20_2">
      <style:text-properties officeooo:paragraph-rsid="00c1e2ee"/>
    </style:style>
    <style:style style:name="P92" style:family="paragraph" style:parent-style-name="Text_20_body">
      <style:paragraph-properties fo:text-align="justify" style:justify-single-word="false"/>
      <style:text-properties officeooo:paragraph-rsid="00395a42"/>
    </style:style>
    <style:style style:name="P93" style:family="paragraph" style:parent-style-name="Text_20_body">
      <style:paragraph-properties fo:text-align="justify" style:justify-single-word="false"/>
      <style:text-properties style:use-window-font-color="true" loext:opacity="0%" officeooo:paragraph-rsid="00395a42"/>
    </style:style>
    <style:style style:name="P94" style:family="paragraph" style:parent-style-name="Text_20_body" style:list-style-name="L3">
      <style:paragraph-properties fo:text-align="justify" style:justify-single-word="false"/>
      <style:text-properties style:use-window-font-color="true" loext:opacity="0%" officeooo:paragraph-rsid="00395a42"/>
    </style:style>
    <style:style style:name="P95" style:family="paragraph" style:parent-style-name="Text_20_body">
      <style:paragraph-properties fo:text-align="justify" style:justify-single-word="false"/>
      <style:text-properties officeooo:paragraph-rsid="003c1c57"/>
    </style:style>
    <style:style style:name="P96" style:family="paragraph" style:parent-style-name="Text_20_body">
      <style:text-properties officeooo:paragraph-rsid="003c1c57"/>
    </style:style>
    <style:style style:name="P97" style:family="paragraph" style:parent-style-name="Text_20_body">
      <style:paragraph-properties fo:text-align="center" style:justify-single-word="false"/>
      <style:text-properties officeooo:paragraph-rsid="00c3d4e4"/>
    </style:style>
    <style:style style:name="P98" style:family="paragraph" style:parent-style-name="Text_20_body">
      <style:paragraph-properties fo:text-align="justify" style:justify-single-word="false"/>
      <style:text-properties officeooo:paragraph-rsid="00c3d4e4"/>
    </style:style>
    <style:style style:name="P99" style:family="paragraph" style:parent-style-name="Text_20_body">
      <style:paragraph-properties fo:text-align="justify" style:justify-single-word="false"/>
      <style:text-properties fo:font-size="6pt" officeooo:paragraph-rsid="003c1c57" style:font-size-asian="5.25pt" style:font-size-complex="6pt"/>
    </style:style>
    <style:style style:name="P100" style:family="paragraph" style:parent-style-name="Text_20_body">
      <style:paragraph-properties fo:text-align="justify" style:justify-single-word="false"/>
      <style:text-properties style:use-window-font-color="true" loext:opacity="0%" style:font-name="Times New Roman" fo:font-style="normal" style:text-underline-style="none" fo:font-weight="normal" officeooo:rsid="0064da2c" officeooo:paragraph-rsid="00374472" style:font-style-asian="normal" style:font-style-complex="normal"/>
    </style:style>
    <style:style style:name="P101" style:family="paragraph" style:parent-style-name="Text_20_body">
      <style:paragraph-properties fo:text-align="justify" style:justify-single-word="false"/>
      <style:text-properties style:use-window-font-color="true" loext:opacity="0%" style:font-name="Times New Roman" fo:font-size="6pt" fo:font-style="normal" style:text-underline-style="none" fo:font-weight="normal" officeooo:rsid="0064da2c" officeooo:paragraph-rsid="00374472" style:font-size-asian="5.25pt" style:font-style-asian="normal" style:font-size-complex="6pt" style:font-style-complex="normal"/>
    </style:style>
    <style:style style:name="P102" style:family="paragraph" style:parent-style-name="Standard">
      <style:paragraph-properties fo:margin-left="0mm" fo:line-height="115%" fo:text-align="justify" style:justify-single-word="false" fo:text-indent="0mm" style:auto-text-indent="false">
        <style:tab-stops>
          <style:tab-stop style:position="0.88mm"/>
        </style:tab-stops>
      </style:paragraph-properties>
      <style:text-properties style:use-window-font-color="true" loext:opacity="0%" style:font-name="Times New Roman" fo:font-size="12pt" fo:font-style="normal" style:text-underline-style="none" officeooo:rsid="0078da0c" officeooo:paragraph-rsid="0037a5cc" style:font-size-asian="12pt" style:font-style-asian="normal" style:font-size-complex="12pt" style:font-style-complex="normal"/>
    </style:style>
    <style:style style:name="P103" style:family="paragraph" style:parent-style-name="Standard">
      <style:paragraph-properties fo:margin-left="0mm" fo:line-height="115%" fo:text-align="justify" style:justify-single-word="false" fo:text-indent="0mm" style:auto-text-indent="false">
        <style:tab-stops>
          <style:tab-stop style:position="0.88mm"/>
        </style:tab-stops>
      </style:paragraph-properties>
      <style:text-properties officeooo:paragraph-rsid="00c1e2ee"/>
    </style:style>
    <style:style style:name="P104" style:family="paragraph" style:parent-style-name="Standard">
      <style:paragraph-properties fo:margin-left="0mm" fo:line-height="115%" fo:text-align="justify" style:justify-single-word="false" fo:text-indent="0mm" style:auto-text-indent="false">
        <style:tab-stops>
          <style:tab-stop style:position="0.88mm"/>
        </style:tab-stops>
      </style:paragraph-properties>
      <style:text-properties style:use-window-font-color="true" loext:opacity="0%" style:font-name="Times New Roman" fo:font-size="12pt" fo:font-style="normal" style:text-underline-style="none" officeooo:rsid="007c79c3" officeooo:paragraph-rsid="00c1e2ee" style:font-size-asian="12pt" style:font-style-asian="normal" style:font-size-complex="12pt" style:font-style-complex="normal"/>
    </style:style>
    <style:style style:name="P105" style:family="paragraph" style:parent-style-name="Heading_20_2" style:list-style-name=""/>
    <style:style style:name="P106" style:family="paragraph" style:parent-style-name="Figure">
      <style:paragraph-properties fo:text-align="center" style:justify-single-word="false"/>
    </style:style>
    <style:style style:name="P107" style:family="paragraph">
      <loext:graphic-properties draw:fill="none" draw:fill-color="#ffffff"/>
      <style:paragraph-properties fo:margin-left="0mm" fo:margin-right="0mm" fo:margin-top="0mm" fo:margin-bottom="0mm" fo:line-height="100%" fo:text-align="center" fo:text-indent="0mm" style:text-autospace="ideograph-alpha" style:punctuation-wrap="hanging" loext:tab-stop-distance="0mm">
        <style:tab-stops/>
      </style:paragraph-properties>
      <style:text-properties fo:font-variant="normal" fo:text-transform="none" fo:color="#2c3e50" loext:opacity="100%" style:text-outline="false" style:text-line-through-style="none" style:text-line-through-type="none"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08"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74a815" officeooo:paragraph-rsid="005ef617" style:font-size-asian="12pt" style:font-style-asian="normal" style:font-size-complex="12pt" style:font-style-complex="normal"/>
    </style:style>
    <style:style style:name="P109" style:family="paragraph" style:parent-style-name="Text_20_body" style:list-style-name="L4">
      <style:paragraph-properties fo:text-align="justify" style:justify-single-word="false">
        <style:tab-stops>
          <style:tab-stop style:position="0.88mm"/>
        </style:tab-stops>
      </style:paragraph-properties>
      <style:text-properties style:use-window-font-color="true" loext:opacity="0%" officeooo:paragraph-rsid="00367867"/>
    </style:style>
    <style:style style:name="P110" style:family="paragraph" style:parent-style-name="Text_20_body" style:list-style-name="L4">
      <style:paragraph-properties fo:text-align="justify" style:justify-single-word="false">
        <style:tab-stops>
          <style:tab-stop style:position="0.88mm"/>
        </style:tab-stops>
      </style:paragraph-properties>
      <style:text-properties officeooo:paragraph-rsid="005ef617"/>
    </style:style>
    <style:style style:name="P111" style:family="paragraph" style:parent-style-name="Text_20_body">
      <style:text-properties officeooo:rsid="0064fa31"/>
    </style:style>
    <style:style style:name="P112" style:family="paragraph" style:parent-style-name="Contents_20_Heading">
      <style:text-properties officeooo:paragraph-rsid="00c417b3"/>
    </style:style>
    <style:style style:name="P113" style:family="paragraph" style:parent-style-name="Contents_20_1">
      <style:paragraph-properties>
        <style:tab-stops>
          <style:tab-stop style:position="169.99mm" style:type="right" style:leader-style="dotted" style:leader-text="."/>
        </style:tab-stops>
      </style:paragraph-properties>
      <style:text-properties officeooo:paragraph-rsid="00c417b3"/>
    </style:style>
    <style:style style:name="P114" style:family="paragraph" style:parent-style-name="Contents_20_2">
      <style:paragraph-properties>
        <style:tab-stops>
          <style:tab-stop style:position="164.99mm" style:type="right" style:leader-style="dotted" style:leader-text="."/>
        </style:tab-stops>
      </style:paragraph-properties>
      <style:text-properties officeooo:paragraph-rsid="00c417b3"/>
    </style:style>
    <style:style style:name="P115" style:family="paragraph" style:parent-style-name="Text_20_body">
      <style:text-properties officeooo:rsid="0064fa31" officeooo:paragraph-rsid="00c417b3"/>
    </style:style>
    <style:style style:name="P116" style:family="paragraph" style:parent-style-name="Text_20_body">
      <style:text-properties officeooo:paragraph-rsid="008c31d4"/>
    </style:style>
    <style:style style:name="P117" style:family="paragraph" style:parent-style-name="Text_20_body">
      <style:paragraph-properties fo:text-align="justify" style:justify-single-word="false"/>
      <style:text-properties officeooo:rsid="0064fa31" officeooo:paragraph-rsid="008c31d4"/>
    </style:style>
    <style:style style:name="P118" style:family="paragraph" style:parent-style-name="Text_20_body">
      <style:paragraph-properties fo:text-align="justify" style:justify-single-word="false"/>
      <style:text-properties officeooo:paragraph-rsid="008c31d4"/>
    </style:style>
    <style:style style:name="P119" style:family="paragraph" style:parent-style-name="Text_20_body">
      <style:text-properties style:text-underline-style="none" fo:font-weight="normal" style:font-weight-asian="normal" style:font-weight-complex="normal"/>
    </style:style>
    <style:style style:name="P120" style:family="paragraph" style:parent-style-name="Text_20_body" style:list-style-name="L5">
      <style:paragraph-properties fo:text-align="justify" style:justify-single-word="false"/>
      <style:text-properties fo:font-weight="normal" officeooo:rsid="0067b780" officeooo:paragraph-rsid="0067b780" style:font-weight-asian="normal" style:font-weight-complex="normal"/>
    </style:style>
    <style:style style:name="P121" style:family="paragraph" style:parent-style-name="Text_20_body" style:list-style-name="L5">
      <style:paragraph-properties fo:text-align="justify" style:justify-single-word="false"/>
      <style:text-properties fo:font-weight="normal" officeooo:rsid="0064fa31" officeooo:paragraph-rsid="0064fa31" style:font-weight-asian="normal" style:font-weight-complex="normal"/>
    </style:style>
    <style:style style:name="P122" style:family="paragraph" style:parent-style-name="Text_20_body" style:list-style-name="L5">
      <style:paragraph-properties fo:text-align="justify" style:justify-single-word="false"/>
      <style:text-properties fo:font-weight="normal" officeooo:rsid="0064fa31" officeooo:paragraph-rsid="006e0608" style:font-weight-asian="normal" style:font-weight-complex="normal"/>
    </style:style>
    <style:style style:name="P123" style:family="paragraph" style:parent-style-name="Text_20_body" style:list-style-name="L5">
      <style:paragraph-properties fo:text-align="justify" style:justify-single-word="false"/>
      <style:text-properties fo:font-weight="normal" officeooo:rsid="0064fa31" officeooo:paragraph-rsid="006f2310" style:font-weight-asian="normal" style:font-weight-complex="normal"/>
    </style:style>
    <style:style style:name="P124" style:family="paragraph" style:parent-style-name="Text_20_body" style:list-style-name="L5">
      <style:paragraph-properties fo:text-align="justify" style:justify-single-word="false"/>
      <style:text-properties fo:font-weight="normal" officeooo:rsid="0066c7f7" officeooo:paragraph-rsid="006f2310" style:font-weight-asian="normal" style:font-weight-complex="normal"/>
    </style:style>
    <style:style style:name="P125" style:family="paragraph" style:parent-style-name="Text_20_body" style:list-style-name="L5">
      <style:paragraph-properties fo:text-align="justify" style:justify-single-word="false"/>
      <style:text-properties fo:font-weight="normal" officeooo:rsid="00706e6d" officeooo:paragraph-rsid="00706e6d" style:font-weight-asian="normal" style:font-weight-complex="normal"/>
    </style:style>
    <style:style style:name="P126" style:family="paragraph" style:parent-style-name="Text_20_body">
      <style:paragraph-properties fo:text-align="justify" style:justify-single-word="false"/>
      <style:text-properties fo:font-weight="normal" officeooo:rsid="0066c7f7" officeooo:paragraph-rsid="006c25ab" style:font-weight-asian="normal" style:font-weight-complex="normal"/>
    </style:style>
    <style:style style:name="P127" style:family="paragraph" style:parent-style-name="Text_20_body" style:list-style-name="L6">
      <style:paragraph-properties fo:text-align="justify" style:justify-single-word="false"/>
      <style:text-properties fo:font-weight="normal" officeooo:rsid="0066c7f7" officeooo:paragraph-rsid="006858de" style:font-weight-asian="normal" style:font-weight-complex="normal"/>
    </style:style>
    <style:style style:name="P128" style:family="paragraph" style:parent-style-name="Text_20_body" style:list-style-name="L6">
      <style:paragraph-properties fo:text-align="justify" style:justify-single-word="false"/>
      <style:text-properties fo:font-weight="normal" officeooo:rsid="0067b780" officeooo:paragraph-rsid="006858de" style:font-weight-asian="normal" style:font-weight-complex="normal"/>
    </style:style>
    <style:style style:name="P129" style:family="paragraph" style:parent-style-name="Text_20_body" style:list-style-name="L6">
      <style:paragraph-properties fo:text-align="justify" style:justify-single-word="false"/>
      <style:text-properties fo:font-weight="normal" officeooo:rsid="006858de" officeooo:paragraph-rsid="006858de" style:font-weight-asian="normal" style:font-weight-complex="normal"/>
    </style:style>
    <style:style style:name="P130" style:family="paragraph" style:parent-style-name="Text_20_body" style:list-style-name="L6">
      <style:paragraph-properties fo:text-align="justify" style:justify-single-word="false"/>
      <style:text-properties fo:font-weight="normal" officeooo:rsid="006c25ab" officeooo:paragraph-rsid="009eb718" style:font-weight-asian="normal" style:font-weight-complex="normal"/>
    </style:style>
    <style:style style:name="P131" style:family="paragraph" style:parent-style-name="Text_20_body">
      <style:paragraph-properties fo:text-align="justify" style:justify-single-word="false"/>
      <style:text-properties fo:font-weight="normal" officeooo:rsid="006aeb7e" officeooo:paragraph-rsid="006c25ab" style:font-weight-asian="normal" style:font-weight-complex="normal"/>
    </style:style>
    <style:style style:name="P132" style:family="paragraph" style:parent-style-name="Figure">
      <style:paragraph-properties fo:text-align="center" style:justify-single-word="false"/>
      <style:text-properties officeooo:paragraph-rsid="009f9808"/>
    </style:style>
    <style:style style:name="P133" style:family="paragraph" style:parent-style-name="Text_20_body">
      <style:paragraph-properties fo:text-align="justify" style:justify-single-word="false"/>
      <style:text-properties officeooo:paragraph-rsid="009f9808"/>
    </style:style>
    <style:style style:name="P134" style:family="paragraph" style:parent-style-name="Text_20_body">
      <style:paragraph-properties fo:text-align="justify" style:justify-single-word="false"/>
      <style:text-properties style:font-name="Al Nile" fo:font-weight="normal" officeooo:rsid="006e0608" officeooo:paragraph-rsid="009f9808" style:font-weight-asian="normal" style:font-weight-complex="normal"/>
    </style:style>
    <style:style style:name="P135" style:family="paragraph" style:parent-style-name="Table_20_Contents">
      <style:paragraph-properties fo:text-align="center" style:justify-single-word="false"/>
      <style:text-properties fo:font-weight="bold" officeooo:rsid="009fbe8d" officeooo:paragraph-rsid="009fbe8d" style:font-weight-asian="bold" style:font-weight-complex="bold"/>
    </style:style>
    <style:style style:name="P136" style:family="paragraph" style:parent-style-name="Table_20_Contents">
      <style:paragraph-properties fo:text-align="center" style:justify-single-word="false"/>
      <style:text-properties fo:font-weight="bold" officeooo:rsid="00a14a7f" officeooo:paragraph-rsid="00a14a7f" style:font-weight-asian="bold" style:font-weight-complex="bold"/>
    </style:style>
    <style:style style:name="P137" style:family="paragraph" style:parent-style-name="Table_20_Contents">
      <style:paragraph-properties fo:text-align="left" style:justify-single-word="false"/>
      <style:text-properties fo:color="#ff420e" loext:opacity="100%" fo:font-size="12pt" style:font-size-asian="12pt" style:font-size-complex="12pt"/>
    </style:style>
    <style:style style:name="P138" style:family="paragraph" style:parent-style-name="Table_20_Contents">
      <style:paragraph-properties fo:text-align="left" style:justify-single-word="false"/>
      <style:text-properties fo:color="#579d1c" loext:opacity="100%" fo:font-size="12pt" style:font-size-asian="12pt" style:font-size-complex="12pt"/>
    </style:style>
    <style:style style:name="P139" style:family="paragraph" style:parent-style-name="Table">
      <style:paragraph-properties fo:text-align="center" style:justify-single-word="false"/>
      <style:text-properties officeooo:paragraph-rsid="00ca73ae"/>
    </style:style>
    <style:style style:name="P140" style:family="paragraph" style:parent-style-name="Text_20_body">
      <style:paragraph-properties fo:text-align="justify" style:justify-single-word="false" fo:break-before="page"/>
      <style:text-properties fo:font-weight="normal" officeooo:rsid="006aeb7e" officeooo:paragraph-rsid="00a14a7f" style:font-weight-asian="normal" style:font-weight-complex="normal"/>
    </style:style>
    <style:style style:name="P141" style:family="paragraph" style:parent-style-name="Text_20_body" style:list-style-name="L7">
      <style:paragraph-properties fo:text-align="justify" style:justify-single-word="false"/>
      <style:text-properties fo:font-weight="normal" officeooo:rsid="006bf676" officeooo:paragraph-rsid="006bf676" style:font-weight-asian="normal" style:font-weight-complex="normal"/>
    </style:style>
    <style:style style:name="P142" style:family="paragraph" style:parent-style-name="Text_20_body" style:list-style-name="L7">
      <style:paragraph-properties fo:text-align="justify" style:justify-single-word="false"/>
      <style:text-properties fo:font-weight="normal" officeooo:rsid="006aeb7e" officeooo:paragraph-rsid="006c25ab" style:font-weight-asian="normal" style:font-weight-complex="normal"/>
    </style:style>
    <style:style style:name="P143" style:family="paragraph" style:parent-style-name="Text_20_body" style:list-style-name="L7">
      <style:paragraph-properties fo:text-align="justify" style:justify-single-word="false"/>
      <style:text-properties fo:font-weight="normal" officeooo:rsid="006c25ab" officeooo:paragraph-rsid="006c25ab" style:font-weight-asian="normal" style:font-weight-complex="normal"/>
    </style:style>
    <style:style style:name="P144" style:family="paragraph" style:parent-style-name="Text_20_body">
      <style:paragraph-properties fo:text-align="justify" style:justify-single-word="false"/>
      <style:text-properties officeooo:paragraph-rsid="0081aee0"/>
    </style:style>
    <style:style style:name="P145" style:family="paragraph" style:parent-style-name="Text_20_body">
      <style:paragraph-properties fo:text-align="center" style:justify-single-word="false"/>
      <style:text-properties officeooo:paragraph-rsid="0081aee0"/>
    </style:style>
    <style:style style:name="P146" style:family="paragraph" style:parent-style-name="Text_20_body">
      <style:paragraph-properties fo:text-align="center" style:justify-single-word="false"/>
      <style:text-properties fo:font-weight="normal" officeooo:rsid="0081aee0" officeooo:paragraph-rsid="0081aee0" style:font-weight-asian="normal" style:font-weight-complex="normal"/>
    </style:style>
    <style:style style:name="P147" style:family="paragraph" style:parent-style-name="Text_20_body">
      <style:paragraph-properties fo:text-align="justify" style:justify-single-word="false"/>
      <style:text-properties fo:font-weight="normal" officeooo:rsid="0074daa4" officeooo:paragraph-rsid="0081aee0" style:font-weight-asian="normal" style:font-weight-complex="normal"/>
    </style:style>
    <style:style style:name="P148" style:family="paragraph" style:parent-style-name="Text_20_body">
      <style:text-properties officeooo:rsid="007077a7" officeooo:paragraph-rsid="007077a7"/>
    </style:style>
    <style:style style:name="P149" style:family="paragraph" style:parent-style-name="Text_20_body">
      <style:text-properties officeooo:rsid="006e0608" officeooo:paragraph-rsid="006f89a7"/>
    </style:style>
    <style:style style:name="P150" style:family="paragraph" style:parent-style-name="Text_20_body" style:list-style-name="L5">
      <style:paragraph-properties fo:text-align="justify" style:justify-single-word="false"/>
      <style:text-properties fo:font-weight="normal" officeooo:rsid="0064fa31" officeooo:paragraph-rsid="00cc5f4b" style:font-weight-asian="normal" style:font-weight-complex="normal"/>
    </style:style>
    <style:style style:name="P151" style:family="paragraph" style:parent-style-name="Text_20_body" style:list-style-name="L5">
      <style:text-properties fo:font-weight="normal" officeooo:rsid="006f89a7" officeooo:paragraph-rsid="006f89a7" style:font-weight-asian="normal" style:font-weight-complex="normal"/>
    </style:style>
    <style:style style:name="P152" style:family="paragraph" style:parent-style-name="Text_20_body">
      <style:paragraph-properties fo:text-align="justify" style:justify-single-word="false"/>
      <style:text-properties fo:font-weight="normal" officeooo:rsid="006f89a7" officeooo:paragraph-rsid="00cc5f4b" style:font-weight-asian="normal" style:font-weight-complex="normal"/>
    </style:style>
    <style:style style:name="P153" style:family="paragraph" style:parent-style-name="Text_20_body">
      <style:text-properties officeooo:paragraph-rsid="00870464"/>
    </style:style>
    <style:style style:name="P154" style:family="paragraph" style:parent-style-name="Text_20_body">
      <style:text-properties officeooo:rsid="006e0608" officeooo:paragraph-rsid="00870464"/>
    </style:style>
    <style:style style:name="P155" style:family="paragraph" style:parent-style-name="Text_20_body" style:list-style-name="L8">
      <style:text-properties officeooo:rsid="00706e6d" officeooo:paragraph-rsid="00706e6d"/>
    </style:style>
    <style:style style:name="P156" style:family="paragraph" style:parent-style-name="Text_20_body">
      <style:paragraph-properties fo:text-align="justify" style:justify-single-word="false"/>
      <style:text-properties officeooo:paragraph-rsid="00706e6d"/>
    </style:style>
    <style:style style:name="P157" style:family="paragraph" style:parent-style-name="Heading_20_2">
      <style:text-properties officeooo:paragraph-rsid="00cd78bd"/>
    </style:style>
    <style:style style:name="P158" style:family="paragraph" style:parent-style-name="Text_20_body" style:list-style-name="L5">
      <style:paragraph-properties fo:text-align="justify" style:justify-single-word="false"/>
      <style:text-properties fo:font-weight="normal" officeooo:rsid="007077a7" officeooo:paragraph-rsid="007077a7" style:font-weight-asian="normal" style:font-weight-complex="normal"/>
    </style:style>
    <style:style style:name="P159" style:family="paragraph" style:parent-style-name="Text_20_body" style:list-style-name="L5">
      <style:paragraph-properties fo:text-align="justify" style:justify-single-word="false"/>
      <style:text-properties fo:font-weight="normal" officeooo:rsid="0064fa31" officeooo:paragraph-rsid="0070a2ad" style:font-weight-asian="normal" style:font-weight-complex="normal"/>
    </style:style>
    <style:style style:name="P160" style:family="paragraph" style:parent-style-name="Text_20_body" style:list-style-name="L5">
      <style:paragraph-properties fo:text-align="justify" style:justify-single-word="false"/>
      <style:text-properties fo:font-style="normal" style:text-underline-style="none" fo:font-weight="normal" officeooo:rsid="0070a2ad" officeooo:paragraph-rsid="0070a2ad" style:font-style-asian="normal" style:font-weight-asian="normal" style:font-style-complex="normal" style:font-weight-complex="normal"/>
    </style:style>
    <style:style style:name="P161" style:family="paragraph" style:parent-style-name="Text_20_body" style:list-style-name="L5">
      <style:paragraph-properties fo:text-align="justify" style:justify-single-word="false"/>
      <style:text-properties fo:font-style="normal" style:text-underline-style="none" fo:font-weight="normal" officeooo:rsid="0073fc38" officeooo:paragraph-rsid="0073fc38" style:font-style-asian="normal" style:font-weight-asian="normal" style:font-style-complex="normal" style:font-weight-complex="normal"/>
    </style:style>
    <style:style style:name="P162" style:family="paragraph" style:parent-style-name="Text_20_body" style:list-style-name="L5">
      <style:paragraph-properties fo:text-align="justify" style:justify-single-word="false"/>
      <style:text-properties fo:font-weight="normal" officeooo:rsid="0070a2ad" officeooo:paragraph-rsid="0070a2ad" style:font-weight-asian="normal" style:font-weight-complex="normal"/>
    </style:style>
    <style:style style:name="P163" style:family="paragraph" style:parent-style-name="Text_20_body">
      <style:paragraph-properties fo:text-align="justify" style:justify-single-word="false"/>
      <style:text-properties fo:font-weight="normal" officeooo:rsid="0070a2ad" officeooo:paragraph-rsid="0070a2ad" style:font-weight-asian="normal" style:font-weight-complex="normal"/>
    </style:style>
    <style:style style:name="P164" style:family="paragraph" style:parent-style-name="Text_20_body">
      <style:text-properties fo:font-weight="normal" officeooo:rsid="0070a2ad" officeooo:paragraph-rsid="0070a2ad" style:font-weight-asian="normal" style:font-weight-complex="normal"/>
    </style:style>
    <style:style style:name="P165" style:family="paragraph" style:parent-style-name="Text_20_body" style:list-style-name="L9">
      <style:paragraph-properties fo:text-align="justify" style:justify-single-word="false"/>
      <style:text-properties officeooo:paragraph-rsid="0070a2ad"/>
    </style:style>
    <style:style style:name="P166" style:family="paragraph" style:parent-style-name="Text_20_body" style:list-style-name="L9">
      <style:text-properties fo:font-weight="normal" officeooo:rsid="00764ae5" officeooo:paragraph-rsid="00764ae5" style:font-weight-asian="normal" style:font-weight-complex="normal"/>
    </style:style>
    <style:style style:name="P167" style:family="paragraph" style:parent-style-name="Text_20_body" style:list-style-name="L9">
      <style:paragraph-properties fo:text-align="justify" style:justify-single-word="false"/>
      <style:text-properties fo:font-weight="normal" officeooo:rsid="00740772" officeooo:paragraph-rsid="00758d5c" style:font-weight-asian="normal" style:font-weight-complex="normal"/>
    </style:style>
    <style:style style:name="P168" style:family="paragraph" style:parent-style-name="Text_20_body" style:list-style-name="L10">
      <style:paragraph-properties fo:text-align="justify" style:justify-single-word="false"/>
      <style:text-properties fo:font-weight="normal" officeooo:rsid="00758d5c" officeooo:paragraph-rsid="00758d5c" style:font-weight-asian="normal" style:font-weight-complex="normal"/>
    </style:style>
    <style:style style:name="P169" style:family="paragraph" style:parent-style-name="Text_20_body">
      <style:paragraph-properties fo:text-align="justify" style:justify-single-word="false"/>
      <style:text-properties officeooo:paragraph-rsid="00782a96"/>
    </style:style>
    <style:style style:name="P170" style:family="paragraph" style:parent-style-name="Text_20_body">
      <style:paragraph-properties fo:text-align="justify" style:justify-single-word="false"/>
      <style:text-properties fo:font-weight="normal" officeooo:rsid="00782a96" officeooo:paragraph-rsid="00782a96" style:font-weight-asian="normal" style:font-weight-complex="normal"/>
    </style:style>
    <style:style style:name="P171" style:family="paragraph" style:parent-style-name="Text_20_body">
      <style:paragraph-properties fo:text-align="justify" style:justify-single-word="false"/>
      <style:text-properties officeooo:paragraph-rsid="007c0b54"/>
    </style:style>
    <style:style style:name="P172" style:family="paragraph" style:parent-style-name="Text_20_body" style:list-style-name="L11">
      <style:paragraph-properties fo:text-align="justify" style:justify-single-word="false"/>
      <style:text-properties officeooo:paragraph-rsid="007d5688"/>
    </style:style>
    <style:style style:name="P173" style:family="paragraph" style:parent-style-name="Text_20_body" style:list-style-name="L11">
      <style:paragraph-properties fo:text-align="center" style:justify-single-word="false"/>
      <style:text-properties officeooo:rsid="007d5688" officeooo:paragraph-rsid="007d5688"/>
    </style:style>
    <style:style style:name="P174" style:family="paragraph" style:parent-style-name="Text_20_body" style:list-style-name="L11">
      <style:paragraph-properties fo:text-align="justify" style:justify-single-word="false"/>
      <style:text-properties officeooo:rsid="007d5688" officeooo:paragraph-rsid="007d5688"/>
    </style:style>
    <style:style style:name="P175" style:family="paragraph" style:parent-style-name="Text_20_body" style:list-style-name="L11">
      <style:paragraph-properties fo:text-align="justify" style:justify-single-word="false"/>
      <style:text-properties officeooo:rsid="007d5688" officeooo:paragraph-rsid="007e0dd0"/>
    </style:style>
    <style:style style:name="P176" style:family="paragraph" style:parent-style-name="Text_20_body" style:list-style-name="L11">
      <style:paragraph-properties fo:text-align="justify" style:justify-single-word="false"/>
      <style:text-properties officeooo:rsid="007c0b54" officeooo:paragraph-rsid="007e0dd0"/>
    </style:style>
    <style:style style:name="P177" style:family="paragraph" style:parent-style-name="Text_20_body" style:list-style-name="L11">
      <style:paragraph-properties fo:text-align="justify" style:justify-single-word="false"/>
      <style:text-properties officeooo:rsid="007e0dd0" officeooo:paragraph-rsid="007e0dd0"/>
    </style:style>
    <style:style style:name="P178" style:family="paragraph" style:parent-style-name="Text_20_body" style:list-style-name="L11">
      <style:paragraph-properties fo:text-align="justify" style:justify-single-word="false"/>
      <style:text-properties officeooo:rsid="00d1f4c1" officeooo:paragraph-rsid="00d1f4c1"/>
    </style:style>
    <style:style style:name="P179" style:family="paragraph" style:parent-style-name="Text_20_body">
      <style:paragraph-properties fo:text-align="justify" style:justify-single-word="false"/>
      <style:text-properties officeooo:rsid="007f2bf0" officeooo:paragraph-rsid="0081aee0"/>
    </style:style>
    <style:style style:name="P180" style:family="paragraph" style:parent-style-name="Text_20_body">
      <style:paragraph-properties fo:text-align="justify" style:justify-single-word="false"/>
      <style:text-properties fo:font-weight="normal" officeooo:rsid="0070a2ad" style:font-weight-asian="normal" style:font-weight-complex="normal"/>
    </style:style>
    <style:style style:name="P181" style:family="paragraph" style:parent-style-name="Text_20_body">
      <style:paragraph-properties fo:text-align="justify" style:justify-single-word="false"/>
      <style:text-properties fo:font-weight="normal" officeooo:rsid="0081aee0" officeooo:paragraph-rsid="00d2557b" style:font-weight-asian="normal" style:font-weight-complex="normal"/>
    </style:style>
    <style:style style:name="P182" style:family="paragraph" style:parent-style-name="Text_20_body">
      <style:paragraph-properties fo:text-align="justify" style:justify-single-word="false"/>
      <style:text-properties fo:font-weight="normal" officeooo:rsid="00841af4" officeooo:paragraph-rsid="00d2557b" style:font-weight-asian="normal" style:font-weight-complex="normal"/>
    </style:style>
    <style:style style:name="P183" style:family="paragraph" style:parent-style-name="Text_20_body">
      <style:text-properties officeooo:rsid="0070a2ad" officeooo:paragraph-rsid="00870464"/>
    </style:style>
    <style:style style:name="P184" style:family="paragraph" style:parent-style-name="Text_20_body">
      <style:text-properties officeooo:rsid="007077a7" officeooo:paragraph-rsid="00841af4"/>
    </style:style>
    <style:style style:name="P185" style:family="paragraph" style:parent-style-name="Text_20_body" style:list-style-name="L12">
      <style:text-properties officeooo:rsid="0084a203" officeooo:paragraph-rsid="0084a203"/>
    </style:style>
    <style:style style:name="P186" style:family="paragraph" style:parent-style-name="Text_20_body" style:list-style-name="L12">
      <style:text-properties officeooo:rsid="0084a203" officeooo:paragraph-rsid="00850acb"/>
    </style:style>
    <style:style style:name="P187" style:family="paragraph" style:parent-style-name="Text_20_body">
      <style:text-properties officeooo:rsid="00764ae5" officeooo:paragraph-rsid="00764ae5"/>
    </style:style>
    <style:style style:name="P188" style:family="paragraph" style:parent-style-name="Text_20_body">
      <style:text-properties officeooo:paragraph-rsid="00850acb"/>
    </style:style>
    <style:style style:name="P189" style:family="paragraph" style:parent-style-name="Text_20_body" style:list-style-name="L13">
      <style:text-properties officeooo:rsid="00706e6d" officeooo:paragraph-rsid="00850acb"/>
    </style:style>
    <style:style style:name="P190" style:family="paragraph" style:parent-style-name="Text_20_body" style:list-style-name="L13">
      <style:text-properties officeooo:paragraph-rsid="00850acb"/>
    </style:style>
    <style:style style:name="P191" style:family="paragraph" style:parent-style-name="Text_20_body">
      <style:paragraph-properties fo:text-align="justify" style:justify-single-word="false"/>
      <style:text-properties officeooo:rsid="00850acb" officeooo:paragraph-rsid="00850acb"/>
    </style:style>
    <style:style style:name="P192" style:family="paragraph" style:parent-style-name="Text_20_body">
      <style:text-properties officeooo:rsid="00850acb" officeooo:paragraph-rsid="00850acb"/>
    </style:style>
    <style:style style:name="P193" style:family="paragraph" style:parent-style-name="Text_20_body">
      <style:text-properties officeooo:rsid="00764ae5" officeooo:paragraph-rsid="00870464"/>
    </style:style>
    <style:style style:name="P194" style:family="paragraph" style:parent-style-name="Text_20_body">
      <style:text-properties officeooo:rsid="007077a7" officeooo:paragraph-rsid="00870464"/>
    </style:style>
    <style:style style:name="P195" style:family="paragraph" style:parent-style-name="Text_20_body" style:list-style-name="L12">
      <style:text-properties officeooo:rsid="00870464" officeooo:paragraph-rsid="00870464"/>
    </style:style>
    <style:style style:name="P196" style:family="paragraph" style:parent-style-name="Text_20_body">
      <style:paragraph-properties fo:text-align="justify" style:justify-single-word="false"/>
      <style:text-properties officeooo:rsid="00875b6b" officeooo:paragraph-rsid="00875b6b"/>
    </style:style>
    <style:style style:name="P197" style:family="paragraph" style:parent-style-name="Heading_20_1">
      <style:paragraph-properties fo:text-align="justify" style:justify-single-word="false"/>
      <style:text-properties officeooo:paragraph-rsid="00c5936d"/>
    </style:style>
    <style:style style:name="P198" style:family="paragraph" style:parent-style-name="Heading_20_1">
      <style:text-properties officeooo:paragraph-rsid="00c5936d"/>
    </style:style>
    <style:style style:name="P199" style:family="paragraph" style:parent-style-name="Preformatted_20_Text">
      <style:text-properties fo:font-size="14pt" officeooo:rsid="0069e38e" officeooo:paragraph-rsid="00c5936d" style:font-size-asian="14pt" style:font-size-complex="14pt"/>
    </style:style>
    <style:style style:name="P200" style:family="paragraph" style:parent-style-name="Preformatted_20_Text">
      <style:text-properties fo:font-size="14pt" officeooo:rsid="0069e38e" officeooo:paragraph-rsid="0081aee0" style:font-size-asian="14pt" style:font-size-complex="14pt"/>
    </style:style>
    <style:style style:name="P201" style:family="paragraph" style:parent-style-name="Preformatted_20_Text">
      <style:text-properties officeooo:rsid="0069e38e" officeooo:paragraph-rsid="0081aee0"/>
    </style:style>
    <style:style style:name="P202" style:family="paragraph" style:parent-style-name="Preformatted_20_Text">
      <style:paragraph-properties fo:margin-left="0mm" fo:text-indent="0mm" style:auto-text-indent="false"/>
      <style:text-properties officeooo:paragraph-rsid="00c5936d"/>
    </style:style>
    <style:style style:name="P203" style:family="paragraph" style:parent-style-name="Preformatted_20_Text">
      <style:paragraph-properties fo:margin-left="0mm" fo:text-indent="0mm" style:auto-text-indent="false"/>
      <style:text-properties fo:font-size="14pt" officeooo:rsid="0069e38e" officeooo:paragraph-rsid="00c5936d" style:font-size-asian="14pt" style:font-size-complex="14pt"/>
    </style:style>
    <style:style style:name="P204" style:family="paragraph" style:parent-style-name="Preformatted_20_Text">
      <style:text-properties officeooo:paragraph-rsid="008a5834"/>
    </style:style>
    <style:style style:name="P205" style:family="paragraph" style:parent-style-name="Heading_20_1" style:list-style-name=""/>
    <style:style style:name="T1" style:family="text">
      <style:text-properties officeooo:rsid="00d2557b"/>
    </style:style>
    <style:style style:name="T2" style:family="text">
      <style:text-properties style:text-position="super 58%"/>
    </style:style>
    <style:style style:name="T3" style:family="text">
      <style:text-properties fo:font-size="14pt" fo:font-style="normal" fo:font-weight="bold" officeooo:rsid="00a4a58e" style:font-size-asian="14pt" style:font-style-asian="normal" style:font-weight-asian="bold" style:font-size-complex="14pt" style:font-style-complex="normal" style:font-weight-complex="bold"/>
    </style:style>
    <style:style style:name="T4" style:family="text">
      <style:text-properties fo:font-style="italic" style:font-style-asian="italic" style:font-style-complex="italic"/>
    </style:style>
    <style:style style:name="T5" style:family="text">
      <style:text-properties fo:font-style="normal"/>
    </style:style>
    <style:style style:name="T6" style:family="text">
      <style:text-properties officeooo:rsid="00be1f81"/>
    </style:style>
    <style:style style:name="T7" style:family="text">
      <style:text-properties officeooo:rsid="00b0a52d"/>
    </style:style>
    <style:style style:name="T8" style:family="text">
      <style:text-properties style:text-underline-style="solid" style:text-underline-width="auto" style:text-underline-color="font-color" fo:font-weight="normal"/>
    </style:style>
    <style:style style:name="T9" style:family="text">
      <style:text-properties fo:font-weight="normal"/>
    </style:style>
    <style:style style:name="T10" style:family="text">
      <style:text-properties officeooo:rsid="00b25a82"/>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officeooo:rsid="00b58d29"/>
    </style:style>
    <style:style style:name="T14" style:family="text">
      <style:text-properties fo:font-style="normal" style:text-underline-style="solid" style:text-underline-width="auto" style:text-underline-color="font-color" fo:font-weight="bold" officeooo:rsid="00b58d29" style:font-weight-asian="bold" style:font-weight-complex="bold"/>
    </style:style>
    <style:style style:name="T15" style:family="text">
      <style:text-properties fo:font-style="normal" style:text-underline-style="none" fo:font-weight="normal" officeooo:rsid="00b58d29" style:font-weight-asian="bold" style:font-weight-complex="bold"/>
    </style:style>
    <style:style style:name="T16" style:family="text">
      <style:text-properties fo:font-style="italic" style:text-underline-style="none" fo:font-weight="normal" officeooo:rsid="00b58d29" style:font-style-asian="italic" style:font-weight-asian="bold" style:font-style-complex="italic" style:font-weight-complex="bold"/>
    </style:style>
    <style:style style:name="T17" style:family="text">
      <style:text-properties style:text-underline-style="solid" style:text-underline-width="auto" style:text-underline-color="font-color" officeooo:rsid="00b0a52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style>
    <style:style style:name="T20" style:family="text">
      <style:text-properties officeooo:rsid="002ce802"/>
    </style:style>
    <style:style style:name="T21" style:family="text">
      <style:text-properties officeooo:rsid="00b43466"/>
    </style:style>
    <style:style style:name="T22" style:family="text">
      <style:text-properties officeooo:rsid="002c1a12"/>
    </style:style>
    <style:style style:name="T23" style:family="text">
      <style:text-properties fo:language="en" fo:country="US" officeooo:rsid="0028bca7"/>
    </style:style>
    <style:style style:name="T24" style:family="text">
      <style:text-properties fo:language="en" fo:country="US" officeooo:rsid="0027afd5"/>
    </style:style>
    <style:style style:name="T25" style:family="text">
      <style:text-properties officeooo:rsid="00b6c980"/>
    </style:style>
    <style:style style:name="T26" style:family="text">
      <style:text-properties officeooo:rsid="002a8018"/>
    </style:style>
    <style:style style:name="T27" style:family="text">
      <style:text-properties officeooo:rsid="00b70293"/>
    </style:style>
    <style:style style:name="T28" style:family="text">
      <style:text-properties officeooo:rsid="002aa633"/>
    </style:style>
    <style:style style:name="T29" style:family="text">
      <style:text-properties officeooo:rsid="003a36a9"/>
    </style:style>
    <style:style style:name="T30" style:family="text">
      <style:text-properties officeooo:rsid="00740772"/>
    </style:style>
    <style:style style:name="T31" style:family="text">
      <style:text-properties officeooo:rsid="0091c51e"/>
    </style:style>
    <style:style style:name="T32" style:family="text">
      <style:text-properties officeooo:rsid="0093ac58"/>
    </style:style>
    <style:style style:name="T33" style:family="text">
      <style:text-properties officeooo:rsid="00b8f040"/>
    </style:style>
    <style:style style:name="T34" style:family="text">
      <style:text-properties officeooo:rsid="00952a1f"/>
    </style:style>
    <style:style style:name="T35" style:family="text">
      <style:text-properties officeooo:rsid="0096e51d"/>
    </style:style>
    <style:style style:name="T36" style:family="text">
      <style:text-properties style:text-underline-style="none" officeooo:rsid="00952a1f"/>
    </style:style>
    <style:style style:name="T37" style:family="text">
      <style:text-properties style:text-underline-style="none" officeooo:rsid="00b8f040"/>
    </style:style>
    <style:style style:name="T38" style:family="text">
      <style:text-properties style:text-underline-style="none" officeooo:rsid="00baa9c7"/>
    </style:style>
    <style:style style:name="T39" style:family="text">
      <style:text-properties style:text-underline-style="none" officeooo:rsid="0096e51d"/>
    </style:style>
    <style:style style:name="T40" style:family="text">
      <style:text-properties officeooo:rsid="00baa9c7"/>
    </style:style>
    <style:style style:name="T41" style:family="text">
      <style:text-properties officeooo:rsid="00976868"/>
    </style:style>
    <style:style style:name="T42" style:family="text">
      <style:text-properties officeooo:rsid="0096e7d1"/>
    </style:style>
    <style:style style:name="T43" style:family="text">
      <style:text-properties officeooo:rsid="00bbddf2"/>
    </style:style>
    <style:style style:name="T44" style:family="text">
      <style:text-properties officeooo:rsid="00995e14"/>
    </style:style>
    <style:style style:name="T45" style:family="text">
      <style:text-properties style:use-window-font-color="true" loext:opacity="0%" style:font-name="Times New Roman" officeooo:rsid="007cdf5f" style:font-size-asian="12pt"/>
    </style:style>
    <style:style style:name="T46" style:family="text">
      <style:text-properties style:use-window-font-color="true" loext:opacity="0%" style:font-name="Times New Roman" officeooo:rsid="00995e14" style:font-size-asian="12pt"/>
    </style:style>
    <style:style style:name="T47" style:family="text">
      <style:text-properties officeooo:rsid="00bc88c7"/>
    </style:style>
    <style:style style:name="T48" style:family="text">
      <style:text-properties officeooo:rsid="009b3935"/>
    </style:style>
    <style:style style:name="T49" style:family="text">
      <style:text-properties officeooo:rsid="00bc27d6"/>
    </style:style>
    <style:style style:name="T50" style:family="text">
      <style:text-properties style:use-window-font-color="true" loext:opacity="0%" style:font-name="Times New Roman" officeooo:rsid="009b3935" style:font-size-asian="12pt"/>
    </style:style>
    <style:style style:name="T51" style:family="text">
      <style:text-properties officeooo:rsid="009cabcf"/>
    </style:style>
    <style:style style:name="T52" style:family="text">
      <style:text-properties style:use-window-font-color="true" loext:opacity="0%" style:font-name="Times New Roman" officeooo:rsid="009cabcf" style:font-size-asian="12pt"/>
    </style:style>
    <style:style style:name="T53" style:family="text">
      <style:text-properties style:use-window-font-color="true" loext:opacity="0%" style:font-name="Times New Roman" fo:font-size="14pt" fo:font-style="italic" officeooo:rsid="007cdf5f" style:font-size-asian="14pt" style:font-style-asian="italic" style:font-size-complex="14pt" style:font-style-complex="italic"/>
    </style:style>
    <style:style style:name="T54" style:family="text">
      <style:text-properties style:font-name="Times New Roman" fo:font-size="14pt" fo:font-style="italic" style:font-size-asian="14pt" style:font-style-asian="italic" style:font-size-complex="14pt" style:font-style-complex="italic"/>
    </style:style>
    <style:style style:name="T55" style:family="text">
      <style:text-properties officeooo:rsid="009dfe96"/>
    </style:style>
    <style:style style:name="T56" style:family="text">
      <style:text-properties officeooo:rsid="001eb3ec"/>
    </style:style>
    <style:style style:name="T57" style:family="text">
      <style:text-properties officeooo:rsid="00305c09"/>
    </style:style>
    <style:style style:name="T58" style:family="text">
      <style:text-properties officeooo:rsid="00486540"/>
    </style:style>
    <style:style style:name="T59" style:family="text">
      <style:text-properties officeooo:rsid="00488caf"/>
    </style:style>
    <style:style style:name="T60" style:family="text">
      <style:text-properties style:use-window-font-color="true" loext:opacity="0%" officeooo:rsid="00488caf"/>
    </style:style>
    <style:style style:name="T61" style:family="text">
      <style:text-properties style:use-window-font-color="true" loext:opacity="0%" officeooo:rsid="00a3a0ae"/>
    </style:style>
    <style:style style:name="T62" style:family="text">
      <style:text-properties style:use-window-font-color="true" loext:opacity="0%" officeooo:rsid="004a3d34"/>
    </style:style>
    <style:style style:name="T63" style:family="text">
      <style:text-properties officeooo:rsid="00a3a0ae"/>
    </style:style>
    <style:style style:name="T64" style:family="text">
      <style:text-properties officeooo:rsid="004f4071"/>
    </style:style>
    <style:style style:name="T65" style:family="text">
      <style:text-properties officeooo:rsid="00bf2cf3"/>
    </style:style>
    <style:style style:name="T66" style:family="text">
      <style:text-properties officeooo:rsid="004a3d34"/>
    </style:style>
    <style:style style:name="T67" style:family="text">
      <style:text-properties officeooo:rsid="004a94fa"/>
    </style:style>
    <style:style style:name="T68" style:family="text">
      <style:text-properties officeooo:rsid="004d9cf6"/>
    </style:style>
    <style:style style:name="T69" style:family="text">
      <style:text-properties officeooo:rsid="004f81cc"/>
    </style:style>
    <style:style style:name="T70" style:family="text">
      <style:text-properties officeooo:rsid="00764ae5"/>
    </style:style>
    <style:style style:name="T71" style:family="text">
      <style:text-properties officeooo:rsid="00517204"/>
    </style:style>
    <style:style style:name="T72" style:family="text">
      <style:text-properties officeooo:rsid="0051c7e5"/>
    </style:style>
    <style:style style:name="T73" style:family="text">
      <style:text-properties officeooo:rsid="0053884d"/>
    </style:style>
    <style:style style:name="T74" style:family="text">
      <style:text-properties officeooo:rsid="00553b4f"/>
    </style:style>
    <style:style style:name="T75" style:family="text">
      <style:text-properties officeooo:rsid="005b330a"/>
    </style:style>
    <style:style style:name="T76" style:family="text">
      <style:text-properties fo:font-family="'Times New Roman'" style:font-style-name="Regular" style:font-family-generic="roman" officeooo:rsid="0053884d"/>
    </style:style>
    <style:style style:name="T77" style:family="text">
      <style:text-properties officeooo:rsid="00c0fcff"/>
    </style:style>
    <style:style style:name="T78" style:family="text">
      <style:text-properties officeooo:rsid="00566d69"/>
    </style:style>
    <style:style style:name="T79" style:family="text">
      <style:text-properties officeooo:rsid="0057b7c5"/>
    </style:style>
    <style:style style:name="T80" style:family="text">
      <style:text-properties officeooo:rsid="0057eb9c"/>
    </style:style>
    <style:style style:name="T81" style:family="text">
      <style:text-properties officeooo:rsid="0059b897"/>
    </style:style>
    <style:style style:name="T82" style:family="text">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T83" style:family="text">
      <style:text-properties style:use-window-font-color="true" loext:opacity="0%" style:font-name="Times New Roman" fo:font-size="12pt" fo:font-style="italic" style:text-underline-style="none" fo:font-weight="normal" officeooo:rsid="006fa2cc" style:font-size-asian="12pt" style:font-style-asian="italic" style:font-size-complex="12pt" style:font-style-complex="italic"/>
    </style:style>
    <style:style style:name="T84" style:family="text">
      <style:text-properties style:use-window-font-color="true" loext:opacity="0%" style:font-name="Times New Roman" fo:font-size="12pt" fo:font-style="normal" style:text-underline-style="none" fo:font-weight="normal" officeooo:rsid="00705f89" style:font-size-asian="12pt" style:font-style-asian="normal" style:font-size-complex="12pt" style:font-style-complex="normal"/>
    </style:style>
    <style:style style:name="T85" style:family="text">
      <style:text-properties style:use-window-font-color="true" loext:opacity="0%" style:font-name="Times New Roman" fo:font-size="12pt" fo:font-style="normal" style:text-underline-style="none" fo:font-weight="normal" officeooo:rsid="0071b504" style:font-size-asian="12pt" style:font-style-asian="normal" style:font-size-complex="12pt" style:font-style-complex="normal"/>
    </style:style>
    <style:style style:name="T86" style:family="text">
      <style:text-properties style:use-window-font-color="true" loext:opacity="0%" style:font-name="Times New Roman" fo:font-size="12pt" fo:font-style="normal" style:text-underline-style="none" fo:font-weight="normal" officeooo:rsid="00722684" style:font-size-asian="12pt" style:font-style-asian="normal" style:font-size-complex="12pt" style:font-style-complex="normal"/>
    </style:style>
    <style:style style:name="T87" style:family="text">
      <style:text-properties style:use-window-font-color="true" loext:opacity="0%" style:font-name="Times New Roman" fo:font-size="12pt" fo:font-style="normal" style:text-underline-style="none" fo:font-weight="normal" officeooo:rsid="007381f3" style:font-size-asian="12pt" style:font-style-asian="normal" style:font-size-complex="12pt" style:font-style-complex="normal"/>
    </style:style>
    <style:style style:name="T88" style:family="text">
      <style:text-properties style:use-window-font-color="true" loext:opacity="0%" style:font-name="Times New Roman" fo:font-size="12pt" fo:font-style="italic" style:text-underline-style="none" fo:font-weight="normal" officeooo:rsid="007381f3" style:font-size-asian="12pt" style:font-style-asian="italic" style:font-size-complex="12pt" style:font-style-complex="italic"/>
    </style:style>
    <style:style style:name="T89" style:family="text">
      <style:text-properties officeooo:rsid="00c1e2ee"/>
    </style:style>
    <style:style style:name="T90" style:family="text">
      <style:text-properties fo:font-variant="normal" fo:text-transform="none" style:text-position="0% 100%" fo:font-style="normal" style:text-underline-style="none" fo:font-weight="normal" officeooo:rsid="00c1e2ee"/>
    </style:style>
    <style:style style:name="T91" style:family="text">
      <style:text-properties officeooo:rsid="00c3d4e4"/>
    </style:style>
    <style:style style:name="T92" style:family="text">
      <style:text-properties style:text-position="super 58%" officeooo:rsid="00c3d4e4"/>
    </style:style>
    <style:style style:name="T93" style:family="text">
      <style:text-properties officeooo:rsid="00c417b3"/>
    </style:style>
    <style:style style:name="T94" style:family="text">
      <style:text-properties style:use-window-font-color="true" loext:opacity="0%"/>
    </style:style>
    <style:style style:name="T95" style:family="text">
      <style:text-properties style:use-window-font-color="true" loext:opacity="0%" officeooo:rsid="00395a42"/>
    </style:style>
    <style:style style:name="T96" style:family="text">
      <style:text-properties officeooo:rsid="00430b1f"/>
    </style:style>
    <style:style style:name="T97" style:family="text">
      <style:text-properties style:use-window-font-color="true" loext:opacity="0%" style:font-name="Times New Roman" fo:font-size="12pt" fo:font-style="normal" style:text-underline-style="none" fo:font-weight="normal" officeooo:rsid="00430b1f" style:font-size-asian="12pt" style:font-style-asian="normal" style:font-size-complex="12pt" style:font-style-complex="normal"/>
    </style:style>
    <style:style style:name="T98" style:family="text">
      <style:text-properties style:use-window-font-color="true" loext:opacity="0%" style:font-name="Times New Roman" fo:font-size="12pt" fo:font-style="normal" style:text-underline-style="none" fo:font-weight="normal" officeooo:rsid="0069423b" style:font-size-asian="12pt" style:font-style-asian="normal" style:font-size-complex="12pt" style:font-style-complex="normal"/>
    </style:style>
    <style:style style:name="T99" style:family="text">
      <style:text-properties style:use-window-font-color="true" loext:opacity="0%" style:font-name="Times New Roman" fo:font-size="12pt" fo:font-style="normal" style:text-underline-style="none" fo:font-weight="normal" officeooo:rsid="006b3a71" style:font-size-asian="12pt" style:font-style-asian="normal" style:font-size-complex="12pt" style:font-style-complex="normal"/>
    </style:style>
    <style:style style:name="T100" style:family="text">
      <style:text-properties style:use-window-font-color="true" loext:opacity="0%" style:font-name="Times New Roman" fo:font-size="12pt" fo:font-style="normal" style:text-underline-style="none" fo:font-weight="normal" officeooo:rsid="006f076c" style:font-size-asian="12pt" style:font-style-asian="normal" style:font-size-complex="12pt" style:font-style-complex="normal"/>
    </style:style>
    <style:style style:name="T101" style:family="text">
      <style:text-properties style:use-window-font-color="true" loext:opacity="0%" style:font-name="Times New Roman" fo:font-size="12pt" fo:font-style="normal" style:text-underline-style="none" fo:font-weight="normal" officeooo:rsid="00c3d4e4" style:font-size-asian="12pt" style:font-style-asian="normal" style:font-size-complex="12pt" style:font-style-complex="normal"/>
    </style:style>
    <style:style style:name="T102" style:family="text">
      <style:text-properties style:use-window-font-color="true" loext:opacity="0%" style:font-name="Times New Roman" fo:font-size="12pt" fo:font-style="normal" style:text-underline-style="none" fo:font-weight="normal" officeooo:rsid="006d6f59" style:font-size-asian="12pt" style:font-style-asian="normal" style:font-size-complex="12pt" style:font-style-complex="normal"/>
    </style:style>
    <style:style style:name="T103" style:family="text">
      <style:text-properties style:use-window-font-color="true" loext:opacity="0%" style:font-name="Times New Roman" fo:font-size="12pt" fo:font-style="normal" style:text-underline-style="none" fo:font-weight="normal" officeooo:rsid="006c6eae" style:font-size-asian="12pt" style:font-style-asian="normal" style:font-size-complex="12pt" style:font-style-complex="normal"/>
    </style:style>
    <style:style style:name="T104" style:family="text">
      <style:text-properties style:use-window-font-color="true" loext:opacity="0%" style:font-name="Times New Roman" fo:font-size="12pt" fo:font-style="normal" style:text-underline-style="none" fo:font-weight="normal" officeooo:rsid="006f0c81" style:font-size-asian="12pt" style:font-style-asian="normal" style:font-size-complex="12pt" style:font-style-complex="normal"/>
    </style:style>
    <style:style style:name="T105" style:family="text">
      <style:text-properties style:use-window-font-color="true" loext:opacity="0%" style:font-name="Times New Roman" fo:font-size="12pt" fo:font-style="normal" style:text-underline-style="none" fo:font-weight="normal" officeooo:rsid="00383eec" style:font-size-asian="12pt" style:font-style-asian="normal" style:font-size-complex="12pt" style:font-style-complex="normal"/>
    </style:style>
    <style:style style:name="T106" style:family="text">
      <style:text-properties officeooo:rsid="003c1c57"/>
    </style:style>
    <style:style style:name="T107" style:family="text">
      <style:text-properties fo:font-style="italic" officeooo:rsid="003c1c57" style:font-style-asian="italic" style:font-style-complex="italic"/>
    </style:style>
    <style:style style:name="T108" style:family="text">
      <style:text-properties officeooo:rsid="00383eec"/>
    </style:style>
    <style:style style:name="T109" style:family="text">
      <style:text-properties officeooo:rsid="00374472"/>
    </style:style>
    <style:style style:name="T110" style:family="text">
      <style:text-properties officeooo:rsid="00395a42"/>
    </style:style>
    <style:style style:name="T111" style:family="text">
      <style:text-properties officeooo:rsid="007a9265"/>
    </style:style>
    <style:style style:name="T112" style:family="text">
      <style:text-properties officeooo:rsid="0037a5cc"/>
    </style:style>
    <style:style style:name="T113" style:family="text">
      <style:text-properties style:use-window-font-color="true" loext:opacity="0%" style:font-name="Times New Roman" fo:font-size="12pt" fo:font-style="normal" style:text-underline-style="none" officeooo:rsid="007a9265" style:font-size-asian="12pt" style:font-style-asian="normal" style:font-size-complex="12pt" style:font-style-complex="normal"/>
    </style:style>
    <style:style style:name="T114" style:family="text">
      <style:text-properties style:use-window-font-color="true" loext:opacity="0%" style:font-name="Times New Roman" fo:font-size="12pt" fo:font-style="italic" style:text-underline-style="none" officeooo:rsid="007a9265" style:font-size-asian="12pt" style:font-style-asian="italic" style:font-size-complex="12pt" style:font-style-complex="italic"/>
    </style:style>
    <style:style style:name="T115" style:family="text">
      <style:text-properties style:use-window-font-color="true" loext:opacity="0%" style:font-name="Times New Roman" fo:font-size="12pt" fo:font-style="normal" style:text-underline-style="none" officeooo:rsid="007c79c3" style:font-size-asian="12pt" style:font-style-asian="normal" style:font-size-complex="12pt" style:font-style-complex="normal"/>
    </style:style>
    <style:style style:name="T116" style:family="text">
      <style:text-properties style:use-window-font-color="true" loext:opacity="0%" style:font-name="Times New Roman" fo:font-size="12pt" fo:font-style="normal" style:text-underline-style="none" fo:font-weight="normal" officeooo:rsid="0073c159" style:font-size-asian="12pt" style:font-style-asian="normal" style:font-size-complex="12pt" style:font-style-complex="normal"/>
    </style:style>
    <style:style style:name="T117" style:family="text">
      <style:text-properties style:use-window-font-color="true" loext:opacity="0%" style:font-name="Times New Roman" fo:font-size="12pt" fo:font-style="normal" style:text-underline-style="none" fo:font-weight="normal" officeooo:rsid="00367867" style:font-size-asian="12pt" style:font-style-asian="normal" style:font-size-complex="12pt" style:font-style-complex="normal"/>
    </style:style>
    <style:style style:name="T118" style:family="text">
      <style:text-properties style:use-window-font-color="true" loext:opacity="0%" style:font-name="Times New Roman" fo:font-size="12pt" fo:font-style="normal" style:text-underline-style="none" fo:font-weight="normal" officeooo:rsid="00740772" style:font-size-asian="12pt" style:font-style-asian="normal" style:font-size-complex="12pt" style:font-style-complex="normal"/>
    </style:style>
    <style:style style:name="T119" style:family="text">
      <style:text-properties style:use-window-font-color="true" loext:opacity="0%" style:font-name="Times New Roman" fo:font-size="12pt" fo:font-style="normal" style:text-underline-style="none" fo:font-weight="normal" officeooo:rsid="0074a815" style:font-size-asian="12pt" style:font-style-asian="normal" style:font-size-complex="12pt" style:font-style-complex="normal"/>
    </style:style>
    <style:style style:name="T120" style:family="text">
      <style:text-properties officeooo:rsid="00367867"/>
    </style:style>
    <style:style style:name="T121" style:family="text">
      <style:text-properties officeooo:rsid="0041aa99"/>
    </style:style>
    <style:style style:name="T122" style:family="text">
      <style:text-properties officeooo:rsid="00c5936d"/>
    </style:style>
    <style:style style:name="T123" style:family="text">
      <style:text-properties style:use-window-font-color="true" loext:opacity="0%" style:font-name="Times New Roman" fo:font-size="12pt" fo:font-style="normal" style:text-underline-style="none" fo:font-weight="normal" officeooo:rsid="00c5936d" style:font-size-asian="12pt" style:font-style-asian="normal" style:font-size-complex="12pt" style:font-style-complex="normal"/>
    </style:style>
    <style:style style:name="T124" style:family="text">
      <style:text-properties officeooo:rsid="0064fa31"/>
    </style:style>
    <style:style style:name="T125" style:family="text">
      <style:text-properties officeooo:rsid="00706e6d"/>
    </style:style>
    <style:style style:name="T126" style:family="text">
      <style:text-properties style:text-underline-style="none" officeooo:rsid="0064fa31"/>
    </style:style>
    <style:style style:name="T127" style:family="text">
      <style:text-properties style:text-underline-style="solid" style:text-underline-width="auto" style:text-underline-color="font-color" officeooo:rsid="0064fa31"/>
    </style:style>
    <style:style style:name="T128" style:family="text">
      <style:text-properties style:text-underline-style="solid" style:text-underline-width="auto" style:text-underline-color="font-color" officeooo:rsid="00c5936d"/>
    </style:style>
    <style:style style:name="T129" style:family="text">
      <style:text-properties officeooo:rsid="00c745cc"/>
    </style:style>
    <style:style style:name="T130" style:family="text">
      <style:text-properties fo:font-weight="bold" officeooo:rsid="0064fa31" style:font-weight-asian="bold" style:font-weight-complex="bold"/>
    </style:style>
    <style:style style:name="T131" style:family="text">
      <style:text-properties style:text-position="super 58%" fo:font-weight="bold" officeooo:rsid="0064fa31" style:font-weight-asian="bold" style:font-weight-complex="bold"/>
    </style:style>
    <style:style style:name="T132" style:family="text">
      <style:text-properties style:text-position="super 58%" officeooo:rsid="0064fa31"/>
    </style:style>
    <style:style style:name="T133" style:family="text">
      <style:text-properties officeooo:rsid="007077a7"/>
    </style:style>
    <style:style style:name="T134" style:family="text">
      <style:text-properties style:text-position="super 58%" officeooo:rsid="007077a7"/>
    </style:style>
    <style:style style:name="T135" style:family="text">
      <style:text-properties officeooo:rsid="006e0608"/>
    </style:style>
    <style:style style:name="T136" style:family="text">
      <style:text-properties officeooo:rsid="0084a203"/>
    </style:style>
    <style:style style:name="T137" style:family="text">
      <style:text-properties officeooo:rsid="00c94325"/>
    </style:style>
    <style:style style:name="T138" style:family="text">
      <style:text-properties style:text-underline-style="solid" style:text-underline-width="auto" style:text-underline-color="font-color" officeooo:rsid="00c94325"/>
    </style:style>
    <style:style style:name="T139" style:family="text">
      <style:text-properties style:text-underline-style="solid" style:text-underline-width="auto" style:text-underline-color="font-color" officeooo:rsid="006e0608"/>
    </style:style>
    <style:style style:name="T140" style:family="text">
      <style:text-properties style:text-underline-style="solid" style:text-underline-width="auto" style:text-underline-color="font-color" officeooo:rsid="00740772"/>
    </style:style>
    <style:style style:name="T141" style:family="text">
      <style:text-properties officeooo:rsid="006f2310"/>
    </style:style>
    <style:style style:name="T142" style:family="text">
      <style:text-properties officeooo:rsid="006858de"/>
    </style:style>
    <style:style style:name="T143" style:family="text">
      <style:text-properties style:text-underline-style="solid" style:text-underline-width="auto" style:text-underline-color="font-color" officeooo:rsid="006f2310"/>
    </style:style>
    <style:style style:name="T144" style:family="text">
      <style:text-properties style:text-underline-style="none" officeooo:rsid="006f2310"/>
    </style:style>
    <style:style style:name="T145" style:family="text">
      <style:text-properties style:text-underline-style="none" fo:font-weight="bold" style:font-weight-asian="bold" style:font-weight-complex="bold"/>
    </style:style>
    <style:style style:name="T146" style:family="text">
      <style:text-properties style:text-underline-style="none" fo:font-weight="bold" officeooo:rsid="006f2310" style:font-weight-asian="bold" style:font-weight-complex="bold"/>
    </style:style>
    <style:style style:name="T147" style:family="text">
      <style:text-properties fo:font-weight="bold" style:font-weight-asian="bold" style:font-weight-complex="bold"/>
    </style:style>
    <style:style style:name="T148" style:family="text">
      <style:text-properties style:text-position="super 58%" fo:font-weight="bold" style:font-weight-asian="bold" style:font-weight-complex="bold"/>
    </style:style>
    <style:style style:name="T149" style:family="text">
      <style:text-properties style:text-underline-style="none" officeooo:rsid="00ca73ae"/>
    </style:style>
    <style:style style:name="T150" style:family="text">
      <style:text-properties officeooo:rsid="0067b780"/>
    </style:style>
    <style:style style:name="T151" style:family="text">
      <style:text-properties officeooo:rsid="00ca73ae"/>
    </style:style>
    <style:style style:name="T152" style:family="text">
      <style:text-properties style:text-position="super 58%" officeooo:rsid="0067b780"/>
    </style:style>
    <style:style style:name="T153" style:family="text">
      <style:text-properties officeooo:rsid="0069e38e"/>
    </style:style>
    <style:style style:name="T154" style:family="text">
      <style:text-properties officeooo:rsid="006c25ab"/>
    </style:style>
    <style:style style:name="T155" style:family="text">
      <style:text-properties officeooo:rsid="006aeb7e"/>
    </style:style>
    <style:style style:name="T156" style:family="text">
      <style:text-properties officeooo:rsid="006f89a7"/>
    </style:style>
    <style:style style:name="T157" style:family="text">
      <style:text-properties officeooo:rsid="009f9808"/>
    </style:style>
    <style:style style:name="T158" style:family="text">
      <style:text-properties fo:font-weight="normal" officeooo:rsid="006aeb7e" style:font-weight-asian="normal" style:font-weight-complex="normal"/>
    </style:style>
    <style:style style:name="T159" style:family="text">
      <style:text-properties fo:font-weight="normal" officeooo:rsid="00ca73ae" style:font-weight-asian="normal" style:font-weight-complex="normal"/>
    </style:style>
    <style:style style:name="T160" style:family="text">
      <style:text-properties fo:font-weight="normal" officeooo:rsid="006bf676" style:font-weight-asian="normal" style:font-weight-complex="normal"/>
    </style:style>
    <style:style style:name="T161" style:family="text">
      <style:text-properties fo:font-weight="normal" officeooo:rsid="006e0608" style:font-weight-asian="normal" style:font-weight-complex="normal"/>
    </style:style>
    <style:style style:name="T162" style:family="text">
      <style:text-properties style:font-name="Al Nile" fo:font-weight="normal" officeooo:rsid="006e0608" style:font-weight-asian="normal" style:font-weight-complex="normal"/>
    </style:style>
    <style:style style:name="T163" style:family="text">
      <style:text-properties officeooo:rsid="00a14a7f"/>
    </style:style>
    <style:style style:name="T164" style:family="text">
      <style:text-properties officeooo:rsid="006bf676"/>
    </style:style>
    <style:style style:name="T165" style:family="text">
      <style:text-properties fo:font-weight="normal" officeooo:rsid="007f2bf0" style:font-weight-asian="normal" style:font-weight-complex="normal"/>
    </style:style>
    <style:style style:name="T166" style:family="text">
      <style:text-properties fo:font-weight="normal" officeooo:rsid="00cc5f4b" style:font-weight-asian="normal" style:font-weight-complex="normal"/>
    </style:style>
    <style:style style:name="T167" style:family="text">
      <style:text-properties style:text-underline-style="solid" style:text-underline-width="auto" style:text-underline-color="font-color" fo:font-weight="normal" officeooo:rsid="007f2bf0" style:font-weight-asian="normal" style:font-weight-complex="normal"/>
    </style:style>
    <style:style style:name="T168" style:family="text">
      <style:text-properties style:text-position="super 58%" fo:font-weight="normal" officeooo:rsid="007f2bf0" style:font-weight-asian="normal" style:font-weight-complex="normal"/>
    </style:style>
    <style:style style:name="T169" style:family="text">
      <style:text-properties fo:font-weight="normal" officeooo:rsid="008125cc" style:font-weight-asian="normal" style:font-weight-complex="normal"/>
    </style:style>
    <style:style style:name="T170" style:family="text">
      <style:text-properties fo:font-weight="bold" officeooo:rsid="008125cc" style:font-weight-asian="bold" style:font-weight-complex="bold"/>
    </style:style>
    <style:style style:name="T171" style:family="text">
      <style:text-properties fo:font-weight="normal" officeooo:rsid="00d09a40" style:font-weight-asian="normal" style:font-weight-complex="normal"/>
    </style:style>
    <style:style style:name="T172" style:family="text">
      <style:text-properties fo:font-weight="normal" officeooo:rsid="0081aee0" style:font-weight-asian="normal" style:font-weight-complex="normal"/>
    </style:style>
    <style:style style:name="T173" style:family="text">
      <style:text-properties fo:font-weight="normal" officeooo:rsid="0074daa4" style:font-weight-asian="normal" style:font-weight-complex="normal"/>
    </style:style>
    <style:style style:name="T174" style:family="text">
      <style:text-properties fo:font-style="italic" fo:font-weight="normal" officeooo:rsid="0081aee0" style:font-style-asian="italic" style:font-weight-asian="normal" style:font-style-complex="italic" style:font-weight-complex="normal"/>
    </style:style>
    <style:style style:name="T175" style:family="text">
      <style:text-properties fo:font-style="italic" fo:font-weight="normal" officeooo:rsid="009eb718" style:font-style-asian="italic" style:font-weight-asian="normal" style:font-style-complex="italic" style:font-weight-complex="normal"/>
    </style:style>
    <style:style style:name="T176" style:family="text">
      <style:text-properties style:text-position="super 58%" fo:font-weight="normal" officeooo:rsid="0074daa4" style:font-weight-asian="normal" style:font-weight-complex="normal"/>
    </style:style>
    <style:style style:name="T177" style:family="text">
      <style:text-properties officeooo:rsid="00cc5f4b"/>
    </style:style>
    <style:style style:name="T178" style:family="text">
      <style:text-properties officeooo:rsid="0074daa4"/>
    </style:style>
    <style:style style:name="T179" style:family="text">
      <style:text-properties officeooo:rsid="00cd78bd"/>
    </style:style>
    <style:style style:name="T180" style:family="text">
      <style:text-properties style:text-underline-style="solid" style:text-underline-width="auto" style:text-underline-color="font-color" officeooo:rsid="0074daa4"/>
    </style:style>
    <style:style style:name="T181" style:family="text">
      <style:text-properties style:text-underline-style="solid" style:text-underline-width="auto" style:text-underline-color="font-color" officeooo:rsid="008a5834"/>
    </style:style>
    <style:style style:name="T182" style:family="text">
      <style:text-properties style:text-underline-style="solid" style:text-underline-width="auto" style:text-underline-color="font-color" officeooo:rsid="00cd78bd"/>
    </style:style>
    <style:style style:name="T183" style:family="text">
      <style:text-properties officeooo:rsid="008a5834"/>
    </style:style>
    <style:style style:name="T184" style:family="text">
      <style:text-properties officeooo:rsid="00a328fb"/>
    </style:style>
    <style:style style:name="T185" style:family="text">
      <style:text-properties style:text-position="super 58%" style:text-underline-style="solid" style:text-underline-width="auto" style:text-underline-color="font-color"/>
    </style:style>
    <style:style style:name="T186" style:family="text">
      <style:text-properties officeooo:rsid="0070a2ad"/>
    </style:style>
    <style:style style:name="T187" style:family="text">
      <style:text-properties style:text-underline-style="solid" style:text-underline-width="auto" style:text-underline-color="font-color" officeooo:rsid="0070a2ad"/>
    </style:style>
    <style:style style:name="T188" style:family="text">
      <style:text-properties style:text-underline-style="solid" style:text-underline-width="auto" style:text-underline-color="font-color" officeooo:rsid="007077a7"/>
    </style:style>
    <style:style style:name="T189" style:family="text">
      <style:text-properties fo:font-style="italic" style:text-underline-style="solid" style:text-underline-width="auto" style:text-underline-color="font-color" officeooo:rsid="007077a7" style:font-style-asian="italic" style:font-style-complex="italic"/>
    </style:style>
    <style:style style:name="T190" style:family="text">
      <style:text-properties officeooo:rsid="0073fc38"/>
    </style:style>
    <style:style style:name="T191" style:family="text">
      <style:text-properties style:text-position="super 58%" officeooo:rsid="0073fc38"/>
    </style:style>
    <style:style style:name="T192" style:family="text">
      <style:text-properties style:text-underline-style="solid" style:text-underline-width="auto" style:text-underline-color="font-color" officeooo:rsid="007211df"/>
    </style:style>
    <style:style style:name="T193" style:family="text">
      <style:text-properties officeooo:rsid="007211df"/>
    </style:style>
    <style:style style:name="T194" style:family="text">
      <style:text-properties fo:font-weight="normal" officeooo:rsid="00740772" style:font-weight-asian="normal" style:font-weight-complex="normal"/>
    </style:style>
    <style:style style:name="T195" style:family="text">
      <style:text-properties fo:font-weight="normal" officeooo:rsid="007211df" style:font-weight-asian="normal" style:font-weight-complex="normal"/>
    </style:style>
    <style:style style:name="T196" style:family="text">
      <style:text-properties fo:font-weight="normal" officeooo:rsid="0073fc38" style:font-weight-asian="normal" style:font-weight-complex="normal"/>
    </style:style>
    <style:style style:name="T197" style:family="text">
      <style:text-properties officeooo:rsid="0081aee0"/>
    </style:style>
    <style:style style:name="T198" style:family="text">
      <style:text-properties officeooo:rsid="00758d5c"/>
    </style:style>
    <style:style style:name="T199" style:family="text">
      <style:text-properties fo:font-weight="normal" officeooo:rsid="00764ae5" style:font-weight-asian="normal" style:font-weight-complex="normal"/>
    </style:style>
    <style:style style:name="T200" style:family="text">
      <style:text-properties fo:font-weight="normal" officeooo:rsid="00782a96" style:font-weight-asian="normal" style:font-weight-complex="normal"/>
    </style:style>
    <style:style style:name="T201" style:family="text">
      <style:text-properties fo:font-variant="normal" fo:text-transform="none" style:text-position="0% 100%" fo:font-style="normal" style:text-underline-style="none" fo:font-weight="normal"/>
    </style:style>
    <style:style style:name="T202" style:family="text">
      <style:text-properties fo:font-variant="normal" fo:text-transform="none" style:text-position="0% 100%" fo:font-style="normal" style:text-underline-style="none" fo:font-weight="normal" officeooo:rsid="00764ae5"/>
    </style:style>
    <style:style style:name="T203" style:family="text">
      <style:text-properties fo:font-weight="normal" officeooo:rsid="00758d5c" style:font-weight-asian="normal" style:font-weight-complex="normal"/>
    </style:style>
    <style:style style:name="T204" style:family="text">
      <style:text-properties fo:font-weight="normal" officeooo:rsid="0070a2ad" style:font-weight-asian="normal" style:font-weight-complex="normal"/>
    </style:style>
    <style:style style:name="T205" style:family="text">
      <style:text-properties officeooo:rsid="007a19a5"/>
    </style:style>
    <style:style style:name="T206" style:family="text">
      <style:text-properties officeooo:rsid="007c0b54"/>
    </style:style>
    <style:style style:name="T207" style:family="text">
      <style:text-properties officeooo:rsid="00d1f4c1"/>
    </style:style>
    <style:style style:name="T208" style:family="text">
      <style:text-properties officeooo:rsid="007d5688"/>
    </style:style>
    <style:style style:name="T209" style:family="text">
      <style:text-properties officeooo:rsid="00d09a40"/>
    </style:style>
    <style:style style:name="T210" style:family="text">
      <style:text-properties officeooo:rsid="007e0dd0"/>
    </style:style>
    <style:style style:name="T211" style:family="text">
      <style:text-properties style:text-position="super 58%" officeooo:rsid="0081aee0"/>
    </style:style>
    <style:style style:name="T212" style:family="text">
      <style:text-properties officeooo:rsid="00837ef5"/>
    </style:style>
    <style:style style:name="T213" style:family="text">
      <style:text-properties officeooo:rsid="00841af4"/>
    </style:style>
    <style:style style:name="T214" style:family="text">
      <style:text-properties officeooo:rsid="00850acb"/>
    </style:style>
    <style:style style:name="T215" style:family="text">
      <style:text-properties officeooo:rsid="00870464"/>
    </style:style>
    <style:style style:name="T216" style:family="text">
      <style:text-properties style:text-position="super 58%" officeooo:rsid="00870464"/>
    </style:style>
    <style:style style:name="T217" style:family="text">
      <style:text-properties officeooo:rsid="00875b6b"/>
    </style:style>
    <style:style style:name="T218" style:family="text">
      <style:text-properties fo:font-size="14pt" officeooo:rsid="0081aee0" style:font-size-asian="14pt" style:font-size-complex="14pt"/>
    </style:style>
    <style:style style:name="T219" style:family="text">
      <style:text-properties fo:font-size="14pt" style:font-size-asian="14pt" style:font-size-complex="14pt"/>
    </style:style>
    <style:style style:name="T220" style:family="text">
      <style:text-properties fo:font-size="14pt" officeooo:rsid="0069e38e" style:font-size-asian="14pt" style:font-size-complex="14pt"/>
    </style:style>
    <style:style style:name="T221" style:family="text">
      <style:text-properties fo:font-style="italic" style:font-style-asian="italic"/>
    </style:style>
    <style:style style:name="fr1" style:family="graphic" style:parent-style-name="Graphics">
      <style:graphic-properties fo:margin-left="0mm" fo:margin-right="0mm" fo:margin-top="0mm" fo:margin-bottom="0mm" style:vertical-pos="from-top"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mirror="none" fo:clip="rect(0mm, 0mm, 0mm, 0mm)" draw:luminance="0%" draw:contrast="0%" draw:red="0%" draw:green="0%" draw:blue="0%" draw:gamma="100%" draw:color-inversion="false" draw:image-opacity="100%" draw:color-mode="standard" loext:decorative="false"/>
    </style:style>
    <style:style style:name="fr2" style:family="graphic" style:parent-style-name="Frame">
      <style:graphic-properties fo:margin-left="0mm" fo:margin-right="0mm" fo:margin-top="0mm" fo:margin-bottom="0mm" style:run-through="foreground" style:wrap="run-through" style:number-wrapped-paragraphs="no-limit"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22.38mm, 0mm, 21.5mm, 0m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mm" fo:text-indent="-6.35mm" fo:margin-left="25.21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mm" fo:text-indent="-6.35mm" fo:margin-left="31.56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mm" fo:text-indent="-6.35mm" fo:margin-left="37.91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mm" fo:text-indent="-6.35mm" fo:margin-left="44.26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mm" fo:text-indent="-6.35mm" fo:margin-left="50.6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mm" fo:text-indent="-6.35mm" fo:margin-left="56.96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mm" fo:text-indent="-6.35mm" fo:margin-left="63.31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mm" fo:text-indent="-6.35mm" fo:margin-left="69.66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mm" fo:text-indent="-6.35mm" fo:margin-left="76.01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mm" fo:text-indent="-6.35mm" fo:margin-left="82.36m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mm" fo:text-indent="-6.35mm" fo:margin-left="25.21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mm" fo:text-indent="-6.35mm" fo:margin-left="31.56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mm" fo:text-indent="-6.35mm" fo:margin-left="37.91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mm" fo:text-indent="-6.35mm" fo:margin-left="44.26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mm" fo:text-indent="-6.35mm" fo:margin-left="50.6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mm" fo:text-indent="-6.35mm" fo:margin-left="56.96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mm" fo:text-indent="-6.35mm" fo:margin-left="63.31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mm" fo:text-indent="-6.35mm" fo:margin-left="69.66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mm" fo:text-indent="-6.35mm" fo:margin-left="76.01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mm" fo:text-indent="-6.35mm" fo:margin-left="82.36m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mm" fo:text-indent="-6.35mm" fo:margin-left="25.21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mm" fo:text-indent="-6.35mm" fo:margin-left="31.56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mm" fo:text-indent="-6.35mm" fo:margin-left="37.91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mm" fo:text-indent="-6.35mm" fo:margin-left="44.26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mm" fo:text-indent="-6.35mm" fo:margin-left="50.6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mm" fo:text-indent="-6.35mm" fo:margin-left="56.96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mm" fo:text-indent="-6.35mm" fo:margin-left="63.31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mm" fo:text-indent="-6.35mm" fo:margin-left="69.66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mm" fo:text-indent="-6.35mm" fo:margin-left="76.01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mm" fo:text-indent="-6.35mm" fo:margin-left="82.36mm"/>
        </style:list-level-properties>
        <style:text-properties fo:font-family="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style:style style:name="gr1" style:family="graphic">
      <style:graphic-properties draw:stroke="none" draw:stroke-dash="Dashed_20__28_var_29__20_1" svg:stroke-width="0.3mm" svg:stroke-color="#1abc9c" draw:marker-start="" draw:marker-start-width="2.5mm" draw:marker-start-center="false" draw:marker-end="" draw:marker-end-width="2.5mm" draw:marker-end-center="false" draw:fill="none" draw:fill-color="#ffffff" draw:textarea-horizontal-align="center" draw:textarea-vertical-align="middle" draw:auto-grow-height="fals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loext:decorative="false" fo:margin-left="0mm" fo:margin-right="0mm" fo:margin-top="0mm" fo:margin-bottom="0mm" style:run-through="foreground" style:wrap="none" style:vertical-pos="top" style:vertical-rel="paragraph" style:horizontal-pos="center" style:horizontal-rel="paragraph"/>
    </style:style>
    <style:style style:name="gr2" style:family="graphic">
      <style:graphic-properties draw:stroke="none" draw:stroke-dash="Dashed_20__28_var_29__20_1" svg:stroke-width="0.3mm" svg:stroke-color="#1abc9c" draw:marker-start="" draw:marker-start-width="2.5mm" draw:marker-start-center="false" draw:marker-end="" draw:marker-end-width="2.5mm" draw:marker-end-center="false" draw:fill="none" draw:fill-color="#ffffff" draw:textarea-horizontal-align="center" draw:textarea-vertical-align="middle" draw:auto-grow-height="fals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loext:decorative="false" fo:margin-left="0mm" fo:margin-right="0mm" fo:margin-top="0mm" fo:margin-bottom="0mm" style:run-through="foreground" style:wrap="none" style:vertical-pos="top" style:vertical-rel="paragraph" style:horizontal-pos="center" style:horizontal-rel="paragraph"/>
    </style:style>
    <style:style style:name="gr3" style:family="graphic">
      <style:graphic-properties draw:stroke="none" draw:stroke-dash="Dashed_20__28_var_29__20_1" svg:stroke-width="0.3mm" svg:stroke-color="#1abc9c" draw:marker-start="" draw:marker-start-width="2.5mm" draw:marker-start-center="false" draw:marker-end="" draw:marker-end-width="2.5mm" draw:marker-end-center="false" draw:fill="none" draw:fill-color="#ffffff" draw:textarea-horizontal-align="center" draw:textarea-vertical-align="middle" draw:auto-grow-height="fals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loext:decorative="false" fo:margin-left="0mm" fo:margin-right="0mm" fo:margin-top="0mm" fo:margin-bottom="0m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y="-31.96mm" svg:width="40.73mm" svg:height="14.32mm" draw:z-index="6"><draw:image xlink:href="Pictures/1000000100000299000000EA862F2849.png" xlink:type="simple" xlink:show="embed" xlink:actuate="onLoad" draw:mime-type="image/png"/></draw:frame></text:p>
      <text:p text:style-name="P1"/>
      <text:p text:style-name="P2"/>
      <text:p text:style-name="P3"><text:bookmark-start text:name="__RefHeading___Toc14118_2365495780 Copy 1 Copy 1"/>Interactive Beat Annotation GUI<text:bookmark-end text:name="__RefHeading___Toc14118_2365495780 Copy 1 Copy 1"/></text:p>
      <text:p text:style-name="P4">-<text:span text:style-name="T1">SoTA Deliverable-</text:span></text:p>
      <text:p text:style-name="P5">Fernando Azeredo</text:p>
      <text:p text:style-name="P6"/>
      <text:p text:style-name="P6"/>
      <text:p text:style-name="P6"/>
      <text:p text:style-name="P6"/>
      <text:p text:style-name="P6"/>
      <text:p text:style-name="P6"/>
      <text:p text:style-name="P7"><text:span text:style-name="T1">Masters in Multimedia</text:span> <text:span text:style-name="T1">at</text:span> <text:span text:style-name="T1">Porto University</text:span></text:p>
      <text:p text:style-name="P7"><text:span text:style-name="T1">Supervisor</text:span>: <text:span text:style-name="T1">António Sá Pinto</text:span></text:p>
      <text:p text:style-name="P8">February 2026</text:p>
      <text:p text:style-name="P7"/>
      <text:p text:style-name="P9"/>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10"><text:a xlink:type="simple" xlink:href="#__RefHeading___Toc2376_584189157" office:name="List of Abbreviations" text:style-name="Index_20_Link" text:visited-style-name="Index_20_Link">List of Abbreviations<text:tab/>3</text:a></text:p>
          <text:p text:style-name="P10"><text:a xlink:type="simple" xlink:href="#__RefHeading___Toc14120_2365495780" office:name="Introduction" text:style-name="Index_20_Link" text:visited-style-name="Index_20_Link">Introduction<text:tab/>4</text:a></text:p>
          <text:p text:style-name="P11"><text:a xlink:type="simple" xlink:href="#__RefHeading___Toc5209_3106982271" office:name="Contextualization and Problem Framing" text:style-name="Index_20_Link" text:visited-style-name="Index_20_Link">Contextualization and Problem Framing<text:tab/>4</text:a></text:p>
          <text:p text:style-name="P11"><text:a xlink:type="simple" xlink:href="#__RefHeading___Toc5100_3106982271" office:name="Research Questions" text:style-name="Index_20_Link" text:visited-style-name="Index_20_Link">Research Questions<text:tab/>5</text:a></text:p>
          <text:p text:style-name="P12"><text:a xlink:type="simple" xlink:href="#__RefHeading___Toc6566_3656789684COPY_IS_MOVE" office:name="RQ1 – Current Beat Annotation Limitations" text:style-name="Index_20_Link" text:visited-style-name="Index_20_Link">RQ1 – Current Beat Annotation Limitations<text:tab/>5</text:a></text:p>
          <text:p text:style-name="P12"><text:a xlink:type="simple" xlink:href="#__RefHeading___Toc6905_3656789684" office:name="RQ2 – Proposed BA Novelties" text:style-name="Index_20_Link" text:visited-style-name="Index_20_Link">RQ2 – Proposed BA Novelties<text:tab/>5</text:a></text:p>
          <text:p text:style-name="P13"><text:a xlink:type="simple" xlink:href="#__RefHeading___Toc7074_3656789684" office:name="RQ 2.1- Audio-to-Score allignment" text:style-name="Index_20_Link" text:visited-style-name="Index_20_Link">RQ 2.1- Audio-to-Score allignment<text:tab/>6</text:a></text:p>
          <text:p text:style-name="P13"><text:a xlink:type="simple" xlink:href="#__RefHeading___Toc7467_3656789684" office:name="RQ 2.2 – Spectogram Audio Visualization in BA" text:style-name="Index_20_Link" text:visited-style-name="Index_20_Link">RQ 2.2 – Spectogram Audio Visualization in BA<text:tab/>6</text:a></text:p>
          <text:p text:style-name="P13"><text:a xlink:type="simple" xlink:href="#__RefHeading___Toc7469_3656789684" office:name="RQ2.3 – SoTA BT Model Integration" text:style-name="Index_20_Link" text:visited-style-name="Index_20_Link">RQ2.3 – SoTA BT Model Integration<text:tab/>6</text:a></text:p>
          <text:p text:style-name="P13"><text:a xlink:type="simple" xlink:href="#__RefHeading___Toc7471_3656789684" office:name="RQ2.4 – Beat Quantization and Annotation Grid" text:style-name="Index_20_Link" text:visited-style-name="Index_20_Link">RQ2.4 – Beat Quantization and Annotation Grid<text:tab/>7</text:a></text:p>
          <text:p text:style-name="P12"><text:a xlink:type="simple" xlink:href="#__RefHeading___Toc7473_3656789684" office:name="RQ3 – Proving Value" text:style-name="Index_20_Link" text:visited-style-name="Index_20_Link">RQ3 – Proving Value<text:tab/>7</text:a></text:p>
          <text:p text:style-name="P10"><text:a xlink:type="simple" xlink:href="#__RefHeading___Toc16566_2365495780" office:name="State-of-the-Art" text:style-name="Index_20_Link" text:visited-style-name="Index_20_Link">State-of-the-Art<text:tab/>8</text:a></text:p>
          <text:p text:style-name="P11"><text:a xlink:type="simple" xlink:href="#__RefHeading___Toc16568_2365495780" office:name="Beat tracking Research" text:style-name="Index_20_Link" text:visited-style-name="Index_20_Link">Beat tracking Research<text:tab/>8</text:a></text:p>
          <text:p text:style-name="P11"><text:a xlink:type="simple" xlink:href="#__RefHeading___Toc16570_2365495780" office:name="Beat Annotation Methods" text:style-name="Index_20_Link" text:visited-style-name="Index_20_Link">Beat Annotation Methods<text:tab/>10</text:a></text:p>
          <text:p text:style-name="P11"><text:a xlink:type="simple" xlink:href="#__RefHeading___Toc16572_2365495780" office:name="Existing Tools for Beat Annotation" text:style-name="Index_20_Link" text:visited-style-name="Index_20_Link">Existing Tools for Beat Annotation<text:tab/>10</text:a></text:p>
          <text:p text:style-name="P11"><text:a xlink:type="simple" xlink:href="#__RefHeading___Toc4080_3106982271" office:name="HIL Approach for BT" text:style-name="Index_20_Link" text:visited-style-name="Index_20_Link">HIL Approach for BT<text:tab/>12</text:a></text:p>
          <text:p text:style-name="P11"><text:a xlink:type="simple" xlink:href="#__RefHeading___Toc8250_584189157" office:name="Audio-to-Score Alignment for BT" text:style-name="Index_20_Link" text:visited-style-name="Index_20_Link">Audio-to-Score Alignment for BT<text:tab/>13</text:a></text:p>
          <text:p text:style-name="P10"><text:a xlink:type="simple" xlink:href="#__RefHeading___Toc16576_2365495780" office:name="Work Plan" text:style-name="Index_20_Link" text:visited-style-name="Index_20_Link">Work Plan<text:tab/>14</text:a></text:p>
          <text:p text:style-name="P11"><text:a xlink:type="simple" xlink:href="#__RefHeading___Toc4101_3656789684" office:name="1st Iteration of the GUI" text:style-name="Index_20_Link" text:visited-style-name="Index_20_Link">1<text:span text:style-name="T2">st</text:span> Iteration of the GUI<text:tab/>15</text:a></text:p>
          <text:p text:style-name="P11"><text:a xlink:type="simple" xlink:href="#__RefHeading___Toc4103_3656789684" office:name="1st Testing phase" text:style-name="Index_20_Link" text:visited-style-name="Index_20_Link">1<text:span text:style-name="T2">st</text:span> Testing phase<text:tab/>17</text:a></text:p>
          <text:p text:style-name="P11"><text:a xlink:type="simple" xlink:href="#__RefHeading___Toc4105_3656789684" office:name="Intermediate Presentation Preparation" text:style-name="Index_20_Link" text:visited-style-name="Index_20_Link">Intermediate Presentation Preparation<text:tab/>18</text:a></text:p>
          <text:p text:style-name="P11"><text:a xlink:type="simple" xlink:href="#__RefHeading___Toc4107_3656789684" office:name="2nd Iteration of GUI" text:style-name="Index_20_Link" text:visited-style-name="Index_20_Link">2<text:span text:style-name="T2">nd</text:span> Iteration of GUI<text:tab/>18</text:a></text:p>
          <text:p text:style-name="P11"><text:a xlink:type="simple" xlink:href="#__RefHeading___Toc4109_3656789684" office:name="2nd Phase Testing" text:style-name="Index_20_Link" text:visited-style-name="Index_20_Link">2<text:span text:style-name="T2">nd</text:span> Phase Testing<text:tab/>21</text:a></text:p>
          <text:p text:style-name="P11"><text:a xlink:type="simple" xlink:href="#__RefHeading___Toc4111_3656789684" office:name="Public Defense Preparation" text:style-name="Index_20_Link" text:visited-style-name="Index_20_Link">Public Defense Preparation<text:tab/>21</text:a></text:p>
          <text:p text:style-name="P11"><text:a xlink:type="simple" xlink:href="#__RefHeading___Toc4113_3656789684" office:name="Thesis Finalization" text:style-name="Index_20_Link" text:visited-style-name="Index_20_Link">Thesis Finalization<text:tab/>21</text:a></text:p>
          <text:p text:style-name="P10"><text:a xlink:type="simple" xlink:href="#__RefHeading___Toc4115_3656789684COPY_IS_MOVECOPY_IS_MOVE" office:name="Appendix" text:style-name="Index_20_Link" text:visited-style-name="Index_20_Link">Appendix<text:tab/>22</text:a></text:p>
          <text:p text:style-name="P10"><text:a xlink:type="simple" xlink:href="#__RefHeading___Toc5366_3656789684" office:name="Bibliography" text:style-name="Index_20_Link" text:visited-style-name="Index_20_Link">Bibliography<text:tab/>23</text:a></text:p>
        </text:index-body>
      </text:table-of-content>
      <text:p text:style-name="P14"/>
      <text:h text:style-name="Heading_20_3" text:outline-level="3"/>
      <text:h text:style-name="P15" text:outline-level="1"><text:bookmark-start text:name="__RefHeading___Toc2376_584189157"/>List of Abbreviations<text:bookmark-end text:name="__RefHeading___Toc2376_584189157"/></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Abbreviation</text:p>
          </table:table-cell>
          <table:table-cell table:style-name="Table2.A1" office:value-type="string">
            <text:p text:style-name="P17">Full Term</text:p>
          </table:table-cell>
          <table:table-cell table:style-name="Table2.C1" office:value-type="string">
            <text:p text:style-name="P18"><text:span text:style-name="T3">Description</text:span></text:p>
          </table:table-cell>
        </table:table-row>
        <table:table-row table:style-name="Table2.2">
          <table:table-cell table:style-name="Table2.A2" office:value-type="string">
            <text:p text:style-name="P19">GUI</text:p>
          </table:table-cell>
          <table:table-cell table:style-name="Table2.B2" office:value-type="string">
            <text:p text:style-name="P20">Graphical User Interface</text:p>
          </table:table-cell>
          <table:table-cell table:style-name="Table2.C2" table:number-rows-spanned="2" office:value-type="string">
            <text:p text:style-name="P21">For the purpose of this deliverable, these terms are used interchangeably to refer to the:</text:p>
            <text:p text:style-name="P22">“<text:span text:style-name="T4">Digital Graphical User Interface For Beat Annotation</text:span>” as a whole.</text:p>
            <text:p text:style-name="P22">Meaning all visual elements that will be displayed to the user visually.</text:p>
            <text:p text:style-name="P22"><text:line-break/>This is the main object of the thesis.</text:p>
          </table:table-cell>
        </table:table-row>
        <table:table-row table:style-name="Table2.3">
          <table:table-cell table:style-name="Table2.A3" office:value-type="string">
            <text:p text:style-name="P19">UI</text:p>
          </table:table-cell>
          <table:table-cell table:style-name="Table2.B3" office:value-type="string">
            <text:p text:style-name="P23">User Interface</text:p>
          </table:table-cell>
          <table:covered-table-cell table:style-name="Table2.C3"/>
        </table:table-row>
        <table:table-row table:style-name="Table2.4">
          <table:table-cell table:style-name="Table2.A4" office:value-type="string">
            <text:p text:style-name="P19">UX</text:p>
          </table:table-cell>
          <table:table-cell table:style-name="Table2.B4" office:value-type="string">
            <text:p text:style-name="P23">User Experience</text:p>
          </table:table-cell>
          <table:table-cell table:style-name="Table2.C4" office:value-type="string">
            <text:p text:style-name="P24">Term used frequently in tandem with UI – “<text:span text:style-name="T4">UI/UX”</text:span>.</text:p>
            <text:p text:style-name="P25">UI refers to: “<text:span text:style-name="T4">What the user sees.</text:span>”<text:line-break/>UX refers to: “<text:span text:style-name="T4">How the user interacts.</text:span><text:span text:style-name="T5">”</text:span></text:p>
            <text:p text:style-name="P24">UX relates to general workflow and experience of <text:s/>using the program.</text:p>
          </table:table-cell>
        </table:table-row>
        <table:table-row table:style-name="Table2.5">
          <table:table-cell table:style-name="Table2.A4" office:value-type="string">
            <text:p text:style-name="P26">MIR</text:p>
          </table:table-cell>
          <table:table-cell table:style-name="Table2.B5" office:value-type="string">
            <text:p text:style-name="P27">Music Information Retrieval</text:p>
          </table:table-cell>
          <table:table-cell table:style-name="Table2.C5" office:value-type="string">
            <text:p text:style-name="P24"><text:span text:style-name="T6">R</text:span>esearch field that develops computational methods to analyze, interpret, and retrieve musical information from audio.</text:p>
          </table:table-cell>
        </table:table-row>
        <table:table-row>
          <table:table-cell table:style-name="Table2.A6" office:value-type="string">
            <text:p text:style-name="P19">BT</text:p>
          </table:table-cell>
          <table:table-cell table:style-name="Table2.B6" office:value-type="string">
            <text:p text:style-name="P23">Beat Track/ing</text:p>
          </table:table-cell>
          <table:table-cell table:style-name="Table2.C6" office:value-type="string">
            <text:p text:style-name="P23">The process of <text:span text:style-name="T7">computationally and autonomously </text:span>detect the temporal positions of beats or the underlying pulse structure within a musical audio signal</text:p>
          </table:table-cell>
        </table:table-row>
        <table:table-row table:style-name="Table2.7">
          <table:table-cell table:style-name="Table2.A7" office:value-type="string">
            <text:p text:style-name="P19">BA</text:p>
          </table:table-cell>
          <table:table-cell table:style-name="Table2.B7" office:value-type="string">
            <text:p text:style-name="P23">Beat Annotation/ing</text:p>
          </table:table-cell>
          <table:table-cell table:style-name="Table2.C7" office:value-type="string">
            <text:p text:style-name="P23">The act of <text:span text:style-name="T8">labeling precise temporal locations</text:span><text:span text:style-name="T9"> </text:span>of musical beats.</text:p>
          </table:table-cell>
        </table:table-row>
        <table:table-row table:style-name="Table2.8">
          <table:table-cell table:style-name="Table2.A8" office:value-type="string">
            <text:p text:style-name="P28">HIL</text:p>
          </table:table-cell>
          <table:table-cell table:style-name="Table2.B8" office:value-type="string">
            <text:p text:style-name="P29">Human-in-the-Loop</text:p>
          </table:table-cell>
          <table:table-cell table:style-name="Table2.C8" office:value-type="string">
            <text:p text:style-name="P29">A symbiotic interaction <text:span text:style-name="T7">between the user and</text:span> an automated system <text:span text:style-name="T7">(ML). </text:span><text:span text:style-name="T10">It</text:span><text:span text:style-name="T7"> adapts </text:span><text:span text:style-name="T10">dynamically </text:span><text:span text:style-name="T7">according to user input. </text:span></text:p>
          </table:table-cell>
        </table:table-row>
        <table:table-row table:style-name="Table2.9">
          <table:table-cell table:style-name="Table2.A9" office:value-type="string">
            <text:p text:style-name="P28">BPM</text:p>
          </table:table-cell>
          <table:table-cell table:style-name="Table2.B9" office:value-type="string">
            <text:p text:style-name="P29">Beats Per Minute</text:p>
          </table:table-cell>
          <table:table-cell table:style-name="Table2.C9" office:value-type="string">
            <text:p text:style-name="P30">A standard measure of musical tempo representing the <text:span text:style-name="T11">number of beats occurring within a one-minute</text:span><text:span text:style-name="T12"> </text:span>interval. <text:span text:style-name="T13">It is also related to the concept of “</text:span><text:span text:style-name="T14">tempo</text:span><text:span text:style-name="T15">”. The ladder being the musical term usually is more vague indicating a range of bpm (</text:span><text:span text:style-name="T16">andante, lento, largo, presto </text:span><text:span text:style-name="T15">etc.). </text:span></text:p>
          </table:table-cell>
        </table:table-row>
        <table:table-row table:style-name="Table2.10">
          <table:table-cell table:style-name="Table2.A10" office:value-type="string">
            <text:p text:style-name="P28">SV</text:p>
          </table:table-cell>
          <table:table-cell table:style-name="Table2.B10" office:value-type="string">
            <text:p text:style-name="P29">Sonic Visualizer</text:p>
          </table:table-cell>
          <table:table-cell table:style-name="Table2.C10" office:value-type="string">
            <text:p text:style-name="P29"><text:span text:style-name="T7">The</text:span> de facto standard open-source desktop <text:span text:style-name="T11">application used by </text:span><text:span text:style-name="T17">MIR</text:span><text:span text:style-name="T11"> researchers</text:span><text:span text:style-name="T12"> </text:span><text:span text:style-name="T7">and audio/sound engineers </text:span>for the <text:span text:style-name="T11">visualization </text:span><text:span text:style-name="T17">and</text:span><text:span text:style-name="T11"> analysis </text:span><text:span text:style-name="T17">of </text:span><text:span text:style-name="T11">audio files</text:span>.</text:p>
          </table:table-cell>
        </table:table-row>
        <table:table-row table:style-name="Table2.11">
          <table:table-cell table:style-name="Table2.A11" office:value-type="string">
            <text:p text:style-name="P31">PP</text:p>
          </table:table-cell>
          <table:table-cell table:style-name="Table2.B11" office:value-type="string">
            <text:p text:style-name="P32">Piano Precision</text:p>
          </table:table-cell>
          <table:table-cell table:style-name="Table2.C11" office:value-type="string">
            <text:p text:style-name="P33"><text:span text:style-name="T13">O</text:span>pen-source tool derived from SV’s source code, therefore it is considered an <text:span text:style-name="T18">SV Fork</text:span><text:span text:style-name="T19">.</text:span></text:p>
          </table:table-cell>
        </table:table-row>
      </table:table>
      <text:h text:style-name="Heading_20_1" text:outline-level="1" text:is-list-header="true"><text:bookmark-start text:name="__RefHeading___Toc14120_2365495780"/><text:soft-page-break/>Introduction<text:bookmark-end text:name="__RefHeading___Toc14120_2365495780"/></text:h>
      <text:h text:style-name="Heading_20_2" text:outline-level="2"><text:bookmark-start text:name="__RefHeading___Toc5209_3106982271"/>Contextualization and Problem Framing<text:bookmark-end text:name="__RefHeading___Toc5209_3106982271"/></text:h>
      <text:p text:style-name="P34">Music Information Retrieval (MIR) is a research field that develops computational methods to analyze, interpret, and retrieve musical information from audio, <text:span text:style-name="T20">examples include:</text:span> harmony, melody, rhythm, and structural elements. Within MIR, Beat Tracking (BT) focuses on the auto<text:span text:style-name="T21">nomous</text:span> extraction of musical beat information from recordings. <text:span text:style-name="T22">Since </text:span>the beat provides a fundamental temporal framework for music, BT is a critical component of many MIR systems. </text:p>
      <text:p text:style-name="P35"><text:span text:style-name="T23"><text:line-break/>“Many MIR systems first analyze the beats as the starting point, assume the results would be correct, and use them as a unit for further processing.” </text:span><text:reference-mark-start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span text:style-name="T24">(Yamamoto, 2021)</text:span><text:reference-mark-end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p>
      <text:p text:style-name="P36"/>
      <text:p text:style-name="P36">The beat is typically defined as a regularly occurring pulse that underlies the temporal organization of a musical piece. However, the perception of “beat” can vary across listeners. <text:span text:style-name="T22">An</text:span> <text:span text:style-name="T22">objectively</text:span> definitive beat can only be established if <text:span text:style-name="T22">it is </text:span>explicitly defined by the composer or agreed upon by performing musicians.</text:p>
      <text:p text:style-name="P36"/>
      <text:p text:style-name="P37">BT has been a research focus for decades. Existing algorithms perform reliably <text:span text:style-name="T25">well</text:span> for music with steady, predictable tempos, such as <text:span text:style-name="T25">p</text:span>op music <text:span text:style-name="T13">genres</text:span>. In contrast, <text:span text:style-name="T13">music with</text:span><text:span text:style-name="T26"> </text:span>fluctuating tempos <text:span text:style-name="T27">and non-percussive elements</text:span><text:span text:style-name="T26"> </text:span>remain challenging for <text:span text:style-name="T27">B</text:span>. <text:span text:style-name="T28">Examples of </text:span><text:span text:style-name="T13">problematic </text:span><text:span text:style-name="T28">music genres</text:span><text:span text:style-name="T13"> include: </text:span><text:span text:style-name="T28">classical, jazz </text:span><text:span text:style-name="T20">or </text:span><text:span text:style-name="T28">world music. </text:span><text:span text:style-name="T20">These can make</text:span><text:span text:style-name="T28"> the process of beat tracking more complex and ambiguous.</text:span></text:p>
      <text:p text:style-name="P38"><text:span text:style-name="T28"><text:line-break/>For this reason SoTA BT autonomous algorithms are all </text:span><text:span text:style-name="T20">m</text:span><text:span text:style-name="T28">achine </text:span><text:span text:style-name="T20">l</text:span><text:span text:style-name="T28">earning </text:span><text:span text:style-name="T29">(ML) </text:span><text:span text:style-name="T20">b</text:span><text:span text:style-name="T28">ased. And although there are a few that are self-supervised </text:span><text:reference-mark-start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text:span text:style-name="T28">(Desblancs et al., 2023)</text:span><text:reference-mark-end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 <text:span text:style-name="T28">t</text:span><text:span text:style-name="T22">hese are usually genre specific or are bound to certain musical configurations. For the cases that SoTA BT still can’t solve, human-made </text:span><text:span text:style-name="T25">beat annotation (</text:span><text:span text:style-name="T30">BA</text:span><text:span text:style-name="T25">)</text:span><text:span text:style-name="T22"> are still the most reliable. </text:span></text:p>
      <text:p text:style-name="P39"/>
      <text:p text:style-name="P40">Although there has been a lot of effort in advancing autonomous BT solutions, the same can not be said for human focused B<text:span text:style-name="T25">A</text:span> tools <text:span text:style-name="T25">and software,</text:span> where it seems, they <text:span text:style-name="T25">have remained</text:span> largely unchanged for years now. <text:span text:style-name="T25">The main difference nowadays, is that one can use a SoTA BT model to make a first assessment of the beat, however, for problematic BT music, this still implies a slow and cumbersome process for </text:span><text:span text:style-name="T27">making </text:span><text:span text:style-name="T25">that initial flawed BT into an accurate beat </text:span><text:span text:style-name="T27">map</text:span><text:span text:style-name="T25">. This process hasn’t changed much, at least </text:span><text:span text:style-name="T27">for</text:span><text:span text:style-name="T25"> the last two decades.</text:span></text:p>
      <text:p text:style-name="P41"/>
      <text:p text:style-name="P41">Besides this, there is no standardized way for BA. Annotators end up developing custom ways of accomplishing the task, which might contribute to beat mappings with varying levels of accuracy. In big datasets made by multiple beat annotators, this may effect the overall BT model accuracy. </text:p>
      <text:h text:style-name="Heading_20_2" text:outline-level="2" text:is-list-header="true"><text:bookmark-start text:name="__RefHeading___Toc5100_3106982271"/><text:soft-page-break/>Research Questions<text:bookmark-end text:name="__RefHeading___Toc5100_3106982271"/></text:h>
      <text:p text:style-name="P42"><text:span text:style-name="T31">While there have been advancements in BT, t</text:span><text:span text:style-name="T10">he </text:span><text:span text:style-name="T32">newer SoTA</text:span><text:span text:style-name="T31"> algorithms still struggle with expressive and non-percussive music. For cases where BT isn’t reliable, human made BA is still required. </text:span><text:span text:style-name="T32">There is also still the need for h</text:span><text:span text:style-name="T31">uman made (or reviewed) annotations to train newer BT algorithms. Beyond that, BA technology </text:span><text:span text:style-name="T32">h</text:span><text:span text:style-name="T31">as stagnated during the last </text:span><text:span text:style-name="T32">decade, no new </text:span><text:span text:style-name="T33">relevant</text:span><text:span text:style-name="T32"> </text:span><text:span text:style-name="T31">BA graphical tool/software have ben publicly released. The current de facto standard for BA, relies on the usage of stand-alone open-source desktop application: Sonic Visualizer (SV). While powerful and widely adopted by the MIR research community, </text:span><text:span text:style-name="T32">this program has not updated it’s BA tools </text:span><text:span text:style-name="T33">in years</text:span><text:span text:style-name="T32">. The process of BA has stayed mostly the same for decades now. This creates a clear opportunity to advance beyond traditional-desktop based annotation workflows.</text:span></text:p>
      <text:p text:style-name="P43"/>
      <text:h text:style-name="Heading_20_3" text:outline-level="3" text:is-list-header="true"><text:bookmark-start text:name="__RefHeading___Toc6566_3656789684COPY_IS_MOVE"/>RQ1 – <text:span text:style-name="T34">Current Beat Annotation Limitations</text:span><text:bookmark-end text:name="__RefHeading___Toc6566_3656789684COPY_IS_MOVE"/></text:h>
      <text:p text:style-name="P44"/>
      <text:p text:style-name="P44">What limitations exist in current beat annotation workflows when applied to challenging <text:span text:style-name="T35">BT</text:span> music?<text:line-break/></text:p>
      <text:p text:style-name="P39"><text:span text:style-name="T12">Annotating expressive music with high tempo variability is particularly "cumbersome," as annotator</text:span><text:span text:style-name="T36">s rely on manually tapping </text:span><text:span text:style-name="T37">for adding beats, </text:span><text:span text:style-name="T36">or drag&amp;drop </text:span><text:span text:style-name="T37">style methods to input/shift</text:span><text:span text:style-name="T36"> individual beats into their correct position. Tapping is a preferred method for some annotators, however, due to system latency, jitter and motor noise </text:span><text:span text:style-name="T37">a</text:span><text:span text:style-name="T38">mong</text:span><text:span text:style-name="T37"> other variables </text:span><text:span text:style-name="T36"><text:s/></text:span><text:reference-mark-start text:name="ZOTERO_ITEM CSL_CITATION {&quot;citationID&quot;:&quot;5zIp5W0W&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sBTnZA6q4q"/><text:span text:style-name="T36">(Driedger et al., 2019)</text:span><text:reference-mark-end text:name="ZOTERO_ITEM CSL_CITATION {&quot;citationID&quot;:&quot;5zIp5W0W&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sBTnZA6q4q"/><text:span text:style-name="T36"> a</text:span><text:span text:style-name="T38">nd</text:span><text:span text:style-name="T36"> failed tap</text:span><text:span text:style-name="T38">s</text:span><text:span text:style-name="T36">, this method still requires manually going beat by beat making sure that they are as perfectly aligned as </text:span><text:span text:style-name="T39">humanly</text:span><text:span text:style-name="T36"> possible.</text:span></text:p>
      <text:p text:style-name="Text_20_body"/>
      <text:h text:style-name="P45" text:outline-level="3"><text:bookmark-start text:name="__RefHeading___Toc6905_3656789684"/>RQ2 – Proposed BA Novelties<text:bookmark-end text:name="__RefHeading___Toc6905_3656789684"/></text:h>
      <text:p text:style-name="P46"/>
      <text:p text:style-name="P46">How can different musical, model and signal representations support and guide the beat annotation process?</text:p>
      <text:p text:style-name="P46"/>
      <text:p text:style-name="P39"><text:span text:style-name="T35">To overcome hurdles, we propose a junction of various already existing musical </text:span><text:span text:style-name="T40">and audio</text:span><text:span text:style-name="T35"> analysis </text:span><text:span text:style-name="T40">and visualization</text:span><text:span text:style-name="T35"> tools. </text:span><text:span text:style-name="T36">By integrating intelligent workflows, appropriate visualization tools, beat shifting operations and </text:span><text:span text:style-name="T39">snapping features we intend to </text:span><text:span text:style-name="T38">create</text:span><text:span text:style-name="T39"> a GUI that makes this process less cumbersome and more streamlined. Thus, we can divide this question in</text:span><text:span text:style-name="T38">to </text:span><text:span text:style-name="T39">4 concrete </text:span><text:span text:style-name="T38">ones</text:span><text:span text:style-name="T39">:</text:span></text:p>
      <text:h text:style-name="P47" text:outline-level="4"><text:bookmark-start text:name="__RefHeading___Toc7074_3656789684"/>RQ 2.1- Audio-to-Score alignment<text:bookmark-end text:name="__RefHeading___Toc7074_3656789684"/></text:h>
      <text:p text:style-name="P48"/>
      <text:p text:style-name="P48">How can a symbolic score representation, defined in musical time, be aligned with an audio-based representation defined in absolute time?</text:p>
      <text:p text:style-name="P48"/>
      <text:p text:style-name="P49">Symbolic score information serves as a crucial reference for identifying metrical positions and expected note hits in classical or complex performances. <text:span text:style-name="T41">Aligning “musical time” (w</text:span><text:span text:style-name="T21">h</text:span><text:span text:style-name="T41">ich is not absolute, it is relative and it can vary) with the absolute audio timeline (seconds), should allow annotators to navigate and assess beat positions more accurately. This cross-modal alignment should also </text:span><text:span text:style-name="T40">aid in</text:span><text:span text:style-name="T41"> resolving metrical ambiguities and ensuring that annotations remain consistent according to the score in question.</text:span></text:p>
      <text:p text:style-name="P50"/>
      <text:h text:style-name="P51" text:outline-level="4"><text:bookmark-start text:name="__RefHeading___Toc7467_3656789684"/><text:span text:style-name="T42">RQ 2.</text:span><text:span text:style-name="T41">2 –</text:span><text:span text:style-name="T42"> </text:span><text:span text:style-name="T41">Spectogram Audio Visualization in BA</text:span><text:span text:style-name="T42"> </text:span><text:bookmark-end text:name="__RefHeading___Toc7467_3656789684"/></text:h>
      <text:p text:style-name="P52"/>
      <text:p text:style-name="P53">How can an audio spectrogram support accurate manual beat annotation in challenging music?</text:p>
      <text:p text:style-name="P52"/>
      <text:p text:style-name="P54">Spectrograms provide a vital visual anchor by revealing vertical spectral structures that originate from instrumental onsets. In challenging music, where the beat is not percussively explicit, these visual cues help annotators verify the exact temporal location of musical events <text:span text:style-name="T40">(onsets)</text:span>. <text:s/><text:span text:style-name="T41">Th</text:span><text:span text:style-name="T43">e spectogram view</text:span><text:span text:style-name="T41"> </text:span><text:span text:style-name="T40">fused with </text:span><text:span text:style-name="T41">the proposed audio-to-score </text:span><text:span text:style-name="T40">alignment</text:span><text:span text:style-name="T41"> </text:span><text:span text:style-name="T44">may prove </text:span><text:span text:style-name="T43">to be beneficial</text:span><text:span text:style-name="T44">. Spectogram for precise beat placement, Score visualization for onset-to-beat detection.</text:span></text:p>
      <text:p text:style-name="P55"/>
      <text:h text:style-name="P56" text:outline-level="4" text:is-list-header="true"><text:bookmark-start text:name="__RefHeading___Toc7469_3656789684"/><text:span text:style-name="T45">RQ2.3 – </text:span><text:span text:style-name="T46">SoTA BT Model Integration</text:span><text:bookmark-end text:name="__RefHeading___Toc7469_3656789684"/></text:h>
      <text:p text:style-name="P57"/>
      <text:p text:style-name="P57">How can deep neural network output activations, representing the probability of beat presence over time, guide the annotation process?</text:p>
      <text:p text:style-name="P58"/>
      <text:p text:style-name="P59">SoTA BT <text:span text:style-name="T47">and MIR </text:span>research <text:span text:style-name="T47">are mostly focusing on</text:span> machine learning (ML) and deep neural network<text:span text:style-name="T47">s</text:span> (DNN) <text:span text:style-name="T47">algorithms.</text:span> How can these newer SoTA BT models aid on the task of BA? <text:span text:style-name="T48">What about other MIR computational algorithms such as onset detection, can they be used for </text:span><text:span text:style-name="T47">BA</text:span><text:span text:style-name="T48"> purposes? </text:span><text:span text:style-name="T43">We believe that yes, the</text:span><text:span text:style-name="T49">y</text:span><text:span text:style-name="T43">’</text:span><text:span text:style-name="T49">ll pl</text:span><text:span text:style-name="T43">a</text:span><text:span text:style-name="T49">y </text:span><text:span text:style-name="T47">a</text:span><text:span text:style-name="T43"> crucial role in making BA less cumbersome. In </text:span><text:span text:style-name="T49">some of the less “problematic”</text:span><text:span text:style-name="T43"> case</text:span><text:span text:style-name="T49">s</text:span><text:span text:style-name="T43"> SoTA BT models can have a mostly correct BT, the most common flaws being: </text:span><text:span text:style-name="T47">the </text:span><text:span text:style-name="T43">half/double </text:span><text:span text:style-name="T47">problem</text:span><text:span text:style-name="T43">, false negatives (missed beats) and false positives (added beats) as well as slightly offset beats. </text:span><text:span text:style-name="T49">The solution we envision for these problems evolves developing a GUI that encompasses different BA tools, some will benefit not only from </text:span><text:span text:style-name="T47">SoTA</text:span><text:span text:style-name="T49"> BT models but also might benefit from </text:span><text:span text:style-name="T47">other MIR </text:span><text:span text:style-name="T6">ML and DNN models</text:span><text:span text:style-name="T47">. </text:span></text:p>
      <text:p text:style-name="P60"><text:soft-page-break/></text:p>
      <text:h text:style-name="P61" text:outline-level="4" text:is-list-header="true"><text:bookmark-start text:name="__RefHeading___Toc7471_3656789684"/><text:span text:style-name="T45">RQ2.</text:span><text:span text:style-name="T46">4</text:span><text:span text:style-name="T45"> – </text:span><text:span text:style-name="T50">Beat Quantization and Annotation Grid</text:span><text:bookmark-end text:name="__RefHeading___Toc7471_3656789684"/></text:h>
      <text:p text:style-name="P53"/>
      <text:p text:style-name="P53">Can such activation functions be used to define or support a beat quantization grid during annotation?</text:p>
      <text:p text:style-name="P62"/>
      <text:p text:style-name="P63">This question acts as an ext<text:span text:style-name="T51">e</text:span>nsion of the previous one.</text:p>
      <text:p text:style-name="P63"/>
      <text:p text:style-name="P63"><text:span text:style-name="T47">A concrete example would be: </text:span><text:span text:style-name="T6">t</text:span><text:span text:style-name="T47">he use of MIR </text:span>algorithms to generate a snap-to-grid like function. <text:span text:style-name="T47">W</text:span>here unaligned or incorrect beats snap to the next “most probable” position.</text:p>
      <text:p text:style-name="P63"/>
      <text:p text:style-name="P64">Such a feature could allow <text:span text:style-name="T6">so</text:span>: <text:span text:style-name="T6">w</text:span>hen <text:span text:style-name="T6">a</text:span> <text:span text:style-name="T6">performing a </text:span>beat tap (as previously established this, <text:span text:style-name="T6">by it’s self,</text:span> is a flawed method for BA), marked beats would not assume their absolute input time but would automatically “snap” into th<text:span text:style-name="T51">eir</text:span> most probable position. <text:span text:style-name="T51">How can we design such system and can it prove useful for </text:span><text:span text:style-name="T6">the </text:span><text:span text:style-name="T51">BA </text:span><text:span text:style-name="T6">process</text:span><text:span text:style-name="T51">? </text:span></text:p>
      <text:p text:style-name="P65"/>
      <text:h text:style-name="Heading_20_3" text:outline-level="3" text:is-list-header="true"><text:bookmark-start text:name="__RefHeading___Toc7473_3656789684"/><text:span text:style-name="T45">RQ</text:span><text:span text:style-name="T50">3</text:span><text:span text:style-name="T45"> – </text:span><text:span text:style-name="T52">Proving Value</text:span><text:bookmark-end text:name="__RefHeading___Toc7473_3656789684"/></text:h>
      <text:p text:style-name="P66"><text:line-break/><text:span text:style-name="T53">To what extent does the proposed beat annotation workflow affect annotation time and efficiency when compared with existing tools?</text:span><text:span text:style-name="T54"><text:line-break/></text:span><text:line-break/></text:p>
      <text:p text:style-name="P39"><text:span text:style-name="T51">Ultimately this is the most essential question to be posed. The whole purpose of th</text:span><text:span text:style-name="T55">e development of this </text:span><text:span text:style-name="T51">GUI, is </text:span><text:span text:style-name="T6">for it</text:span><text:span text:style-name="T51"> </text:span><text:span text:style-name="T55">to be a general improvement on decades old software and UI/UX workflows. Thus, the question of time and efficiency for the BA task is at the center of this thesis. However we believe that the features we propose already should aid on both these aspects, time and efficiency. By replacing individual drag-and-drop actions with a streamlined process of judging </text:span><text:span text:style-name="T6">automatic generated</text:span><text:span text:style-name="T55"> recommendations, the system aims to dramatically increase annotation efficiency and decrease general duration of the task. The Score-to-Audio alignment should also introduce a new BA method that aims to streamline the process and aid in the making of more precise beat assessments. <text:s text:c="2"/></text:span><text:line-break/></text:p>
      <text:h text:style-name="P67" text:outline-level="1"><text:bookmark-start text:name="__RefHeading___Toc16566_2365495780"/><text:span text:style-name="T56">State-of-</text:span><text:span text:style-name="T57">t</text:span><text:span text:style-name="T56">he-Art</text:span><text:bookmark-end text:name="__RefHeading___Toc16566_2365495780"/></text:h>
      <text:h text:style-name="Heading_20_2" text:outline-level="2" text:is-list-header="true"><text:bookmark-start text:name="__RefHeading___Toc16568_2365495780"/>Beat tracking Research<text:bookmark-end text:name="__RefHeading___Toc16568_2365495780"/></text:h>
      <text:p text:style-name="P68"><text:span text:style-name="T58">It is clear that BT is one of MIR’s most fundamental and most researched fields. </text:span><text:span text:style-name="T59">As of now</text:span><text:span text:style-name="T58"> BT </text:span><text:span text:style-name="T59">is considered a “solved” problem for </text:span><text:span text:style-name="T60">music </text:span><text:span text:style-name="T61">with </text:span><text:span text:style-name="T60">never changing</text:span><text:span text:style-name="T62"> </text:span><text:span text:style-name="T60">4/4 </text:span><text:span text:style-name="T62">metric and </text:span><text:span text:style-name="T60">steady bpm. </text:span><text:span text:style-name="T63">T</text:span><text:span text:style-name="T59">his includes </text:span><text:span text:style-name="T63">the</text:span><text:span text:style-name="T59"> majority of western commercially available music (Country, Disco, HipHop, Rock, Metal, Pop etc.). </text:span><text:span text:style-name="T64">W</text:span><text:span text:style-name="T59">here SoTA BT </text:span><text:span text:style-name="T63">models</text:span><text:span text:style-name="T59"> still fa</text:span><text:span text:style-name="T64">lter</text:span><text:span text:style-name="T59"> is in </text:span><text:span text:style-name="T63">music that falls from that standard of absolute and steady beat rhythmic organization.</text:span></text:p>
      <text:p text:style-name="P68"/>
      <text:p text:style-name="P68"><text:span text:style-name="T63">M</text:span><text:span text:style-name="T59">usical </text:span><text:span text:style-name="T63">works </text:span><text:span text:style-name="T59">with fluctuating bpm, complex </text:span><text:span text:style-name="T65">or</text:span><text:span text:style-name="T59"> unconventional time signatures </text:span><text:span text:style-name="T65">and non-percussive elements, </text:span><text:span text:style-name="T66">SoTA BT </text:span><text:span text:style-name="T65">models</text:span><text:span text:style-name="T66"> still falters. </text:span><text:span text:style-name="T67">This includes music that is “acoustically” performed, meaning, music where the bpm can fluctuate for performative or expressive reasons. Examples include genres: Classical, Jazz and World Music.</text:span></text:p>
      <text:p text:style-name="P69"><text:span text:style-name="T57"><text:line-break/>Besides this, the act of assessing the beat can be ambiguous. In some examples, annotators might tap at half, double, or even triple the actual beat. It is also possible for one to feel the subdivision at different levels, and this may impact the beat assessment of the annotator. For these cases, there can only be </text:span><text:span text:style-name="T65">one</text:span><text:span text:style-name="T57"> "correct" assessment if the recording in question has an underlying musical score that explicitly describes </text:span><text:span text:style-name="T65">every </text:span><text:span text:style-name="T57">beat, i.e. </text:span><text:span text:style-name="T65">must </text:span><text:span text:style-name="T57">classical music.</text:span></text:p>
      <text:p text:style-name="P70"><text:span text:style-name="T66">For th</text:span><text:span text:style-name="T68">ese</text:span><text:span text:style-name="T66"> reason</text:span><text:span text:style-name="T68">s</text:span><text:span text:style-name="T66">, c</text:span><text:span text:style-name="T57">urrent SoTA beat tracking methods are predominantly based on neural networks. </text:span><text:span text:style-name="T64">ZeroNS </text:span><text:reference-mark-start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text:span text:style-name="T64">(Desblancs et al., 2023)</text:span><text:reference-mark-end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 <text:span text:style-name="T64">BeatThis! </text:span><text:reference-mark-start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text:span text:style-name="T64">(Foscarin et al., 2024)</text:span><text:reference-mark-end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 <text:span text:style-name="T64">and HingeNet </text:span><text:reference-mark-start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span text:style-name="T64">(Ru et al., 2025) </text:span><text:reference-mark-end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span text:style-name="T69">are just 3 examples of SoTA algorithms that illustrate the complexity of </text:span><text:span text:style-name="T70">the </text:span><text:span text:style-name="T69">BT </text:span><text:span text:style-name="T70">problem</text:span><text:span text:style-name="T69">:</text:span></text:p>
      <text:list text:style-name="L1">
        <text:list-item>
          <text:p text:style-name="P71"><text:span text:style-name="T69">ZeroNS </text:span><text:span text:style-name="T65">(2023) </text:span><text:span text:style-name="T69">was the first self-supervised BT model. It works by analyzing separately the percussive </text:span><text:span text:style-name="T65">elements</text:span><text:span text:style-name="T69"> (drums) and melodic parts of a given recording. A problem with this model is that by design is dependent of instrumentation, this model works best for music with drums and clear melodic instrument distinction (voice, guitar, keys, bass etc…). </text:span><text:span text:style-name="T71">Besides this, ZeroNS performs </text:span><text:span text:style-name="T65">still</text:span><text:span text:style-name="T71"> </text:span><text:span text:style-name="T65">performed poorly</text:span><text:span text:style-name="T71"> against other supervised SoTA models. </text:span></text:p>
        </text:list-item>
        <text:list-item>
          <text:p text:style-name="P72">BeatThis! Is still considered the SoTA BT model. It works by analyzing spectogram windows of the recording. <text:span text:style-name="T65">It’s arguably the bets BT model at the moment, <text:s/>and it works well for a vast amount of music genre. </text:span></text:p>
        </text:list-item>
        <text:list-item>
          <text:p text:style-name="P72">HingeNet combines different BT models and ands a harmonically aware layer on top. Although HingeNet is newer, F-measure tests show that it is slightly behind <text:span text:style-name="T65">the</text:span> BeatThis! <text:span text:style-name="T65">model</text:span>.</text:p>
          <text:p text:style-name="P73"/>
        </text:list-item>
      </text:list>
      <text:p text:style-name="Text_20_body"><text:span text:style-name="T72">The performance of BT algorithms is based on </text:span><text:span text:style-name="T73">an F-measure</text:span><text:span text:style-name="T72"> </text:span><text:span text:style-name="T73">metric </text:span><text:span text:style-name="T74">presented in 0.</text:span><text:span text:style-name="T75">0</text:span><text:span text:style-name="T74"> to 1.</text:span><text:span text:style-name="T75">0</text:span><text:span text:style-name="T74"> ratio or </text:span><text:span text:style-name="T65">it’s</text:span><text:span text:style-name="T74"> equivalent in percentage </text:span><text:span text:style-name="T65">0%-100%</text:span><text:span text:style-name="T73">. This measures a BT </text:span><text:span text:style-name="T65">model</text:span><text:span text:style-name="T73"> against a ground-truth </text:span><text:span text:style-name="T75">given </text:span><text:span text:style-name="T65">by a</text:span><text:span text:style-name="T75"> dataset. I</text:span><text:span text:style-name="T73">t takes into account correct beats, false positives (extra beats) and false negatives (missed </text:span><text:soft-page-break/><text:span text:style-name="T73">beats), it also </text:span><text:span text:style-name="T74">allows for a</text:span><text:span text:style-name="T73"> </text:span><text:span text:style-name="T76">±</text:span><text:span text:style-name="T73">70ms window of tolerance for each beat. </text:span><text:span text:style-name="T77">To understand the reason for this check: </text:span><text:reference-mark-start text:name="ZOTERO_ITEM CSL_CITATION {&quot;citationID&quot;:&quot;H0BZ8p4q&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mMum55Qbbn"/><text:span text:style-name="T77">(Driedger et al., 2019).</text:span><text:reference-mark-end text:name="ZOTERO_ITEM CSL_CITATION {&quot;citationID&quot;:&quot;H0BZ8p4q&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mMum55Qbbn"/></text:p>
      <text:p text:style-name="P74"/>
      <text:p text:style-name="P75"><text:span text:style-name="T78">BT models are tested against well documented datasets. </text:span><text:s/><text:span text:style-name="T78">I</text:span>n <text:sequence-ref text:reference-format="category-and-value" text:ref-name="refFigure0">Figure 1</text:sequence-ref><text:s/><text:span text:style-name="T78">I present four that are common to see as benchmark tests for BT:</text:span></text:p>
      <text:list text:style-name="L2">
        <text:list-item>
          <text:p text:style-name="P76">GTZAN <text:span text:style-name="T75">was s</text:span>pecifically designed for musical genre classification. <text:span text:style-name="T79">It is a collection of 2000 music excerpts of 30sec each. It covers 10 different music genres, plus 4 and 6 sub-genres of classical and jazz music respectively, each having 100 excerpts. This gives a total of 19h of audio to be tested. </text:span></text:p>
        </text:list-item>
        <text:list-item>
          <text:p text:style-name="P77">Ballroom<text:span text:style-name="T80"> is a dataset consisting </text:span><text:span text:style-name="T81">a total </text:span><text:span text:style-name="T80">of </text:span><text:span text:style-name="T81">698 total examples.</text:span><text:span text:style-name="T80"> </text:span><text:span text:style-name="T81">With eight different dance music genres:</text:span><text:span text:style-name="T80"> Cha-Cha, Jive, Quickstep, Rumba, Samba, Tango, Viennese Waltz, and Slow Waltz</text:span><text:span text:style-name="T81">. <text:s/>BPM ranges from 60-224. <text:s/>As this </text:span><text:span text:style-name="T77">is</text:span><text:span text:style-name="T81"> dance-music, bpm stays mostly the same across the excerpts, for this reason it is expected for SoTA models to perform F-measures &gt; 9</text:span><text:span text:style-name="T77">0</text:span><text:span text:style-name="T81">%. </text:span></text:p>
        </text:list-item>
        <text:list-item>
          <text:p text:style-name="P76">Hainsworth: <text:span text:style-name="T75">A dataset consisting of 221 musical examples from a variety of genres, rock/pop, dance, classical, folk and jazz.</text:span></text:p>
        </text:list-item>
        <text:list-item>
          <text:p text:style-name="P78"><text:span text:style-name="T78">SMC Mirex: <text:s/></text:span><text:span text:style-name="T81">C</text:span><text:span text:style-name="T78">ompiled to include pieces that are</text:span><text:span text:style-name="T81"> challenging for SoTA </text:span><text:span text:style-name="T77">BT models.</text:span><text:span text:style-name="T81"> </text:span><text:span text:style-name="T77">This is the </text:span><text:span text:style-name="T81">benchmark test </text:span><text:span text:style-name="T77">of BT algorithms</text:span><text:span text:style-name="T81">. This data set consists of 217 manually-annotated </text:span><text:span text:style-name="T77">and </text:span><text:span text:style-name="T81">highly precise </text:span><text:span text:style-name="T77">BA</text:span><text:span text:style-name="T81">. </text:span></text:p>
          <text:p text:style-name="P78"/>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ext_20_body">Dataset</text:p>
          </table:table-cell>
          <table:table-cell table:style-name="Table1.A1" office:value-type="string">
            <text:p text:style-name="Text_20_body">Zero-Note Samba <text:span text:style-name="T73">(2023)</text:span></text:p>
          </table:table-cell>
          <table:table-cell table:style-name="Table1.A1" office:value-type="string">
            <text:p text:style-name="Text_20_body">Beat This! <text:span text:style-name="T73">(2024)</text:span></text:p>
          </table:table-cell>
          <table:table-cell table:style-name="Table1.A1" office:value-type="string">
            <text:p text:style-name="Text_20_body">HingeNet <text:span text:style-name="T73">(2025)</text:span></text:p>
          </table:table-cell>
        </table:table-row>
        <table:table-row>
          <table:table-cell table:style-name="Table1.A1" office:value-type="string">
            <text:p text:style-name="Text_20_body">GTZAN</text:p>
          </table:table-cell>
          <table:table-cell table:style-name="Table1.A1" office:value-type="string">
            <text:p text:style-name="Text_20_body">87.5%</text:p>
          </table:table-cell>
          <table:table-cell table:style-name="Table1.A1" office:value-type="string">
            <text:p text:style-name="Text_20_body">89.1%</text:p>
          </table:table-cell>
          <table:table-cell table:style-name="Table1.A1" office:value-type="string">
            <text:p text:style-name="Text_20_body">89.7%</text:p>
          </table:table-cell>
        </table:table-row>
        <table:table-row>
          <table:table-cell table:style-name="Table1.A1" office:value-type="string">
            <text:p text:style-name="Text_20_body">Ballroom</text:p>
          </table:table-cell>
          <table:table-cell table:style-name="Table1.A1" office:value-type="string">
            <text:p text:style-name="Text_20_body">91.1%</text:p>
          </table:table-cell>
          <table:table-cell table:style-name="Table1.A1" office:value-type="string">
            <text:p text:style-name="Text_20_body">97.5%</text:p>
          </table:table-cell>
          <table:table-cell table:style-name="Table1.A1" office:value-type="string">
            <text:p text:style-name="Text_20_body">97.3%</text:p>
          </table:table-cell>
        </table:table-row>
        <table:table-row>
          <table:table-cell table:style-name="Table1.A1" office:value-type="string">
            <text:p text:style-name="Text_20_body">Hainsworth</text:p>
          </table:table-cell>
          <table:table-cell table:style-name="Table1.A1" office:value-type="string">
            <text:p text:style-name="Text_20_body">78.3%</text:p>
          </table:table-cell>
          <table:table-cell table:style-name="Table1.A1" office:value-type="string">
            <text:p text:style-name="Text_20_body">91.9%</text:p>
          </table:table-cell>
          <table:table-cell table:style-name="Table1.A1" office:value-type="string">
            <text:p text:style-name="Text_20_body">91.4%</text:p>
          </table:table-cell>
        </table:table-row>
        <table:table-row>
          <table:table-cell table:style-name="Table1.A1" office:value-type="string">
            <text:p text:style-name="Text_20_body">SMC <text:span text:style-name="T71">Mirex</text:span></text:p>
          </table:table-cell>
          <table:table-cell table:style-name="Table1.A1" office:value-type="string">
            <text:p text:style-name="Text_20_body">52.0%</text:p>
          </table:table-cell>
          <table:table-cell table:style-name="Table1.A1" office:value-type="string">
            <text:p text:style-name="Text_20_body">62.7%</text:p>
          </table:table-cell>
          <table:table-cell table:style-name="Table1.A1" office:value-type="string">
            <text:p text:style-name="Text_20_body">61.7%</text:p>
          </table:table-cell>
        </table:table-row>
      </table:table>
      <text:p text:style-name="P79">Table <text:sequence text:ref-name="refTable1" text:name="Table" text:formula="ooow:Table+1" style:num-format="1">1</text:sequence>: Tabel comparing the performance (F-measure) of SoTA BT models.</text:p>
      <text:p text:style-name="P79"><text:s/><text:reference-mark-start text:name="ZOTERO_ITEM CSL_CITATION {&quot;citationID&quot;:&quot;W8Xkijpp&quot;,&quot;properties&quot;:{&quot;unsorted&quot;:false,&quot;formattedCitation&quot;:&quot;(Desblancs et al., 2023; Foscarin et al., 2024; Ru et al., 2025)&quot;,&quot;plainCitation&quot;:&quot;(Desblancs et al., 2023; Foscarin et al., 2024; Ru et al., 2025)&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NpZfPpj4jP"/>(Desblancs et al., 2023; Foscarin et al., 2024; Ru et al., 2025)<text:reference-mark-end text:name="ZOTERO_ITEM CSL_CITATION {&quot;citationID&quot;:&quot;W8Xkijpp&quot;,&quot;properties&quot;:{&quot;unsorted&quot;:false,&quot;formattedCitation&quot;:&quot;(Desblancs et al., 2023; Foscarin et al., 2024; Ru et al., 2025)&quot;,&quot;plainCitation&quot;:&quot;(Desblancs et al., 2023; Foscarin et al., 2024; Ru et al., 2025)&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NpZfPpj4jP"/></text:p>
      <text:p text:style-name="P80"/>
      <text:h text:style-name="P81" text:outline-level="2"><text:bookmark-start text:name="__RefHeading___Toc16570_2365495780"/>Beat Annotation Methods<text:bookmark-end text:name="__RefHeading___Toc16570_2365495780"/></text:h>
      <text:p text:style-name="P82">For music in which autonomous SoTA BT systems aren’t efficient enough, relaying on human made <text:span text:style-name="T30">BA</text:span> still might be preferable to the annotator:</text:p>
      <text:p text:style-name="P82"/>
      <text:p text:style-name="P83"><text:span text:style-name="T82">“</text:span><text:span text:style-name="T83">A common method to create beat annotations for music recordings is to let a human annotator tap along with them.</text:span><text:span text:style-name="T82">”</text:span></text:p>
      <text:p text:style-name="P84"><text:reference-mark-start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Driedger et al., 2019)<text:reference-mark-end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p>
      <text:p text:style-name="P85"/>
      <text:p text:style-name="P86"><text:span text:style-name="T84">The problem with this, is that these annotations will probably not be accurate enough even if the user preforming them is an experienced musician. There are multiple reasons that stem from </text:span><text:span text:style-name="T85">perception, </text:span><text:span text:style-name="T86">human motor noise, jitter and system latency </text:span><text:span text:style-name="T82"><text:s/></text:span><text:reference-mark-start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82">(Driedger et al., 2019)</text:span><text:reference-mark-end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86">. </text:span><text:span text:style-name="T87">Thus when tapping, there is the need to shift marked beats in order to make them accurate:</text:span></text:p>
      <text:p text:style-name="P87"><text:s/></text:p>
      <text:p text:style-name="P88"><text:span text:style-name="T87">“</text:span><text:span text:style-name="T88">This shifting operation is particularly relevant when correcting tapped beats, which can be subject to human motor noise as well as jitter and latency during acquisition.</text:span><text:span text:style-name="T87">”</text:span></text:p>
      <text:p text:style-name="P89"><text:reference-mark-start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Sá Pinto et al., 2020)<text:reference-mark-end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p>
      <text:p text:style-name="P90"><text:span text:style-name="T89">A tool that might prove useful for the shifting beats task is “Shift If You Can” </text:span><text:reference-mark-start text:name="ZOTERO_ITEM CSL_CITATION {&quot;citationID&quot;:&quot;WywUWlqz&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5mc71XbDtB"/><text:span text:style-name="T90">(Sá Pinto et al., 2020)</text:span><text:reference-mark-end text:name="ZOTERO_ITEM CSL_CITATION {&quot;citationID&quot;:&quot;WywUWlqz&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5mc71XbDtB"/><text:span text:style-name="T89">. This is an open-source python library made specifically to aid in the development of such a task. In the </text:span><text:span text:style-name="T91">“</text:span><text:a xlink:type="simple" xlink:href="#4.2.2nd Iteration of GUI|outline" text:style-name="Internet_20_link" text:visited-style-name="Visited_20_Internet_20_Link"><text:span text:style-name="T91">2</text:span><text:span text:style-name="T92">nd</text:span><text:span text:style-name="T91"> Iteration of GUI</text:span></text:a><text:span text:style-name="T91">” </text:span><text:span text:style-name="T93">under the</text:span><text:span text:style-name="T91"> “Work Plan” sub-chapter, </text:span><text:span text:style-name="T89"><text:s/>I describe in more detail how this </text:span><text:span text:style-name="T91">shall be done </text:span><text:span text:style-name="T93">and function.</text:span></text:p>
      <text:p text:style-name="Text_20_body"/>
      <text:h text:style-name="P91" text:outline-level="2"><text:bookmark-start text:name="__RefHeading___Toc16572_2365495780"/>Existing Tools for Beat Annotation<text:bookmark-end text:name="__RefHeading___Toc16572_2365495780"/></text:h>
      <text:p text:style-name="P92"><text:span text:style-name="T94">Sonic Visualizer is still the go-to software for scientific and MIR purposed audio analysis. However when it comes to BT, SV is outdated due to it’s inefficient BT labeling process, that is still very much manual and cumbersome </text:span><text:reference-mark-start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94">(Yamamoto, 2021)</text:span><text:reference-mark-end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94">. SV also is heavily reliant on VAMP plug-ins, modern SoTA BT algorithms are complex ML applications that may be difficult to implement into VAMP plug-ins and/or there is no direct or valued incentive for making these algorithms available </text:span><text:span text:style-name="T95">in this way.</text:span></text:p>
      <text:p text:style-name="P93"/>
      <text:p text:style-name="P93">Time Instances inside SV (name of the main tool in SV for BT), can be exported and imported as simple .txt files. Thus, for one to benefit from a SoTA BT algorithm, one needs to follow a few steps:</text:p>
      <text:list text:style-name="L3">
        <text:list-item>
          <text:p text:style-name="P94">First, one needs to have access the algorithm in itself which might involve not only browsing/<text:span text:style-name="T96">researching</text:span>, but also probably, accessing some publicly available source-code repository. </text:p>
        </text:list-item>
        <text:list-item>
          <text:p text:style-name="P94"><text:soft-page-break/>Secondly, one needs to know <text:span text:style-name="T96">not only</text:span> how to compile and run the program, <text:span text:style-name="T96">but also</text:span> export the retrieved data into a .txt file that SV can read. </text:p>
        </text:list-item>
        <text:list-item>
          <text:p text:style-name="P94">Besides this, we also need to take into account that to accomplish these steps, one needs at least, to be minimally literate/experienced with programming. <text:span text:style-name="T91">Which might not be the case for a lot of beat annotators</text:span></text:p>
          <text:p text:style-name="P94"/>
        </text:list-item>
      </text:list>
      <text:p text:style-name="P95"><text:span text:style-name="T97">A</text:span><text:span text:style-name="T98"> problem with this, is that other users, who may not be experienced in programming or literate in MIR research, will rely on the most easily accessible BT algorithm inside SV, and </text:span><text:span text:style-name="T99">these will probably </text:span><text:span text:style-name="T100">be</text:span><text:span text:style-name="T99"> B</text:span><text:span text:style-name="T101">T algorithms</text:span><text:span text:style-name="T99"> </text:span><text:span text:style-name="T101">such as</text:span><text:span text:style-name="T99">: BeatRoot </text:span><text:reference-mark-start text:name="ZOTERO_ITEM CSL_CITATION {&quot;citationID&quot;:&quot;k3AXep9K&quot;,&quot;properties&quot;:{&quot;unsorted&quot;:false,&quot;formattedCitation&quot;:&quot;(S. Dixon, 2001)&quot;,&quot;plainCitation&quot;:&quot;(S. 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iTAQXnGHsn"/><text:span text:style-name="T99">(S. Dixon, 2001)</text:span><text:reference-mark-end text:name="ZOTERO_ITEM CSL_CITATION {&quot;citationID&quot;:&quot;k3AXep9K&quot;,&quot;properties&quot;:{&quot;unsorted&quot;:false,&quot;formattedCitation&quot;:&quot;(S. Dixon, 2001)&quot;,&quot;plainCitation&quot;:&quot;(S. 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iTAQXnGHsn"/><text:span text:style-name="T99">, </text:span><text:span text:style-name="T102">Tempo and Beat Tracker - </text:span><text:span text:style-name="T100">Q</text:span><text:span text:style-name="T103">ueen Mary University of London</text:span><text:span text:style-name="T102"> </text:span><text:reference-mark-start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102">(Stark et al., 2009)</text:span><text:reference-mark-end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100">, and</text:span><text:span text:style-name="T103"> </text:span><text:span text:style-name="T99">IBT – I</text:span><text:span text:style-name="T103">NESC Beat Tracker </text:span><text:reference-mark-start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103">(Oliveira et al., 2010)</text:span><text:reference-mark-end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103"> </text:span><text:span text:style-name="T100">among others. </text:span><text:span text:style-name="T102">The reason being that, although they don’t come pre-installed with SV, they can be added via </text:span><text:span text:style-name="T104">a</text:span><text:span text:style-name="T102"> </text:span><text:span text:style-name="T100">native feature</text:span><text:span text:style-name="T102"> that allows to browse and install VAMP plugins without exiting the program </text:span><text:span text:style-name="T104">(referring to the “Find Transform” <text:s/>SV </text:span><text:span text:style-name="T101">sub-menu</text:span><text:span text:style-name="T104">)</text:span><text:span text:style-name="T102">. </text:span><text:span text:style-name="T100">Crucially it is important to note that, as of the writing of this paper, you will not find any </text:span><text:span text:style-name="T104">SoTA BT using this SV built-in feature, in fact one will only find outdated BT that are at least </text:span><text:span text:style-name="T105">more then a</text:span><text:span text:style-name="T104"> decade old.</text:span></text:p>
      <text:p text:style-name="P96"/>
      <text:p text:style-name="P96">One of the most common <text:span text:style-name="T106">autonomous </text:span>BT assessment mistakes are the Double/Half time errors, in which the algorithm might mark the beat in orders of integer multiplication (or division) from the actually correct beat.</text:p>
      <text:p text:style-name="P96"/>
      <text:p text:style-name="P96">Another common mistake might be inducing multiple closely sequenced markings in the place where only one should be, or the contrary, omitting/skipping beats. For correcting these type of mistakes, current Beat Tracking software only allow correcting beats one-by-one. A simple workaround for this mistake would be to develop a feature in which the user could select a time region of beats and perform an operation such as:</text:p>
      <text:p text:style-name="P96"/>
      <text:p text:style-name="P97">‘<text:span text:style-name="T4">In this region, that start at xx:xx and ends at </text:span><text:span text:style-name="T107">yy</text:span><text:span text:style-name="T4">:</text:span><text:span text:style-name="T107">yy</text:span><text:span text:style-name="T4">, the tempo is a steady X bpm with Y/Z timeSignature.</text:span>’</text:p>
      <text:p text:style-name="P97"/>
      <text:p text:style-name="P98"><text:span text:style-name="T106">T</text:span>he program would then shift/eliminate/highlight marked beats that deviate from the “user statement”. <text:span text:style-name="T91">I specify in depth how this tool should </text:span><text:span text:style-name="T93">function</text:span><text:span text:style-name="T91"> in the “</text:span><text:a xlink:type="simple" xlink:href="#4.2.2nd Iteration of GUI|outline" text:style-name="Internet_20_link" text:visited-style-name="Visited_20_Internet_20_Link"><text:span text:style-name="T91">2</text:span><text:span text:style-name="T92">nd</text:span><text:span text:style-name="T91"> Iteration of GUI</text:span></text:a><text:span text:style-name="T91">” </text:span><text:span text:style-name="T93">under the</text:span><text:span text:style-name="T91"> “Work Plan” sub-chapter. <text:s/></text:span></text:p>
      <text:p text:style-name="P99"/>
      <text:h text:style-name="P91" text:outline-level="2" text:is-list-header="true"><text:soft-page-break/></text:h>
      <text:h text:style-name="P91" text:outline-level="2"><text:bookmark-start text:name="__RefHeading___Toc4080_3106982271"/>HIL Approach for BT<text:bookmark-end text:name="__RefHeading___Toc4080_3106982271"/></text:h>
      <text:p text:style-name="P100">In 202<text:span text:style-name="T108">1</text:span> Yamamoto proposed a Human-In-the-Loop <text:span text:style-name="T109">(HIL) </text:span>approach for BT, the problem is, although this paper seems promising, the software developed for this paper is closed-sourced, property of Yamaha Corp. and thus, it is not likely to be publicly accessible.</text:p>
      <text:p text:style-name="P101"/>
      <text:p text:style-name="P102"><text:span text:style-name="T110">The</text:span> paper <text:span text:style-name="T110">also</text:span> fails to mention how a spectrogram<text:span text:style-name="T111"> </text:span>can be beneficial as opposed to the more conventional waveform <text:span text:style-name="T111">representation </text:span><text:span text:style-name="T109">of audio</text:span>. <text:span text:style-name="T109">A</text:span> waveform can be useful for <text:span text:style-name="T111">identifying general differences in energy, </text:span><text:span text:style-name="T112">on the other hand</text:span><text:span text:style-name="T109"> s</text:span><text:span text:style-name="T111">pectograms can, besides that, represent information related with spectral energy in time </text:span><text:span text:style-name="T112">(frequency-energy)</text:span><text:span text:style-name="T111">.</text:span></text:p>
      <text:p text:style-name="P102"/>
      <text:p text:style-name="P103"><text:span text:style-name="T113">A clear example of this would be: In a waveform, one can distinguish a <text:s/></text:span><text:span text:style-name="T114">ff</text:span><text:span text:style-name="T113"> section of from a </text:span><text:span text:style-name="T114">pp</text:span><text:span text:style-name="T113"> in a recording. In a spectogram, one can not only distinguish these, but also understand if </text:span><text:span text:style-name="T115">a particular section </text:span><text:span text:style-name="T113">would be chord hit, or a</text:span><text:span text:style-name="T115">n</text:span><text:span text:style-name="T113"> </text:span><text:span text:style-name="T114">arpeggio, </text:span><text:span text:style-name="T115">along side noticing where these note onsets would be located pitch wise.</text:span></text:p>
      <text:p text:style-name="P104"/>
      <text:p text:style-name="P104"/>
      <text:h text:style-name="P105" text:outline-level="2"><draw:frame draw:style-name="fr2" draw:name="Frame3" text:anchor-type="paragraph" svg:y="4.25mm" svg:width="126.89mm" draw:z-index="4"><draw:text-box fo:min-height="97.77mm"><text:p text:style-name="P106"><draw:frame text:anchor-type="paragraph" draw:z-index="5" draw:name="Image with transparency 1" draw:style-name="gr3" draw:text-style-name="P107" svg:width="126.88mm" svg:height="97.76mm" svg:x="0mm" svg:y="0mm"><draw:image xlink:href="Pictures/10000001000005770000043692700D01.png" xlink:type="simple" xlink:show="embed" xlink:actuate="onLoad" draw:mime-type="image/png"><text:p/></draw:image></draw:frame>Figure <text:sequence text:ref-name="refFigure0" text:name="Figure" text:formula="ooow:Figure+1" style:num-format="1">1</text:sequence>: Yamamoto's HIL Approach for BT GUI. Screenshot taken from an official demo of the GUI in question. <text:span text:style-name="T93">Link in </text:span><text:a xlink:type="simple" xlink:href="#4.Appendix|outline" text:style-name="Internet_20_link" text:visited-style-name="Visited_20_Internet_20_Link"><text:span text:style-name="T93">appendix</text:span></text:a><text:span text:style-name="T93">.</text:span></text:p></draw:text-box></draw:frame></text:h>
      <text:h text:style-name="P81" text:outline-level="2"><text:bookmark-start text:name="__RefHeading___Toc8250_584189157"/>Audio-to-Score Alignment for BT<text:bookmark-end text:name="__RefHeading___Toc8250_584189157"/></text:h>
      <text:p text:style-name="P70"><text:span text:style-name="T116">Something that is not very well documented, is the relevance of following along a music score when </text:span><text:span text:style-name="T117">performing </text:span><text:span text:style-name="T118">BA</text:span><text:span text:style-name="T116">. Besides helping the annotator follow along more accurately the recording, a score might notice the annotator in advance of any bpm or time signature changes. Besides that, when using a Spectrogram-Based view of the recording, one can distinctively align a specific onset to a concrete and exact </text:span><text:span text:style-name="T119">moment in the recording timeline, this is essential to know if a beat is accurately assessed or not.</text:span></text:p>
      <text:p text:style-name="P108"/>
      <text:p text:style-name="P70"><text:span text:style-name="T119">Piano Precision </text:span><text:reference-mark-start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119">(Jiang et al., 2025)</text:span><text:reference-mark-end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119">, is an example of a SV fork that was designed for displaying musical scores alongside audio recordings in a unified graphical interface. This program works surprisingly well for </text:span><text:span text:style-name="T117">classical</text:span><text:span text:style-name="T119"> Solo Piano pieces. Now there are two question that arrive from this:</text:span></text:p>
      <text:p text:style-name="P108"/>
      <text:list text:style-name="L4">
        <text:list-item>
          <text:p text:style-name="P109">One is that, by following along the music sheet, Beat Tracking autonomously should be as straight forward as making the program align a beat marking with the respective note onsets that are marked in the score. <text:span text:style-name="T120">Although Piano Precision already does this with high enough accuracy for Audio-to-Score alignment, for beat tracking </text:span><text:span text:style-name="T109">adjustments might be needed, yet, it still </text:span><text:span text:style-name="T121">might </text:span><text:span text:style-name="T109">give a</text:span><text:span text:style-name="T122">more accurate beat assessment </text:span><text:span text:style-name="T121">than some SoTA </text:span><text:span text:style-name="T122">BT</text:span><text:span text:style-name="T109">. </text:span></text:p>
          <text:p text:style-name="P109"/>
        </text:list-item>
        <text:list-item>
          <text:p text:style-name="P110"><text:span text:style-name="T119">The other would be to integrate this idea of Audio-to-Score alignment with a Spectral View of the recording. In Piano Precision this is done via a side-window that displays the a single A4 page of the score, one at a time. When the user hits play, a darkened highlight displays the current playback position in the score, while in another window a spectral view of the audio is following along the playback position horizontally. This allows for a musically natural follow-along of the score, mimicking how a musical score is actually read </text:span><text:span text:style-name="T123">and followed</text:span><text:span text:style-name="T119">. However, for audio analysis and visualization purposes, it could be beneficial for the score to be aligned and viewed along side the playback position, meaning, horizontally and with note onsets that are aligned with their respective absolute position in the timeline. For BT this could allow the user to “grab a beat” and position it on the it’s corresponding position on top of the spectogram representation. Also this could be beneficial for more easily detecting beats that should be shifted.</text:span></text:p>
        </text:list-item>
      </text:list>
      <text:h text:style-name="P105" text:outline-level="2"/>
      <text:h text:style-name="P67" text:outline-level="1"><text:bookmark-start text:name="__RefHeading___Toc16576_2365495780"/>Work Plan<text:bookmark-end text:name="__RefHeading___Toc16576_2365495780"/></text:h>
      <text:p text:style-name="P111"/>
      <text:table-of-content text:style-name="Sect1" text:protected="true" text:name="Table of Content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P112">Table of Contents</text:p>
          </text:index-title>
          <text:p text:style-name="P113"><text:a xlink:type="simple" xlink:href="#__RefHeading___Toc16576_2365495780" office:name="Work Plan" text:style-name="Index_20_Link" text:visited-style-name="Index_20_Link">Work Plan<text:tab/>12</text:a></text:p>
          <text:p text:style-name="P114"><text:a xlink:type="simple" xlink:href="#__RefHeading___Toc4101_3656789684" office:name="1st Iteration of the GUI" text:style-name="Index_20_Link" text:visited-style-name="Index_20_Link">1<text:span text:style-name="T2">st</text:span> Iteration of the GUI<text:tab/>13</text:a></text:p>
          <text:p text:style-name="P114"><text:a xlink:type="simple" xlink:href="#__RefHeading___Toc4103_3656789684" office:name="1st Testing phase" text:style-name="Index_20_Link" text:visited-style-name="Index_20_Link">1<text:span text:style-name="T2">st</text:span> Testing phase<text:tab/>15</text:a></text:p>
          <text:p text:style-name="P114"><text:a xlink:type="simple" xlink:href="#__RefHeading___Toc4105_3656789684" office:name="Intermediate Presentation Preparation" text:style-name="Index_20_Link" text:visited-style-name="Index_20_Link">Intermediate Presentation Preparation<text:tab/>15</text:a></text:p>
          <text:p text:style-name="P114"><text:a xlink:type="simple" xlink:href="#__RefHeading___Toc4107_3656789684" office:name="2nd Iteration of GUI" text:style-name="Index_20_Link" text:visited-style-name="Index_20_Link">2<text:span text:style-name="T2">nd</text:span> Iteration of GUI<text:tab/>16</text:a></text:p>
          <text:p text:style-name="P114"><text:a xlink:type="simple" xlink:href="#__RefHeading___Toc4109_3656789684" office:name="2nd Phase Testing" text:style-name="Index_20_Link" text:visited-style-name="Index_20_Link">2<text:span text:style-name="T2">nd</text:span> Phase Testing<text:tab/>18</text:a></text:p>
          <text:p text:style-name="P114"><text:a xlink:type="simple" xlink:href="#__RefHeading___Toc4111_3656789684" office:name="Public Defense Preparation" text:style-name="Index_20_Link" text:visited-style-name="Index_20_Link">Public Defense Preparation<text:tab/>18</text:a></text:p>
          <text:p text:style-name="P114"><text:a xlink:type="simple" xlink:href="#__RefHeading___Toc4113_3656789684" office:name="Thesis Finalization" text:style-name="Index_20_Link" text:visited-style-name="Index_20_Link">Thesis Finalization<text:tab/>19</text:a></text:p>
        </text:index-body>
      </text:table-of-content>
      <text:p text:style-name="P115"/>
      <text:p text:style-name="P115"/>
      <text:p text:style-name="P116"><draw:frame draw:style-name="fr3" draw:name="Frame2" text:anchor-type="char" svg:x="0.42mm" svg:y="1.75mm" svg:width="170mm" draw:z-index="0"><draw:text-box fo:min-height="66.25mm"><text:p text:style-name="P106"><draw:frame draw:style-name="fr4" draw:name="Image2" text:anchor-type="paragraph" svg:width="170mm" style:rel-width="100%" svg:height="66.25mm" style:rel-height="scale" draw:z-index="1"><draw:image xlink:href="Pictures/1000000100000BB8000006985BFDB5D2.png" xlink:type="simple" xlink:show="embed" xlink:actuate="onLoad" draw:mime-type="image/png"/></draw:frame>Figure <text:sequence text:ref-name="refFigure1" text:name="Figure" text:formula="ooow:Figure+1" style:num-format="1">2</text:sequence>: Timeline of planed deadlines for thesis developement.</text:p></draw:text-box></draw:frame></text:p>
      <text:p text:style-name="P117"/>
      <text:p text:style-name="P118"><text:sequence-ref text:reference-format="category-and-value" text:ref-name="refFigure1">Figure 2</text:sequence-ref><text:s/><text:span text:style-name="T124">shows a timeline with official deadlines and rough</text:span><text:span text:style-name="T125">ly</text:span><text:span text:style-name="T124"> marked self made deadlines. It is important to note that </text:span><text:span text:style-name="T126">“</text:span><text:span text:style-name="T127">thesis writing” is not inherently described in the timeline because it is implied that, the writing </text:span><text:span text:style-name="T128">should be</text:span><text:span text:style-name="T127"> done along this whole period.</text:span></text:p>
      <text:p text:style-name="P117"><text:s/><text:line-break/>Each of the self imposed deadlines, marked in <text:sequence-ref text:reference-format="category-and-value" text:ref-name="refFigure1">Figure 2</text:sequence-ref><text:s/>with the colored <text:span text:style-name="T129">rectangles</text:span>, have concrete objectives that should be met. <text:span text:style-name="T129">These are described in detail in the following sub-chapters.</text:span></text:p>
      <text:h text:style-name="P81" text:outline-level="2"><text:bookmark-start text:name="__RefHeading___Toc4101_3656789684"/><text:span text:style-name="T130">1</text:span><text:span text:style-name="T131">st</text:span><text:span text:style-name="T130"> Iteration of the GUI </text:span><text:bookmark-end text:name="__RefHeading___Toc4101_3656789684"/></text:h>
      <text:p text:style-name="P119"><text:span text:style-name="T124">12</text:span><text:span text:style-name="T132">th</text:span><text:span text:style-name="T133"> </text:span><text:span text:style-name="T124">February — </text:span><text:span text:style-name="T133">5</text:span><text:span text:style-name="T134">th</text:span><text:span text:style-name="T133"> April</text:span></text:p>
      <text:p text:style-name="Text_20_body"><text:span text:style-name="T135">List of </text:span><text:span text:style-name="T136">main </text:span><text:span text:style-name="T135">objectives:</text:span></text:p>
      <text:list xml:id="list5798035" text:style-name="L5">
        <text:list-item>
          <text:list>
            <text:list-item>
              <text:p text:style-name="P120"><text:span text:style-name="T135">Deci</text:span><text:span text:style-name="T137">de</text:span><text:span text:style-name="T135">: </text:span><text:span text:style-name="T11">P</text:span><text:span text:style-name="T138">P/SV</text:span><text:span text:style-name="T11"> fork VS </text:span><text:a xlink:type="simple" xlink:href="#1.3.Appendix |outline" text:style-name="Internet_20_link" text:visited-style-name="Visited_20_Internet_20_Link"><text:span text:style-name="T139">BeatMapJS</text:span></text:a> <text:span text:style-name="T135">as starting point</text:span></text:p>
            </text:list-item>
            <text:list-item>
              <text:p text:style-name="P121">Basic <text:span text:style-name="T11">barebones</text:span> functional GUI</text:p>
            </text:list-item>
            <text:list-item>
              <text:p text:style-name="P122">Ability to <text:span text:style-name="T11">upload a recording </text:span><text:span text:style-name="T138">(.wav)</text:span><text:span text:style-name="T11"> with it’s .mei score file</text:span>.</text:p>
            </text:list-item>
            <text:list-item>
              <text:p text:style-name="P123"><text:span text:style-name="T135">Basic </text:span><text:span text:style-name="T140">BA</text:span><text:span text:style-name="T139"> features</text:span><text:span text:style-name="T135"> </text:span><text:span text:style-name="T141">(tap </text:span><text:span text:style-name="T137">beats</text:span><text:span text:style-name="T141">, </text:span><text:span text:style-name="T142">remove </text:span><text:span text:style-name="T141">and</text:span><text:span text:style-name="T142"> adjust)</text:span> </text:p>
            </text:list-item>
            <text:list-item>
              <text:p text:style-name="P121">Side-by-side (split horizontal<text:span text:style-name="T135">ly</text:span>) <text:span text:style-name="T11">Spectrogram view of audio and score with roughly aligned score</text:span>. </text:p>
            </text:list-item>
            <text:list-item>
              <text:p text:style-name="P121"><text:span text:style-name="T11">View of note Onsets </text:span>on top of Spectogram <text:span text:style-name="T135">(</text:span><text:span text:style-name="T141">with</text:span><text:span text:style-name="T135"> show/hide </text:span><text:span text:style-name="T141">function</text:span><text:span text:style-name="T135">)</text:span></text:p>
            </text:list-item>
            <text:list-item>
              <text:p text:style-name="P124"><text:span text:style-name="T143">Integrated SoTA </text:span><text:span text:style-name="T11">BeatThis! BT </text:span><text:span text:style-name="T143">algorithm.</text:span><text:span text:style-name="T141"> O</text:span>n top of the spectogram <text:span text:style-name="T135">(</text:span><text:span text:style-name="T141">with</text:span><text:span text:style-name="T135"> show/hide </text:span><text:span text:style-name="T141">function</text:span><text:span text:style-name="T135">).</text:span></text:p>
            </text:list-item>
            <text:list-item>
              <text:p text:style-name="P125">Export beat mapping to .txt file compatible with SV.</text:p>
            </text:list-item>
            <text:list-item>
              <text:p text:style-name="P124">Score is set horizontally bellow the spectogram. <text:span text:style-name="T143">N</text:span><text:span text:style-name="T11">o notes need to be displayed. </text:span><text:span text:style-name="T143">J</text:span><text:span text:style-name="T11">ust the measures</text:span><text:span text:style-name="T12"> with </text:span><text:span text:style-name="T144">their</text:span><text:span text:style-name="T12"> counter </text:span><text:span text:style-name="T141">(as described in the designated score): </text:span><text:span text:style-name="T18">1</text:span><text:span text:style-name="T145"> measure should be the length between </text:span><text:span text:style-name="T146">2 </text:span><text:span text:style-name="T145">downbeats. </text:span></text:p>
              <text:p text:style-name="P124"/>
            </text:list-item>
          </text:list>
        </text:list-item>
      </text:list>
      <text:p text:style-name="P126">The focus of the<text:span text:style-name="T147"> 1</text:span><text:span text:style-name="T148">st</text:span><text:span text:style-name="T147"> Iteration</text:span> is <text:span text:style-name="T12">to have a functional </text:span><text:span text:style-name="T11">barebones GUI that focuses on the Audio-to-Score alignment</text:span><text:span text:style-name="T149"> </text:span>functionality. This is not only the most important feature for this work, but it also might be the most <text:span text:style-name="T150">challenging to develop. The use of the source code for P</text:span><text:span text:style-name="T137">P</text:span><text:span text:style-name="T150"> as a starting point </text:span><text:span text:style-name="T137">might </text:span><text:span text:style-name="T150">prove helpful, </text:span><text:span text:style-name="T137">although might be difficult to </text:span><text:span text:style-name="T151">implement due to various reasons.</text:span><text:span text:style-name="T150"> </text:span><text:span text:style-name="T137">(see </text:span><text:span text:style-name="T137"><text:sequence-ref text:reference-format="category-and-value" text:ref-name="refTable0">Table 2</text:sequence-ref></text:span><text:span text:style-name="T137">).</text:span></text:p>
      <text:p text:style-name="P126"><text:span text:style-name="T150"><text:s/><text:line-break/></text:span><text:span text:style-name="T135">D</text:span><text:span text:style-name="T150">uring the 1</text:span><text:span text:style-name="T152">st</text:span><text:span text:style-name="T150"> term of this semester I developed a </text:span><text:span text:style-name="T30">BA</text:span><text:span text:style-name="T150"> GUI with a Web based interface. </text:span><text:span text:style-name="T153">Internally named </text:span><text:a xlink:type="simple" xlink:href="#1.3.Appendix |outline" text:style-name="Internet_20_link" text:visited-style-name="Visited_20_Internet_20_Link"><text:span text:style-name="T153">BeatMapJS (link for repo. in Appendix chapter)</text:span></text:a><text:span text:style-name="T153">. </text:span><text:span text:style-name="T150">This GUI </text:span><text:span text:style-name="T154">was </text:span><text:span text:style-name="T155">meant as a testing project, but it </text:span><text:span text:style-name="T150">already has:</text:span></text:p>
      <text:list text:style-name="L6">
        <text:list-item>
          <text:p text:style-name="P127"><text:span text:style-name="T142">Ba</text:span><text:span text:style-name="T150">sic features for </text:span><text:span text:style-name="T30">BA</text:span><text:span text:style-name="T150"> </text:span><text:span text:style-name="T142">(beat tapping, remove, adjust, add labels and </text:span><text:span text:style-name="T154">possibility to </text:span><text:span text:style-name="T142">mark beats as downbeats)</text:span></text:p>
        </text:list-item>
        <text:list-item>
          <text:p text:style-name="P127"><text:span text:style-name="T142">Working s</text:span><text:span text:style-name="T150">pec</text:span><text:span text:style-name="T142">t</text:span><text:span text:style-name="T150">ogram </text:span><text:span text:style-name="T142">v</text:span><text:span text:style-name="T150">iew</text:span></text:p>
        </text:list-item>
        <text:list-item>
          <text:p text:style-name="P128">BeatThis! BT integration </text:p>
        </text:list-item>
        <text:list-item>
          <text:p text:style-name="P129">Export/Import <text:span text:style-name="T30">BA</text:span> to .txt compatible with SV.</text:p>
        </text:list-item>
        <text:list-item>
          <text:p text:style-name="P130">Other various UI/UX features (region marking <text:span text:style-name="T156">and labelling</text:span>, zoom in/out, spectogram <text:span text:style-name="T151">focused view, waveform view, beat labeling and assignable downbeat function</text:span><text:span text:style-name="T156">) </text:span></text:p>
        </text:list-item>
      </text:list>
      <text:p text:style-name="P131"><draw:frame draw:style-name="fr5" draw:name="Frame1" text:anchor-type="char" svg:y="3.42mm" svg:width="163.14mm" draw:z-index="2"><draw:text-box fo:min-height="91.6mm"><text:p text:style-name="P132"><draw:frame draw:style-name="fr6" draw:name="Image3" text:anchor-type="paragraph" svg:width="174.55mm" style:rel-width="107%" svg:height="92.41mm" style:rel-height="scale" draw:z-index="3"><draw:image xlink:href="Pictures/1000000100000769000003DBA479A638.png" xlink:type="simple" xlink:show="embed" xlink:actuate="onLoad" draw:mime-type="image/png"/></draw:frame>Figure <text:sequence text:ref-name="refFigure2" text:name="Figure" text:formula="ooow:Figure+1" style:num-format="1">3</text:sequence>: BeatMapJS interface, screenshot <text:span text:style-name="T157">taken February 2026. GitHub repo. in Appenix.</text:span></text:p></draw:text-box></draw:frame><text:soft-page-break/></text:p>
      <text:p text:style-name="P133"><text:span text:style-name="T158">First, it is important to decide if I should use BeatMapJS or Piano Precision </text:span><text:span text:style-name="T159">(PP, an </text:span><text:span text:style-name="T158">SV fork) as a starting point for the proposed GUI. </text:span><text:span text:style-name="T159">Going the</text:span><text:span text:style-name="T160"> </text:span><text:span text:style-name="T158">SV </text:span><text:span text:style-name="T160">fork </text:span><text:span text:style-name="T159">way</text:span><text:span text:style-name="T160">,</text:span><text:span text:style-name="T158"> should </text:span><text:span text:style-name="T160">help</text:span><text:span text:style-name="T158"> </text:span><text:span text:style-name="T160">with</text:span><text:span text:style-name="T158"> the Audio-to-Score alignment and would probably </text:span><text:span text:style-name="T159">lead </text:span><text:span text:style-name="T158">into a more robust </text:span><text:span text:style-name="T159">GUI</text:span><text:span text:style-name="T158"> due to SV’s already </text:span><text:span text:style-name="T159">established</text:span><text:span text:style-name="T158"> features. However, working with </text:span><text:span text:style-name="T159">PP</text:span><text:span text:style-name="T158"> Source code might prove difficult because it is an extensive mainly C++/Qt code base, </text:span><text:span text:style-name="T161">and honestly… I am not an experienced enough programmer, although not impossible... this makes me fear the worst :</text:span><text:span text:style-name="T162">’)</text:span></text:p>
      <text:p text:style-name="P133"/>
      <text:p text:style-name="P134"/>
      <table:table table:name="Table" table:style-name="Table">
        <table:table-column table:style-name="Table.A" table:number-columns-repeated="3"/>
        <table:table-column table:style-name="Table.D"/>
        <table:table-row table:style-name="Table.1">
          <table:table-cell table:style-name="Table.A1" table:number-columns-spanned="2" office:value-type="string">
            <text:p text:style-name="P135">Sonic Visualizer <text:span text:style-name="T163">Fork</text:span></text:p>
          </table:table-cell>
          <table:covered-table-cell/>
          <table:table-cell table:style-name="Table.A1" table:number-columns-spanned="2" office:value-type="string">
            <text:p text:style-name="P136">Continuing BeatMapJS</text:p>
          </table:table-cell>
          <table:covered-table-cell/>
        </table:table-row>
        <table:table-row table:style-name="Table.1">
          <table:table-cell table:style-name="Table.A1" office:value-type="string">
            <text:p text:style-name="P136">Cons</text:p>
          </table:table-cell>
          <table:table-cell table:style-name="Table.A1" office:value-type="string">
            <text:p text:style-name="P136">Pros</text:p>
          </table:table-cell>
          <table:table-cell table:style-name="Table.A1" office:value-type="string">
            <text:p text:style-name="P136">Cons</text:p>
          </table:table-cell>
          <table:table-cell table:style-name="Table.A1" office:value-type="string">
            <text:p text:style-name="P136">Pros</text:p>
          </table:table-cell>
        </table:table-row>
        <table:table-row table:style-name="Table.3">
          <table:table-cell table:style-name="Table.A3" office:value-type="string">
            <text:p text:style-name="P137">Large C++/Qt codebase</text:p>
          </table:table-cell>
          <table:table-cell table:style-name="Table.A3" office:value-type="string">
            <text:p text:style-name="P138">Polished visualization and playback Tools</text:p>
          </table:table-cell>
          <table:table-cell table:style-name="Table.A3" office:value-type="string">
            <text:p text:style-name="P137">Less polished UI/UX</text:p>
          </table:table-cell>
          <table:table-cell table:style-name="Table.A3" office:value-type="string">
            <text:p text:style-name="P138">Freedom to decide system architecture</text:p>
          </table:table-cell>
        </table:table-row>
        <table:table-row table:style-name="Table.4">
          <table:table-cell table:style-name="Table.A3" office:value-type="string">
            <text:p text:style-name="P137">Harder for quick prototyping</text:p>
          </table:table-cell>
          <table:table-cell table:style-name="Table.A3" office:value-type="string">
            <text:p text:style-name="P138">Established workflow for SV users</text:p>
          </table:table-cell>
          <table:table-cell table:style-name="Table.A3" office:value-type="string">
            <text:p text:style-name="P137">Non-existent initial user base</text:p>
          </table:table-cell>
          <table:table-cell table:style-name="Table.A3" office:value-type="string">
            <text:p text:style-name="P138">Faster and easier prototyping</text:p>
          </table:table-cell>
        </table:table-row>
        <table:table-row table:style-name="Table.5">
          <table:table-cell table:style-name="Table.A3" office:value-type="string">
            <text:p text:style-name="P137">Dealing with legacy code and design decisions.</text:p>
          </table:table-cell>
          <table:table-cell table:style-name="Table.A3" office:value-type="string">
            <text:p text:style-name="P138">Large and active user base.</text:p>
          </table:table-cell>
          <table:table-cell table:style-name="Table.A3" office:value-type="string">
            <text:p text:style-name="P137">Build audio &amp; visual. Infrastructure from scratch</text:p>
          </table:table-cell>
          <table:table-cell table:style-name="Table.A3" office:value-type="string">
            <text:p text:style-name="P138">Ability to introduce modern technologies</text:p>
          </table:table-cell>
        </table:table-row>
      </table:table>
      <text:p text:style-name="P139">Table <text:sequence text:ref-name="refTable0" text:name="Table" text:formula="ooow:Table+1" style:num-format="1">2</text:sequence>: Example Pros&amp;Cons of using SV's (or PP's) <text:s/>codebase against continuing to develop <text:span text:style-name="T151">my own</text:span> BeatMapJS.</text:p>
      <text:p text:style-name="P140">On the other hand, BeatMapJS is a JavaScrip/HTML/python codebase <text:span text:style-name="T164">fully </text:span>developed <text:span text:style-name="T164">by me</text:span>. Although still clunky, it already <text:span text:style-name="T164">has </text:span>essential built-in features. <text:span text:style-name="T164">The </text:span><text:span text:style-name="T154">three</text:span><text:span text:style-name="T164"> main discussion points for reeling on my BeatMapJS repo. </text:span><text:span text:style-name="T154">are</text:span><text:span text:style-name="T164">:</text:span></text:p>
      <text:list text:style-name="L7">
        <text:list-header>
          <text:p text:style-name="P141">1.<text:tab/>I would be developing a <text:span text:style-name="T154">new </text:span>web-based GUI <text:span text:style-name="T154">(this is not necessarily bad, just a statement </text:span><text:span text:style-name="T151">with it’s caviats</text:span><text:span text:style-name="T154">)</text:span></text:p>
          <text:p text:style-name="P142"><text:span text:style-name="T164">2.<text:tab/></text:span><text:span text:style-name="T154">Not tacking advantage of SV’s and PP already robust codebase and established UI elements.</text:span></text:p>
          <text:p text:style-name="P143">3.<text:tab/>Having to build the score alignment feature from the ground up. <text:s text:c="3"/></text:p>
        </text:list-header>
      </text:list>
      <text:p text:style-name="P144"><text:span text:style-name="T165">For making the score-to-audio alignment I mean to remove every note</text:span><text:span text:style-name="T166">s</text:span><text:span text:style-name="T165"> and </text:span><text:span text:style-name="T167">simply represent the score with time signatures and empty measurements</text:span><text:span text:style-name="T165"> (with simple beat markers on top). The reason being that, displaying notes and rhythms on top of the score opens up a to a myriad of interface problems that I describe in more detail in the “</text:span><text:a xlink:type="simple" xlink:href="#1.3.4.2nd Iteration of GUI|outline" text:style-name="Internet_20_link" text:visited-style-name="Visited_20_Internet_20_Link"><text:span text:style-name="T165">2</text:span><text:span text:style-name="T168">nd </text:span><text:span text:style-name="T165"><text:s/></text:span><text:span text:style-name="T169">Iteration P</text:span><text:span text:style-name="T165">hase</text:span></text:a><text:span text:style-name="T165">” chapter. </text:span><text:span text:style-name="T169">The importance here is to </text:span><text:span text:style-name="T170">lay the foundation for the audio-to-score alignment for BA</text:span><text:span text:style-name="T169">. There is a</text:span><text:span text:style-name="T171">n</text:span><text:span text:style-name="T169"> open source tool that might prove helpful in this task, this is </text:span><text:span text:style-name="T172">the</text:span><text:span text:style-name="T169"> “</text:span><text:span text:style-name="T172">S</text:span><text:span text:style-name="T169">core</text:span><text:span text:style-name="T172">W</text:span><text:span text:style-name="T169">arp” repository </text:span><text:reference-mark-start text:name="ZOTERO_ITEM CSL_CITATION {&quot;citationID&quot;:&quot;hX4Y4PEt&quot;,&quot;properties&quot;:{&quot;unsorted&quot;:false,&quot;formattedCitation&quot;:&quot;(Goebl, 2025)&quot;,&quot;plainCitation&quot;:&quot;(Goebl, 2025)&quot;,&quot;noteIndex&quot;:0},&quot;citationItems&quot;:[{&quot;id&quot;:28,&quot;uris&quot;:[&quot;http://zotero.org/users/local/CZ3ofjYB/items/Y925NG5S&quot;],&quot;itemData&quot;:{&quot;id&quot;:28,&quot;type&quot;:&quot;article-journal&quot;,&quot;language&quot;:&quot;en&quot;,&quot;source&quot;:&quot;Zotero&quot;,&quot;title&quot;:&quot;Let’s do the ScoreWarp again! Shifting notes to performance timelines&quot;,&quot;author&quot;:[{&quot;family&quot;:&quot;Goebl&quot;,&quot;given&quot;:&quot;Werner&quot;}],&quot;issued&quot;:{&quot;date-parts&quot;:[[&quot;2025&quot;]]}}}],&quot;schema&quot;:&quot;https://github.com/citation-style-language/schema/raw/master/csl-citation.json&quot;} RNDLF5F2VBKcf"/>(Goebl, 2025)<text:reference-mark-end text:name="ZOTERO_ITEM CSL_CITATION {&quot;citationID&quot;:&quot;hX4Y4PEt&quot;,&quot;properties&quot;:{&quot;unsorted&quot;:false,&quot;formattedCitation&quot;:&quot;(Goebl, 2025)&quot;,&quot;plainCitation&quot;:&quot;(Goebl, 2025)&quot;,&quot;noteIndex&quot;:0},&quot;citationItems&quot;:[{&quot;id&quot;:28,&quot;uris&quot;:[&quot;http://zotero.org/users/local/CZ3ofjYB/items/Y925NG5S&quot;],&quot;itemData&quot;:{&quot;id&quot;:28,&quot;type&quot;:&quot;article-journal&quot;,&quot;language&quot;:&quot;en&quot;,&quot;source&quot;:&quot;Zotero&quot;,&quot;title&quot;:&quot;Let’s do the ScoreWarp again! Shifting notes to performance timelines&quot;,&quot;author&quot;:[{&quot;family&quot;:&quot;Goebl&quot;,&quot;given&quot;:&quot;Werner&quot;}],&quot;issued&quot;:{&quot;date-parts&quot;:[[&quot;2025&quot;]]}}}],&quot;schema&quot;:&quot;https://github.com/citation-style-language/schema/raw/master/csl-citation.json&quot;} RNDLF5F2VBKcf"/><text:span text:style-name="T173">. </text:span><text:span text:style-name="T172">As described in the </text:span><text:a xlink:type="simple" xlink:href="#3.Appendix|outline" text:style-name="Internet_20_link" text:visited-style-name="Visited_20_Internet_20_Link"><text:span text:style-name="T172">GitHub repo</text:span></text:a><text:span text:style-name="T172">:</text:span></text:p>
      <text:p text:style-name="P145"><text:span text:style-name="T172">“</text:span><text:span text:style-name="T174">ScoreWarp is a JavaScript package that warps a score </text:span><text:span text:style-name="T175">(</text:span><text:span text:style-name="T174">…</text:span><text:span text:style-name="T175">)</text:span><text:span text:style-name="T174"> in order to horizontally align its elements with a given physical performance timeline.</text:span><text:span text:style-name="T172">”</text:span></text:p>
      <text:p text:style-name="P146"/>
      <text:p text:style-name="P144"><text:span text:style-name="T173">It is important to note that, during this phase, if every </text:span><text:span text:style-name="T169">objective</text:span><text:span text:style-name="T173"> is met </text:span><text:span text:style-name="T169">before the self-imposed deadline</text:span><text:span text:style-name="T173">, I should try to implement 2</text:span><text:span text:style-name="T176">nd</text:span><text:span text:style-name="T173"> phase development tasks. The more complete the proposed GUI is in this phase, the better.</text:span></text:p>
      <text:p text:style-name="P147"/>
      <text:h text:style-name="Heading_20_2" text:outline-level="2"><text:bookmark-start text:name="__RefHeading___Toc4103_3656789684"/>1<text:span text:style-name="T2">st</text:span> Testing phase<text:bookmark-end text:name="__RefHeading___Toc4103_3656789684"/></text:h>
      <text:p text:style-name="P148">6<text:span text:style-name="T2">th</text:span> of April — 20<text:span text:style-name="T2">th</text:span> of April</text:p>
      <text:p text:style-name="P149">List of essential objectives:</text:p>
      <text:list xml:id="list232437865111829" text:continue-list="list5798035" text:style-name="L5">
        <text:list-item>
          <text:list>
            <text:list-item>
              <text:p text:style-name="P150"><text:span text:style-name="T135">Show developed UI to experienced </text:span><text:span text:style-name="T177">annotators and other relevant personal.</text:span></text:p>
            </text:list-item>
            <text:list-item>
              <text:p text:style-name="P151">List possible UI/UX improvements/changes</text:p>
            </text:list-item>
          </text:list>
        </text:list-item>
      </text:list>
      <text:p text:style-name="P152">In this phase I should be able to have an “alpha” version of the proposed GUI. Although being a barebones showcase, <text:span text:style-name="T30">it </text:span>should be in <text:span text:style-name="T177">such a</text:span> state where <text:span text:style-name="T177">it is possible for </text:span>selected users <text:span text:style-name="T177">to</text:span> test it in a controlled way. Meaning, with a selected and pre-<text:span text:style-name="T178">made</text:span> session (<text:span text:style-name="T125">i.e. </text:span>chosen music with already aligned score and BA made), <text:span text:style-name="T177">users should be able to alter variables add labels and adjust beats etc</text:span>. <text:span text:style-name="T177">The idea here is not for testers to develop a full BA “from </text:span><text:span text:style-name="T179">scratch</text:span><text:span text:style-name="T177">” but to </text:span><text:span text:style-name="T179">function</text:span><text:span text:style-name="T177"> more as a showcase </text:span><text:span text:style-name="T179">of the proposed UI/UX</text:span><text:span text:style-name="T177">. </text:span><text:span text:style-name="T178">The focus of this testing </text:span><text:span text:style-name="T179">phase</text:span><text:span text:style-name="T178"> </text:span><text:span text:style-name="T179">should be</text:span><text:span text:style-name="T178"> to: serve as </text:span><text:span text:style-name="T180">proof of concept that Score-to-Audio alignment and </text:span><text:span text:style-name="T181">spectogram </text:span><text:span text:style-name="T182">are</text:span><text:span text:style-name="T181"> useful tools for BA</text:span><text:span text:style-name="T183">.</text:span></text:p>
      <text:h text:style-name="Heading_20_2" text:outline-level="2" text:is-list-header="true"><text:soft-page-break/></text:h>
      <text:h text:style-name="Heading_20_2" text:outline-level="2" text:is-list-header="true"><text:bookmark-start text:name="__RefHeading___Toc4105_3656789684"/>Intermediate Presentation Preparation<text:bookmark-end text:name="__RefHeading___Toc4105_3656789684"/></text:h>
      <text:p text:style-name="P153"><text:span text:style-name="T133">1</text:span><text:span text:style-name="T134">st</text:span><text:span text:style-name="T133"> April — 20</text:span><text:span text:style-name="T134">th </text:span><text:span text:style-name="T133">Apri</text:span><text:span text:style-name="T125">l</text:span></text:p>
      <text:p text:style-name="P153"/>
      <text:p text:style-name="P154">List of essential objectives:</text:p>
      <text:list text:style-name="L8">
        <text:list-item>
          <text:p text:style-name="P155">Prepare slide presentation</text:p>
        </text:list-item>
        <text:list-item>
          <text:p text:style-name="P155">Rehearse presantation</text:p>
        </text:list-item>
        <text:list-item>
          <text:p text:style-name="P155">Record/Present Demo of developed GUI</text:p>
        </text:list-item>
      </text:list>
      <text:p text:style-name="P156"><text:span text:style-name="T125">It is essential to prepare a </text:span><text:span text:style-name="T179">good </text:span><text:span text:style-name="T184">presentation. The focus should be on providing value prof of the tools I will be developing. It is also essential that the presentation has a working demo of the proposed GUI, a video recording of the GUI in action should be enough, although live demo would be better.</text:span></text:p>
      <text:p text:style-name="P156"/>
      <text:h text:style-name="P157" text:outline-level="2"><text:bookmark-start text:name="__RefHeading___Toc4107_3656789684"/>2<text:span text:style-name="T2">nd</text:span> Iteration of GUI<text:bookmark-end text:name="__RefHeading___Toc4107_3656789684"/></text:h>
      <text:p text:style-name="P148">24<text:span text:style-name="T2">th</text:span> April — 1<text:span text:style-name="T2">st</text:span> June</text:p>
      <text:p text:style-name="P148">List of <text:span text:style-name="T136">main o</text:span>bjectives</text:p>
      <text:list text:continue-list="list232437865111829" text:style-name="L5">
        <text:list-item>
          <text:list>
            <text:list-item>
              <text:p text:style-name="P158">Develop/Implement essential <text:span text:style-name="T11">features listed in the 1</text:span><text:span text:style-name="T185">st</text:span><text:span text:style-name="T11"> Testing Phase</text:span>. </text:p>
            </text:list-item>
            <text:list-item>
              <text:p text:style-name="P159">Snap <text:span text:style-name="T186">to</text:span> beat <text:span text:style-name="T133">function</text:span><text:span text:style-name="T186">s. Develop </text:span><text:span text:style-name="T187">u</text:span><text:span text:style-name="T188">ser choice</text:span><text:span text:style-name="T187">s</text:span><text:span text:style-name="T188">: </text:span><text:span text:style-name="T189">snap to onset, snap to beat, no snaping</text:span></text:p>
            </text:list-item>
            <text:list-item>
              <text:p text:style-name="P160"><text:span text:style-name="T11">Show complete score aligned</text:span> with the spectogram <text:span text:style-name="T190">(user shall need to ajust portions acording to the BA, but that feature should have been already implemented as stated on <text:s/>the 1</text:span><text:span text:style-name="T191">st</text:span><text:span text:style-name="T190"> phase of development)</text:span>. </text:p>
            </text:list-item>
            <text:list-item>
              <text:p text:style-name="P161"><text:span text:style-name="T11">Show problematic beat regions</text:span>, these should be regions where the beat assessment is irregular or unconventional. User should be able to <text:span text:style-name="T11">cycle through these sections</text:span> quickly in order to flag them as correct or incorrect. The user can then (or later) make the necessary adjustments in problematic flagged regions.</text:p>
            </text:list-item>
            <text:list-item>
              <text:p text:style-name="P162">Develop Region Functions: Delete/Add/Edit multiple beats in a given user defined region. This should serve as a function to among other things, manually <text:span text:style-name="T11">correct the half/double BT problem</text:span>. </text:p>
            </text:list-item>
            <text:list-item>
              <text:p text:style-name="P162"><text:span text:style-name="T11">UI/UX various improv</text:span><text:span text:style-name="T192">e</text:span><text:span text:style-name="T11">ments</text:span> (look and feel, keyboard shortcuts etc.)</text:p>
              <text:p text:style-name="P162"/>
            </text:list-item>
          </text:list>
        </text:list-item>
      </text:list>
      <text:p text:style-name="P163">If on the 1<text:span text:style-name="T2">st</text:span> phase of <text:span text:style-name="T193">development </text:span><text:span text:style-name="T30">the</text:span><text:span text:style-name="T193"> focus </text:span><text:span text:style-name="T30">was on</text:span><text:span text:style-name="T193"> introducing a novel BA feature, the Score-to-Audio alignment. On the </text:span>2<text:span text:style-name="T2">nd</text:span> phase of <text:span text:style-name="T193">development</text:span> I should be focusing on adding features that actually <text:span text:style-name="T11">improve </text:span><text:span text:style-name="T192">on current BA </text:span><text:span text:style-name="T182">methods</text:span><text:span text:style-name="T193">. Among various </text:span><text:span text:style-name="T30">i</text:span><text:span text:style-name="T193">mprovements t</text:span><text:span text:style-name="T30">hree</text:span><text:span text:style-name="T193"> stand out:</text:span></text:p>
      <text:p text:style-name="P164"><text:soft-page-break/></text:p>
      <text:list text:style-name="L9">
        <text:list-item>
          <text:p text:style-name="P165"><text:span text:style-name="T194">S</text:span><text:span text:style-name="T195">nap beat feature to align incorrect beats either to onsets or beats assessed by BeatThis!. This should be an on/off function. </text:span><text:span text:style-name="T196">C</text:span><text:span text:style-name="T195">an be helpful </text:span><text:span text:style-name="T196">to enable</text:span><text:span text:style-name="T195"> a more accurat</text:span><text:span text:style-name="T196">e</text:span><text:span text:style-name="T195">, manually tapped, </text:span><text:span text:style-name="T196">BA </text:span><text:span text:style-name="T195">or even to shift BeatThis! beat assessments </text:span><text:span text:style-name="T196">to close onsets</text:span><text:span text:style-name="T195">.</text:span></text:p>
        </text:list-item>
        <text:list-item>
          <text:p text:style-name="P166">Add a GUI tool to solve “half/double time” BT assessments. </text:p>
        </text:list-item>
        <text:list-item>
          <text:p text:style-name="P167">Full Score-to-Audio <text:span text:style-name="T197">alignment.</text:span> On the first stage, I focus on making the score align by making each measure correspond to their real time length. This should be the ground work to then implement the <text:span text:style-name="T198">a </text:span>full <text:span text:style-name="T198">score visualization with notes. Although a lot of questions will come from this like: </text:span></text:p>
        </text:list-item>
      </text:list>
      <text:list text:style-name="L10">
        <text:list-item>
          <text:list>
            <text:list-item>
              <text:list>
                <text:list-item>
                  <text:p text:style-name="P168">If the score has multiple instruments (ex. orchestra, choral, ensamble etc.) how will it the representation work?</text:p>
                </text:list-item>
                <text:list-item>
                  <text:p text:style-name="P168">How will view zoom in/out work with the score allignement? When zooming out, notes and measure can get all scrambled. Do we define the zoom to be limited in a given range for this not to happen?</text:p>
                </text:list-item>
                <text:list-item>
                  <text:p text:style-name="P168">If there is a staff or time signature change on the beginning of the measure how should the alignment be made for the measure vs first note of the mesure?</text:p>
                </text:list-item>
              </text:list>
            </text:list-item>
          </text:list>
        </text:list-item>
      </text:list>
      <text:p text:style-name="P169"><text:span text:style-name="T199">The first improvement point (snap beat feature), is one that will benefit from the</text:span><text:span text:style-name="T200"> python library</text:span><text:span text:style-name="T199"> “Shift If You Can” developed by the thesis supervisor </text:span><text:reference-mark-start text:name="ZOTERO_ITEM CSL_CITATION {&quot;citationID&quot;:&quot;u63UukT1&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2aPIIxeei1"/><text:span text:style-name="T201">(Sá Pinto et al., 2020</text:span><text:span text:style-name="T202">)</text:span><text:reference-mark-end text:name="ZOTERO_ITEM CSL_CITATION {&quot;citationID&quot;:&quot;u63UukT1&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2aPIIxeei1"/><text:span text:style-name="T203">. </text:span><text:span text:style-name="T199">This </text:span><text:span text:style-name="T200">repository is a library for beat shifting related operations. This might be especially helpful for this task, but might also be useful in other aspects of the project (such as the labelling os “problematic” areas).</text:span></text:p>
      <text:p text:style-name="P170"/>
      <text:p text:style-name="P171"><text:span text:style-name="T200">The second point is one clear improvement on current BA software (SV and Audacity). This is the most common BT error for decades now being commonly referenced in a lot of BT literature: </text:span><text:reference-mark-start text:name="ZOTERO_ITEM CSL_CITATION {&quot;citationID&quot;:&quot;rd7mlw20&quot;,&quot;properties&quot;:{&quot;unsorted&quot;:false,&quot;formattedCitation&quot;:&quot;(Dixon, 2001)&quot;,&quot;plainCitation&quot;:&quot;(Dixon, 2001)&quot;,&quot;noteIndex&quot;:0},&quot;citationItems&quot;:[{&quot;id&quot;:24,&quot;uris&quot;:[&quot;http://zotero.org/users/local/CZ3ofjYB/items/MGWZXEYL&quot;],&quot;itemData&quot;:{&quot;id&quot;:24,&quot;type&quot;:&quot;article-journal&quot;,&quot;abstract&quot;:&quot;One of the difﬁculties with assessing tempo or beat tracking systems is that there is no standard corpus of data on which they can be tested. This situation is partly because the choice of data set often depends on the goals of the system, which might be, for example, automatic transcription, computer accompaniment of a human performer, or the analysis of expressive timing in musical performance. Without standard test data, there is the risk of overﬁtting a system to the data on which it is tested, and developing a system which is not suitable for use outside a very limited musical domain. In this paper, we use a large, publicly available set of performances of two Beatles songs recorded on a Yamaha Disklavier in order to compare two models of tempo tracking: a probabilistic model which uses a Kalman ﬁlter to estimate tempo and beat times, and a tempo tracker based on a multiagent search strategy. Both models perform extremely well on the test data, with the multiagent search achieving marginally better results. We propose two simple measures of tempo tracking difﬁculty, and argue that a broader set of test data is required for comprehensive testing of tempo tracking systems.&quot;,&quot;language&quot;:&quot;en&quot;,&quot;source&quot;:&quot;Zotero&quot;,&quot;title&quot;:&quot;An Empirical Comparison of Tempo Trackers&quot;,&quot;author&quot;:[{&quot;family&quot;:&quot;Dixon&quot;,&quot;given&quot;:&quot;Simon&quot;}],&quot;issued&quot;:{&quot;date-parts&quot;:[[&quot;2001&quot;]]}}}],&quot;schema&quot;:&quot;https://github.com/citation-style-language/schema/raw/master/csl-citation.json&quot;} RNDQwrlK6bdNz"/><text:span text:style-name="T200">(Dixon, 2001)</text:span><text:reference-mark-end text:name="ZOTERO_ITEM CSL_CITATION {&quot;citationID&quot;:&quot;rd7mlw20&quot;,&quot;properties&quot;:{&quot;unsorted&quot;:false,&quot;formattedCitation&quot;:&quot;(Dixon, 2001)&quot;,&quot;plainCitation&quot;:&quot;(Dixon, 2001)&quot;,&quot;noteIndex&quot;:0},&quot;citationItems&quot;:[{&quot;id&quot;:24,&quot;uris&quot;:[&quot;http://zotero.org/users/local/CZ3ofjYB/items/MGWZXEYL&quot;],&quot;itemData&quot;:{&quot;id&quot;:24,&quot;type&quot;:&quot;article-journal&quot;,&quot;abstract&quot;:&quot;One of the difﬁculties with assessing tempo or beat tracking systems is that there is no standard corpus of data on which they can be tested. This situation is partly because the choice of data set often depends on the goals of the system, which might be, for example, automatic transcription, computer accompaniment of a human performer, or the analysis of expressive timing in musical performance. Without standard test data, there is the risk of overﬁtting a system to the data on which it is tested, and developing a system which is not suitable for use outside a very limited musical domain. In this paper, we use a large, publicly available set of performances of two Beatles songs recorded on a Yamaha Disklavier in order to compare two models of tempo tracking: a probabilistic model which uses a Kalman ﬁlter to estimate tempo and beat times, and a tempo tracker based on a multiagent search strategy. Both models perform extremely well on the test data, with the multiagent search achieving marginally better results. We propose two simple measures of tempo tracking difﬁculty, and argue that a broader set of test data is required for comprehensive testing of tempo tracking systems.&quot;,&quot;language&quot;:&quot;en&quot;,&quot;source&quot;:&quot;Zotero&quot;,&quot;title&quot;:&quot;An Empirical Comparison of Tempo Trackers&quot;,&quot;author&quot;:[{&quot;family&quot;:&quot;Dixon&quot;,&quot;given&quot;:&quot;Simon&quot;}],&quot;issued&quot;:{&quot;date-parts&quot;:[[&quot;2001&quot;]]}}}],&quot;schema&quot;:&quot;https://github.com/citation-style-language/schema/raw/master/csl-citation.json&quot;} RNDQwrlK6bdNz"/><text:span text:style-name="T204">, </text:span><text:reference-mark-start text:name="ZOTERO_ITEM CSL_CITATION {&quot;citationID&quot;:&quot;zz4Zosrr&quot;,&quot;properties&quot;:{&quot;unsorted&quot;:false,&quot;formattedCitation&quot;:&quot;(Gouyon et al., 2006)&quot;,&quot;plainCitation&quot;:&quot;(Gouyon et al., 2006)&quot;,&quot;noteIndex&quot;:0},&quot;citationItems&quot;:[{&quot;id&quot;:19,&quot;uris&quot;:[&quot;http://zotero.org/users/local/CZ3ofjYB/items/CQ5ECQ39&quot;],&quot;itemData&quot;:{&quot;id&quot;:19,&quot;type&quot;:&quot;article-journal&quot;,&quot;abstract&quot;:&quot;We report on the tempo induction contest organized during the International Conference on Music Information Retrieval (ISMIR 2004) held at the University Pompeu Fabra in Barcelona, Spain, in October 2004. The goal of this contest was to evaluate some state-of-the-art algorithms in the task of inducing the basic tempo (as a scalar, in beats per minute) from musical audio signals. To our knowledge, this is the ﬁrst published large scale cross-validation of audio tempo induction algorithms.&quot;,&quot;container-title&quot;:&quot;IEEE Transactions on Audio, Speech, and Language Processing&quot;,&quot;DOI&quot;:&quot;10.1109/TSA.2005.858509&quot;,&quot;ISSN&quot;:&quot;1558-7916, 1558-7924&quot;,&quot;issue&quot;:&quot;5&quot;,&quot;journalAbbreviation&quot;:&quot;IEEE Trans. Audio Speech Lang. Process.&quot;,&quot;language&quot;:&quot;en&quot;,&quot;license&quot;:&quot;https://ieeexplore.ieee.org/Xplorehelp/downloads/license-information/IEEE.html&quot;,&quot;page&quot;:&quot;1832-1844&quot;,&quot;source&quot;:&quot;DOI.org (Crossref)&quot;,&quot;title&quot;:&quot;An experimental comparison of audio tempo induction algorithms&quot;,&quot;volume&quot;:&quot;14&quot;,&quot;author&quot;:[{&quot;family&quot;:&quot;Gouyon&quot;,&quot;given&quot;:&quot;F.&quot;},{&quot;family&quot;:&quot;Klapuri&quot;,&quot;given&quot;:&quot;A.&quot;},{&quot;family&quot;:&quot;Dixon&quot;,&quot;given&quot;:&quot;S.&quot;},{&quot;family&quot;:&quot;Alonso&quot;,&quot;given&quot;:&quot;M.&quot;},{&quot;family&quot;:&quot;Tzanetakis&quot;,&quot;given&quot;:&quot;G.&quot;},{&quot;family&quot;:&quot;Uhle&quot;,&quot;given&quot;:&quot;C.&quot;},{&quot;family&quot;:&quot;Cano&quot;,&quot;given&quot;:&quot;P.&quot;}],&quot;issued&quot;:{&quot;date-parts&quot;:[[&quot;2006&quot;,9]]}}}],&quot;schema&quot;:&quot;https://github.com/citation-style-language/schema/raw/master/csl-citation.json&quot;} RNDWkU8wAck9y"/><text:span text:style-name="T204">(Gouyon et al., 2006)</text:span><text:reference-mark-end text:name="ZOTERO_ITEM CSL_CITATION {&quot;citationID&quot;:&quot;zz4Zosrr&quot;,&quot;properties&quot;:{&quot;unsorted&quot;:false,&quot;formattedCitation&quot;:&quot;(Gouyon et al., 2006)&quot;,&quot;plainCitation&quot;:&quot;(Gouyon et al., 2006)&quot;,&quot;noteIndex&quot;:0},&quot;citationItems&quot;:[{&quot;id&quot;:19,&quot;uris&quot;:[&quot;http://zotero.org/users/local/CZ3ofjYB/items/CQ5ECQ39&quot;],&quot;itemData&quot;:{&quot;id&quot;:19,&quot;type&quot;:&quot;article-journal&quot;,&quot;abstract&quot;:&quot;We report on the tempo induction contest organized during the International Conference on Music Information Retrieval (ISMIR 2004) held at the University Pompeu Fabra in Barcelona, Spain, in October 2004. The goal of this contest was to evaluate some state-of-the-art algorithms in the task of inducing the basic tempo (as a scalar, in beats per minute) from musical audio signals. To our knowledge, this is the ﬁrst published large scale cross-validation of audio tempo induction algorithms.&quot;,&quot;container-title&quot;:&quot;IEEE Transactions on Audio, Speech, and Language Processing&quot;,&quot;DOI&quot;:&quot;10.1109/TSA.2005.858509&quot;,&quot;ISSN&quot;:&quot;1558-7916, 1558-7924&quot;,&quot;issue&quot;:&quot;5&quot;,&quot;journalAbbreviation&quot;:&quot;IEEE Trans. Audio Speech Lang. Process.&quot;,&quot;language&quot;:&quot;en&quot;,&quot;license&quot;:&quot;https://ieeexplore.ieee.org/Xplorehelp/downloads/license-information/IEEE.html&quot;,&quot;page&quot;:&quot;1832-1844&quot;,&quot;source&quot;:&quot;DOI.org (Crossref)&quot;,&quot;title&quot;:&quot;An experimental comparison of audio tempo induction algorithms&quot;,&quot;volume&quot;:&quot;14&quot;,&quot;author&quot;:[{&quot;family&quot;:&quot;Gouyon&quot;,&quot;given&quot;:&quot;F.&quot;},{&quot;family&quot;:&quot;Klapuri&quot;,&quot;given&quot;:&quot;A.&quot;},{&quot;family&quot;:&quot;Dixon&quot;,&quot;given&quot;:&quot;S.&quot;},{&quot;family&quot;:&quot;Alonso&quot;,&quot;given&quot;:&quot;M.&quot;},{&quot;family&quot;:&quot;Tzanetakis&quot;,&quot;given&quot;:&quot;G.&quot;},{&quot;family&quot;:&quot;Uhle&quot;,&quot;given&quot;:&quot;C.&quot;},{&quot;family&quot;:&quot;Cano&quot;,&quot;given&quot;:&quot;P.&quot;}],&quot;issued&quot;:{&quot;date-parts&quot;:[[&quot;2006&quot;,9]]}}}],&quot;schema&quot;:&quot;https://github.com/citation-style-language/schema/raw/master/csl-citation.json&quot;} RNDWkU8wAck9y"/><text:span text:style-name="T204"> ,</text:span><text:reference-mark-start text:name="ZOTERO_ITEM CSL_CITATION {&quot;citationID&quot;:&quot;RWpzufl8&quot;,&quot;properties&quot;:{&quot;unsorted&quot;:false,&quot;formattedCitation&quot;:&quot;(Gonz\\uc0\\u225{}lez, 2013)&quot;,&quot;plainCitation&quot;:&quot;(González, 2013)&quot;,&quot;noteIndex&quot;:0},&quot;citationItems&quot;:[{&quot;id&quot;:26,&quot;uris&quot;:[&quot;http://zotero.org/users/local/CZ3ofjYB/items/BLRRJTPU&quot;],&quot;itemData&quot;:{&quot;id&quot;:26,&quot;type&quot;:&quot;article-journal&quot;,&quot;language&quot;:&quot;en&quot;,&quot;source&quot;:&quot;Zotero&quot;,&quot;title&quot;:&quot;Comparative Evaluation and Combination of Automatic Rhythm Description Systems&quot;,&quot;author&quot;:[{&quot;family&quot;:&quot;González&quot;,&quot;given&quot;:&quot;José Ricardo Zapata&quot;}],&quot;issued&quot;:{&quot;date-parts&quot;:[[&quot;2013&quot;]]}}}],&quot;schema&quot;:&quot;https://github.com/citation-style-language/schema/raw/master/csl-citation.json&quot;} RNDPX0FOPgF7A"/><text:span text:style-name="T201">(González, 2013)</text:span><text:reference-mark-end text:name="ZOTERO_ITEM CSL_CITATION {&quot;citationID&quot;:&quot;RWpzufl8&quot;,&quot;properties&quot;:{&quot;unsorted&quot;:false,&quot;formattedCitation&quot;:&quot;(Gonz\\uc0\\u225{}lez, 2013)&quot;,&quot;plainCitation&quot;:&quot;(González, 2013)&quot;,&quot;noteIndex&quot;:0},&quot;citationItems&quot;:[{&quot;id&quot;:26,&quot;uris&quot;:[&quot;http://zotero.org/users/local/CZ3ofjYB/items/BLRRJTPU&quot;],&quot;itemData&quot;:{&quot;id&quot;:26,&quot;type&quot;:&quot;article-journal&quot;,&quot;language&quot;:&quot;en&quot;,&quot;source&quot;:&quot;Zotero&quot;,&quot;title&quot;:&quot;Comparative Evaluation and Combination of Automatic Rhythm Description Systems&quot;,&quot;author&quot;:[{&quot;family&quot;:&quot;González&quot;,&quot;given&quot;:&quot;José Ricardo Zapata&quot;}],&quot;issued&quot;:{&quot;date-parts&quot;:[[&quot;2013&quot;]]}}}],&quot;schema&quot;:&quot;https://github.com/citation-style-language/schema/raw/master/csl-citation.json&quot;} RNDPX0FOPgF7A"/>, <text:reference-mark-start text:name="ZOTERO_ITEM CSL_CITATION {&quot;citationID&quot;:&quot;G471QFcq&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eq5jFZ6BUD"/>(Foscarin et al., 2024)<text:reference-mark-end text:name="ZOTERO_ITEM CSL_CITATION {&quot;citationID&quot;:&quot;G471QFcq&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eq5jFZ6BUD"/>. <text:span text:style-name="T205">The solution I envision for this is to let the user define the given region </text:span><text:span text:style-name="T206">that is affected by this, </text:span><text:span text:style-name="T207">it should function as such</text:span><text:span text:style-name="T206">:</text:span></text:p>
      <text:list text:style-name="L11">
        <text:list-item>
          <text:p text:style-name="P172"><text:span text:style-name="T206">Set the bpm of that given region </text:span><text:span text:style-name="T208">and/or set if the assessment is half/double/triplet</text:span><text:span text:style-name="T206">. Beats that </text:span><text:span text:style-name="T209">are</text:span><text:span text:style-name="T206"> off w</text:span><text:span text:style-name="T209">ill </text:span><text:span text:style-name="T206">be highlighted so the user can then confirm the alteration. </text:span><text:span text:style-name="T208">So If a user defines: </text:span></text:p>
          <text:p text:style-name="P173">“<text:span text:style-name="T4">This section is marking double time starting at x beat of x measure and goes back to normal on y beat of y mesaure.</text:span>” </text:p>
          <text:p text:style-name="P174">If this was the case, then every other beat marking will be eliminated, starting at beat <text:span text:style-name="T4">x</text:span> measure <text:span text:style-name="T4">x</text:span> until beat <text:span text:style-name="T4">y</text:span> measure <text:span text:style-name="T4">y</text:span>. </text:p>
          <text:p text:style-name="P175">This would quickly solve the section <text:span text:style-name="T210">while at the same time correcting the measurement and beat counting label. </text:span></text:p>
          <text:p text:style-name="P176"/>
          <text:p text:style-name="P176"><text:soft-page-break/>In addition to this, the user could set if the bpm of that section is regular or if it fluctuates. Meaning beats of that section could either: Be set with a regular interval between them <text:span text:style-name="T208">(as set by absolute bpm value)</text:span>. <text:span text:style-name="T208">Or</text:span> if this <text:span text:style-name="T210">section</text:span> ha<text:span text:style-name="T210">s</text:span> fluctuations <text:span text:style-name="T208">in bpm,</text:span> <text:span text:style-name="T210">then</text:span> the beat would snap to the closest onset or beat prediction.</text:p>
          <text:p text:style-name="P176"/>
          <text:p text:style-name="P177"><text:span text:style-name="T207">If there is a</text:span> section, where the BT seems to be almost correct but with a few false positives (added beats) and/or false negatives (omitted beats) and/or slightly shifted beats every now and again. <text:s/>To correct this, as in the previous example, the user could set if the bpm of this region so that beats either are forced to be equally distanced (as set by user bpm) or snapped into closest onset/beat prediction. </text:p>
          <text:p text:style-name="P177"/>
          <text:p text:style-name="P178">It is also important to note that these features are supposed function in a “multiple” to “group” to “individual” workflow in mind. Where the user corrects a whole section, if he deems-it correct then he can move on, if there if most beats have been correctly assessed but a few were incorrectly snapped, than the user should be able to assess those beats individually or in tandem by either trying a different snap function (snap to onset instead of beat prediction) or if needed manually adjust via our good old friend click&amp;drag. </text:p>
          <text:p text:style-name="P176"/>
        </text:list-item>
      </text:list>
      <text:p text:style-name="P179">For the third point <text:span text:style-name="T197">(full </text:span><text:span text:style-name="T194">score-to-audio</text:span><text:span text:style-name="T172">)</text:span>, which might prove one of the most challenging features to implement <text:span text:style-name="T197">I still don’t know how to tackle. I belive I first have to accomplish the 1</text:span><text:span text:style-name="T211">st</text:span><text:span text:style-name="T197"> Iteration and go through the 1</text:span><text:span text:style-name="T211">st</text:span><text:span text:style-name="T197"> phase of testing to define better what I need to achieve in this topic.</text:span></text:p>
      <text:p text:style-name="P180"/>
      <text:p text:style-name="P181">One thing is clear in my mind. The adoption of a segmented BA process UX wise. By this I mean that any change needs to be confirmed by the user in order to be “locked” in the beat assessment. <text:span text:style-name="T212">Changes are made in section that are either automatically or manually designated, within these sections, the original/previous states are always shown as a “un-highlighted/</text:span><text:span text:style-name="T1">darkened</text:span><text:span text:style-name="T212">” <text:s/>beat markings, until the user submits the given section as “corrected”. The benefit is that </text:span><text:span text:style-name="T1">one, can</text:span><text:span text:style-name="T212"> always have the previous state as visual comparison against the new markings. This way if the user has a mental mapping of where multiple beats should be than he can more easily assess which tool </text:span><text:span text:style-name="T213">to</text:span><text:span text:style-name="T212"> use </text:span><text:span text:style-name="T1">and if the automated correction is ok</text:span><text:span text:style-name="T212">. </text:span><text:span text:style-name="T213">Also i</text:span><text:span text:style-name="T212">n a given section, the user could cycle through beat snapping, onset snapping, grid snapping etc, while still having the visual cue of the previous state. The user might </text:span><text:span text:style-name="T213">also </text:span><text:span text:style-name="T212">find helpful </text:span><text:span text:style-name="T213">the ability to</text:span><text:span text:style-name="T212"> quickly switch between hearing </text:span><text:span text:style-name="T213">the </text:span><text:span text:style-name="T212">old version, and the new</text:span><text:span text:style-name="T213"> possibility</text:span><text:span text:style-name="T212">. </text:span><text:span text:style-name="T213">This also turns BA a more systematic process where the user has to complete x amount of tasks thus making BA a more standardized process.</text:span></text:p>
      <text:p text:style-name="P182"/>
      <text:h text:style-name="P105" text:outline-level="2"/>
      <text:h text:style-name="P81" text:outline-level="2"><text:bookmark-start text:name="__RefHeading___Toc4109_3656789684"/>2<text:span text:style-name="T2">nd</text:span> Phase Testing<text:tab/><text:bookmark-end text:name="__RefHeading___Toc4109_3656789684"/></text:h>
      <text:p text:style-name="P183">1<text:span text:style-name="T2">st</text:span> June - 13<text:span text:style-name="T2">th</text:span> June<text:line-break/><text:line-break/><text:span text:style-name="T214">During this phase thesis <text:s/>doc. should be 85% written by </text:span><text:span text:style-name="T215">it’s</text:span><text:span text:style-name="T214"> end 100% </text:span><text:span text:style-name="T215">(before revision phase)</text:span><text:span text:style-name="T214">. <text:line-break/></text:span></text:p>
      <text:p text:style-name="P184">List of <text:span text:style-name="T136">main o</text:span>bjectives:</text:p>
      <text:list xml:id="list2223338114" text:style-name="L12">
        <text:list-item>
          <text:p text:style-name="P185">Final testing phase of the proposed GUI</text:p>
        </text:list-item>
        <text:list-item>
          <text:p text:style-name="P185">Utilizing testers feedback to make conclusions for thesis</text:p>
        </text:list-item>
        <text:list-item>
          <text:p text:style-name="P186">Listing flaws reported by testers</text:p>
          <text:p text:style-name="P186"/>
        </text:list-item>
      </text:list>
      <text:p text:style-name="P69"><text:span text:style-name="T214">For this phase to start my GUI needs to be accomplished, I shall not change or add anything in the source code beyond this point. </text:span><text:span text:style-name="T136">This is the essential phase to deliver a complete thesis report. It is through this phase that I will </text:span><text:span text:style-name="T214">assume </text:span><text:span text:style-name="T136">conclusions </text:span><text:span text:style-name="T214">of the effectiveness of my proposed GUI and it is through it that I will objectively understand my project’s strengths and flaw. Besides, this is a</text:span><text:span text:style-name="T1">n</text:span><text:span text:style-name="T214"> essential step to know how a work like this can move forward and contribute to MIR and BT research fields.</text:span></text:p>
      <text:h text:style-name="Heading_20_2" text:outline-level="2"><text:bookmark-start text:name="__RefHeading___Toc4111_3656789684"/>Public Defense Preparation<text:bookmark-end text:name="__RefHeading___Toc4111_3656789684"/></text:h>
      <text:p text:style-name="P187">1<text:span text:style-name="T215">5</text:span><text:span text:style-name="T2">th</text:span> Ju<text:span text:style-name="T215">ne</text:span> — 24<text:span text:style-name="T2">th</text:span> July</text:p>
      <text:p text:style-name="P187"/>
      <text:p text:style-name="P188"><text:span text:style-name="T135">List of essential objectives:</text:span></text:p>
      <text:list text:style-name="L13">
        <text:list-item>
          <text:p text:style-name="P189">Prepare slide presentation</text:p>
        </text:list-item>
        <text:list-item>
          <text:p text:style-name="P190"><text:span text:style-name="T125">Rehearse </text:span><text:span text:style-name="T214">Public Defense</text:span></text:p>
        </text:list-item>
        <text:list-item>
          <text:p text:style-name="P189">Record/Present Demo of developed GUI</text:p>
          <text:p text:style-name="P190"/>
        </text:list-item>
      </text:list>
      <text:p text:style-name="P191">This is it. The final presentation of my work. <text:span text:style-name="T215">The place where</text:span> I can explain in <text:span text:style-name="T215">face to face my thesis work</text:span>, it’s relevance and it’s impact. It is fundamental that I have a well prepared and well rehearsed Public Defense.</text:p>
      <text:p text:style-name="P192"/>
      <text:h text:style-name="Heading_20_2" text:outline-level="2"><text:bookmark-start text:name="__RefHeading___Toc4113_3656789684"/>Thesis Finalization<text:bookmark-end text:name="__RefHeading___Toc4113_3656789684"/></text:h>
      <text:p text:style-name="P193">1<text:span text:style-name="T215">5</text:span><text:span text:style-name="T2">th</text:span> Ju<text:span text:style-name="T215">ne</text:span> – <text:span text:style-name="T215">31</text:span><text:span text:style-name="T216">st</text:span><text:span text:style-name="T215"> Jul</text:span><text:span text:style-name="T122">y</text:span></text:p>
      <text:p text:style-name="P194">List of <text:span text:style-name="T136">main o</text:span>bjectives:</text:p>
      <text:list text:continue-list="list2223338114" text:style-name="L12">
        <text:list-item>
          <text:p text:style-name="P195">Finalize thesis document with supervisor’s advised corrections</text:p>
        </text:list-item>
        <text:list-item>
          <text:p text:style-name="P195"><text:soft-page-break/>Formatting thesis details</text:p>
        </text:list-item>
        <text:list-item>
          <text:p text:style-name="P195">Review whole bibliography</text:p>
        </text:list-item>
        <text:list-item>
          <text:p text:style-name="P195"><text:span text:style-name="T217">Prepare</text:span> project repository <text:span text:style-name="T217">for publishing</text:span></text:p>
          <text:p text:style-name="P195"/>
        </text:list-item>
      </text:list>
      <text:p text:style-name="P196">By the 15<text:span text:style-name="T2">th</text:span> of June (Submission of thesis for validation) <text:s/>a complete thesis should be submitted. Of course there will probably still be points to add or polish but those should come from my supervisor and other academics in the field.</text:p>
      <text:p text:style-name="P196"/>
      <text:p text:style-name="P196">I should take advantage during time, to be sure that my thesis is a polished and complete work.</text:p>
      <text:p text:style-name="P196"/>
      <text:p text:style-name="P196">If we intend for my work to be publicly published, then I shall use this time to make sure that my source-code is well documented, so that future work (either by myself or others) can be facilitated.</text:p>
      <text:h text:style-name="P197" text:outline-level="1" text:is-list-header="true"/>
      <text:h text:style-name="P198" text:outline-level="1"/>
      <text:h text:style-name="P198" text:outline-level="1"/>
      <text:h text:style-name="P198" text:outline-level="1"/>
      <text:h text:style-name="P198" text:outline-level="1" text:is-list-header="true"><text:bookmark-start text:name="__RefHeading___Toc4115_3656789684COPY_IS_MOVECOPY_IS_MOVE"/>Appendix<text:line-break/><text:bookmark-end text:name="__RefHeading___Toc4115_3656789684COPY_IS_MOVECOPY_IS_MOVE"/></text:h>
      <text:p text:style-name="P199"><text:span text:style-name="T122">Link “Yamamoto’s HIL GUI for BT” youtube demo:</text:span></text:p>
      <text:p text:style-name="P199"><text:a xlink:type="simple" xlink:href="https://www.youtube.com/watch?v=euBbBltgebM" text:style-name="Internet_20_link" text:visited-style-name="Visited_20_Internet_20_Link">https://www.youtube.com/watch?v=euBbBltgebM</text:a></text:p>
      <text:p text:style-name="P199"/>
      <text:p text:style-name="P200">Link for BeatMapJS repo: <text:a xlink:type="simple" xlink:href="https://github.com/FernandoAze/BeatMapJS.git" text:style-name="Internet_20_link" text:visited-style-name="Visited_20_Internet_20_Link">https://github.com/FernandoAze/BeatMapJS.git</text:a></text:p>
      <text:p text:style-name="P200"/>
      <text:p text:style-name="P201"><text:span text:style-name="T218">Link for ScoreWarp </text:span><text:span text:style-name="T219">repo: </text:span><text:a xlink:type="simple" xlink:href="https://github.com/iwk-digital/scorewarp" text:style-name="Internet_20_link" text:visited-style-name="Visited_20_Internet_20_Link"><text:span text:style-name="T219">https://github.com/iwk-digital/scorewarp</text:span></text:a></text:p>
      <text:p text:style-name="P200"/>
      <text:p text:style-name="P202"><text:span text:style-name="T218">Link for ShiftIfYouCan </text:span><text:span text:style-name="T220">repo:</text:span></text:p>
      <text:p text:style-name="P203"><text:a xlink:type="simple" xlink:href="https://github.com/asapsmc/ShiftIfYouCan" text:style-name="Internet_20_link" text:visited-style-name="Visited_20_Internet_20_Link">https://github.com/asapsmc/ShiftIfYouCan</text:a></text:p>
      <text:p text:style-name="P204"/>
      <text:h text:style-name="P205" text:outline-level="1"/>
      <text:h text:style-name="P67" text:outline-level="1"><text:bookmark-start text:name="__RefHeading___Toc5366_3656789684"/>Bibliography<text:bookmark-end text:name="__RefHeading___Toc5366_3656789684"/></text:h>
      <text:section text:style-name="Sect1" text:name="ZOTERO_BIBL {&quot;uncited&quot;:[],&quot;omitted&quot;:[],&quot;custom&quot;:[]} CSL_BIBLIOGRAPHY RNDmc6rXKdkQP">
        <text:p text:style-name="Bibliography_20_1">Desblancs, D., Lostanlen, V., &amp; Hennequin, R. (2023). Zero-Note Samba: Self-Supervised Beat Tracking. <text:span text:style-name="T221">IEEE/ACM Transactions on Audio, Speech, and Language Processing</text:span>, <text:span text:style-name="T221">31</text:span>, 2922–2934.</text:p>
        <text:p text:style-name="Bibliography_20_1">Dixon, S. (2001). <text:span text:style-name="T221">An Empirical Comparison of Tempo Trackers</text:span>.</text:p>
        <text:p text:style-name="Bibliography_20_1">Dixon, S. (2001). An interactive beat tracking and visualisation system. <text:span text:style-name="T221">Proceedings of the International Computer Music Conference (ICMC)</text:span>, 215–218.</text:p>
        <text:p text:style-name="Bibliography_20_1">Driedger, J., Schreiber, H., de Haas, W. B., &amp; Müller, M. (2019). Towards Automatically Correcting Tapped Beat Annotations for Music Recordings. <text:span text:style-name="T221">Proceedings of the 20th International Society for Music Information Retrieval Conference (ISMIR)</text:span>.</text:p>
        <text:p text:style-name="Bibliography_20_1">Foscarin, F., Schlüter, J., &amp; Widmer, G. (2024). Beat this! Accurate beat tracking without DBN postprocessing. <text:span text:style-name="T221">Proceedings of the 25th International Society for Music Information Retrieval Conference (ISMIR 2024)</text:span>.</text:p>
        <text:p text:style-name="Bibliography_20_1">Goebl, W. (2025). <text:span text:style-name="T221">Let’s do the ScoreWarp again! Shifting notes to performance timelines</text:span>.</text:p>
        <text:p text:style-name="Bibliography_20_1">González, J. R. Z. (2013). <text:span text:style-name="T221">Comparative Evaluation and Combination of Automatic Rhythm Description Systems</text:span>.</text:p>
        <text:p text:style-name="Bibliography_20_1">Gouyon, F., Klapuri, A., Dixon, S., Alonso, M., Tzanetakis, G., Uhle, C., &amp; Cano, P. (2006). An experimental comparison of audio tempo induction algorithms. <text:span text:style-name="T221">IEEE Transactions on Audio, Speech, and Language Processing</text:span>, <text:span text:style-name="T221">14</text:span>(5), 1832–1844. https://doi.org/10.1109/TSA.2005.858509</text:p>
        <text:p text:style-name="Bibliography_20_1">Jiang, Y., Weigl, D. M., &amp; Goebl, W. (2025). Piano Precision: Advancing Music Performance Analysis by Integrating User-Correctable Audio-to-Score Alignment. <text:span text:style-name="T221">Proceedings of the International Computer Music Conference (ICMC)</text:span>.</text:p>
        <text:p text:style-name="Bibliography_20_1">Oliveira, J. L., Gouyon, F., Martins, L. G., &amp; Reis, L. P. (2010). IBT: A Real-Time Tempo and Beat Tracking System. <text:span text:style-name="T221">Proceedings of the 11th International Society for Music Information Retrieval Conference (ISMIR)</text:span>.</text:p>
        <text:p text:style-name="Bibliography_20_1">Ru, G., Wang, J., Zhao, J., Wu, Y., Yu, Y., Jiang, N., Wang, W., &amp; Li, W. (2025). <text:span text:style-name="T221">HingeNet: A Harmonic-Aware Fine-Tuning Approach for Beat Tracking</text:span> (arXiv:2508.09788). arXiv. <text:soft-page-break/>https://doi.org/10.48550/arXiv.2508.09788</text:p>
        <text:p text:style-name="Bibliography_20_1">Sá Pinto, A., Domingues, I., &amp; Davies, M. E. P. (2020). Shift If You Can: Counting and Visualising Correction Operations for Beat Tracking Evaluation. <text:span text:style-name="T221">Extended Abstracts for the Late-Breaking Demo Session of the 21st International Society for Music Information Retrieval Conference (ISMIR)</text:span>.</text:p>
        <text:p text:style-name="Bibliography_20_1">Stark, A. M., Davies, M. E. P., &amp; Plumbley, M. D. (2009). Real-time beat-synchronous analysis of musical audio. <text:span text:style-name="T221">Proceedings of the 12th International Conference on Digital Audio Effects (DAFx-09)</text:span>.</text:p>
        <text:p text:style-name="Bibliography_20_1">Yamamoto, K. (2021). Human-in-the-Loop Adaptation for Interactive Musical Beat Tracking. <text:span text:style-name="T221">Proceedings of the 22nd International Society for Music Information Retrieval Conference (ISMIR)</text:span>.</text:p>
      </text:section>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l Nile" svg:font-family="'Al Nile'"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L" svg:font-family="'Nimbus Sans L'" style:font-family-generic="system"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2mm" draw:rotation="0"/>
    <draw:stroke-dash draw:name="Dashed_20__28_var_29__20_1" draw:display-name="Dashed (var) 1" draw:style="rect" draw:dots1="1" draw:dots1-length="0.11mm" draw:dots2="1" draw:dots2-length="0.11mm" draw:distance="0.11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9m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font-name="Times New Roman3"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4.23mm" fo:margin-bottom="2.12mm"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3.53mm" fo:margin-bottom="2.12mm" style:contextual-spacing="false"/>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2.47mm" fo:margin-bottom="2.12mm" style:contextual-spacing="false"/>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12.7mm" fo:margin-top="0mm" fo:margin-bottom="0mm" style:contextual-spacing="false" style:line-height-at-least="8.47mm" fo:text-indent="-12.7m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Times New Roman3"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name-asian="Times New Roman1" style:font-family-asian="'Times New Roman'" style:font-style-name-asian="Bold" style:font-family-generic-asian="roman" style:font-pitch-asian="variable" style:font-weight-asian="bold" style:font-weight-complex="bold"/>
    </style:style>
    <style:style style:name="Figure" style:family="paragraph" style:parent-style-name="Caption" style:class="extra"/>
    <style:style style:name="Comment" style:family="paragraph" style:parent-style-name="Standard" style:class="extra">
      <style:paragraph-properties fo:margin-left="1.01mm" fo:margin-right="1.01mm" fo:margin-top="0.99mm" fo:margin-bottom="0mm" style:contextual-spacing="false" fo:line-height="100%" fo:text-indent="0mm" style:auto-text-indent="false"/>
      <style:text-properties style:use-window-font-color="true" loext:opacity="0%"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2.12mm" fo:margin-bottom="2.12mm" style:contextual-spacing="false"/>
      <style:text-properties style:font-name="Times New Roman2" fo:font-family="'Times New Roman'"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author" style:family="paragraph" style:parent-style-name="Standard">
      <style:paragraph-properties fo:margin-top="4.99mm" fo:margin-bottom="0mm" style:contextual-spacing="false" fo:text-align="center" style:justify-single-word="false" fo:text-indent="0mm" style:auto-text-indent="false"/>
      <style:text-properties fo:font-size="14pt" fo:font-weight="bold" style:font-size-asian="14pt" style:font-weight-asian="bold" style:font-size-complex="14pt" style:font-weight-complex="bold"/>
    </style:style>
    <style:style style:name="Título1" style:family="paragraph" style:parent-style-name="Standard" style:next-style-name="Text_20_body">
      <style:paragraph-properties fo:margin-top="30mm" fo:margin-bottom="10mm" style:contextual-spacing="false" fo:text-align="center" style:justify-single-word="false" fo:text-indent="0mm" style:auto-text-indent="false" fo:keep-with-next="always"/>
      <style:text-properties fo:font-size="18pt" fo:font-weight="bold" style:font-size-asian="18pt" style:font-weight-asian="bold" style:font-name-complex="Nimbus Sans L" style:font-family-complex="'Nimbus Sans L'" style:font-family-generic-complex="system" style:font-pitch-complex="variable" style:font-size-complex="14pt"/>
    </style:style>
    <style:style style:name="Título_20_capa" style:display-name="Título capa" style:family="paragraph" style:parent-style-name="Título1">
      <style:paragraph-properties fo:margin-top="13mm" fo:margin-bottom="10mm" style:contextual-spacing="false"/>
      <style:text-properties fo:font-size="24pt" style:font-size-asian="2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tyle="italic" style:font-style-asian="italic" style:font-style-complex="italic"/>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style:style style:name="Inline_20_Heading" style:display-name="Inline Heading" style:family="graphic">
      <style:graphic-properties fo:min-width="0.41mm" fo:min-height="0.41mm" text:anchor-type="as-char" svg:y="0mm" fo:margin-left="0mm" fo:margin-right="0mm" style:vertical-pos="middle" style:vertical-rel="text" fo:background-color="transparent" draw:fill="none" draw:fill-color="#729fcf"/>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PT"/>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fo:background-color="transparent" draw:fill="none" draw:fill-color="#729fcf"/>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4:51:16.167864000</meta:creation-date>
    <dc:date>2026-02-12T23:24:36.630404000</dc:date>
    <meta:editing-duration>PT4H29S</meta:editing-duration>
    <meta:editing-cycles>18</meta:editing-cycles>
    <meta:generator>LibreOffice/26.2.0.3$MacOSX_X86_64 LibreOffice_project/afbbd0df0edb6d40b450b0337ac646b0913a760c</meta:generator>
    <meta:print-date>2026-02-12T23:21:19.829836000</meta:print-date>
    <meta:document-statistic meta:table-count="3" meta:image-count="3" meta:object-count="0" meta:page-count="24" meta:paragraph-count="334" meta:word-count="6614" meta:character-count="40690" meta:non-whitespace-character-count="34373"/>
    <meta:user-defined meta:name="ZOTERO_PREF_1">&lt;data data-version="3" zotero-version="8.0.3"&gt;&lt;session id="zFvMysCL"/&gt;&lt;style id="http://www.zotero.org/styles/apa" locale="en-US" hasBibliography="1" bibliographyStyleHasBeenSet="1"/&gt;&lt;prefs&gt;&lt;pref name="fieldType" value="ReferenceMark"/&gt;&lt;pref name="automat</meta:user-defined>
    <meta:user-defined meta:name="ZOTERO_PREF_2">icJournalAbbreviations" value="true"/&gt;&lt;/prefs&gt;&lt;/data&gt;</meta:user-defined>
  </office:meta>
</office:document-meta>
</file>