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5.3292in" table:align="left"/>
    </style:style>
    <style:style style:name="Table1.A" style:family="table-column">
      <style:table-column-properties style:column-width="0.8917in"/>
    </style:style>
    <style:style style:name="Table1.B" style:family="table-column">
      <style:table-column-properties style:column-width="1.7236in"/>
    </style:style>
    <style:style style:name="Table1.C" style:family="table-column">
      <style:table-column-properties style:column-width="1.2583in"/>
    </style:style>
    <style:style style:name="Table1.D" style:family="table-column">
      <style:table-column-properties style:column-width="1.4556in"/>
    </style:style>
    <style:style style:name="Table1.A1" style:family="table-cell">
      <style:table-cell-properties style:vertical-align="middle" fo:padding-left="0.0194in" fo:padding-right="0in" fo:padding-top="0in" fo:padding-bottom="0.0194in" fo:border-left="0.05pt solid #e8eaed" fo:border-right="none" fo:border-top="none" fo:border-bottom="0.05pt solid #e8eaed"/>
    </style:style>
    <style:style style:name="P1" style:family="paragraph" style:parent-style-name="Heading_20_1">
      <style:text-properties fo:language="en" fo:country="US" officeooo:rsid="001eb3ec" officeooo:paragraph-rsid="001eb3ec"/>
    </style:style>
    <style:style style:name="P2" style:family="paragraph" style:parent-style-name="Title">
      <style:paragraph-properties fo:text-align="center" style:justify-single-word="false"/>
      <style:text-properties style:font-name="Times New Roman" fo:font-size="28pt" style:font-size-asian="28pt" style:font-size-complex="28pt"/>
    </style:style>
    <style:style style:name="P3" style:family="paragraph" style:parent-style-name="Text_20_body">
      <style:paragraph-properties fo:break-before="page"/>
      <style:text-properties fo:language="en" fo:country="US" officeooo:rsid="001eb3ec" officeooo:paragraph-rsid="001eb3ec"/>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Text_20_body">
      <style:paragraph-properties fo:text-align="justify" style:justify-single-word="false"/>
      <style:text-properties fo:language="en" fo:country="US" officeooo:rsid="002a3fc4" officeooo:paragraph-rsid="002a8018"/>
    </style:style>
    <style:style style:name="P8" style:family="paragraph" style:parent-style-name="Text_20_body">
      <style:paragraph-properties fo:text-align="justify" style:justify-single-word="false"/>
      <style:text-properties officeooo:paragraph-rsid="002a8018"/>
    </style:style>
    <style:style style:name="P9" style:family="paragraph" style:parent-style-name="Text_20_body">
      <style:paragraph-properties fo:text-align="justify" style:justify-single-word="false"/>
      <style:text-properties fo:language="en" fo:country="US" officeooo:rsid="0027afd5" officeooo:paragraph-rsid="002a8018"/>
    </style:style>
    <style:style style:name="P10" style:family="paragraph" style:parent-style-name="Text_20_body">
      <style:paragraph-properties fo:text-align="justify" style:justify-single-word="false"/>
      <style:text-properties officeooo:paragraph-rsid="00383eec"/>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rsid="002c1a12" officeooo:paragraph-rsid="002c1a12"/>
    </style:style>
    <style:style style:name="P13" style:family="paragraph" style:parent-style-name="Heading_20_3" style:list-style-name="">
      <style:text-properties officeooo:rsid="0030adeb" officeooo:paragraph-rsid="0030adeb"/>
    </style:style>
    <style:style style:name="P14" style:family="paragraph" style:parent-style-name="Heading_20_3">
      <style:paragraph-properties fo:break-before="page"/>
      <style:text-properties officeooo:paragraph-rsid="0030adeb"/>
    </style:style>
    <style:style style:name="P15" style:family="paragraph" style:parent-style-name="Text_20_body">
      <loext:graphic-properties draw:fill="none"/>
      <style:paragraph-properties fo:background-color="transparent"/>
      <style:text-properties fo:color="#ff8c00" loext:opacity="100%" style:font-name="Times New Roman" officeooo:rsid="007cdf5f" officeooo:paragraph-rsid="003a36a9" style:font-size-asian="12pt"/>
    </style:style>
    <style:style style:name="P16" style:family="paragraph" style:parent-style-name="Text_20_body">
      <style:text-properties fo:color="#ff8c00" loext:opacity="100%" style:font-name="Times New Roman" officeooo:rsid="007cdf5f" officeooo:paragraph-rsid="0041aa99" style:font-size-asian="12pt"/>
    </style:style>
    <style:style style:name="P17" style:family="paragraph" style:parent-style-name="Text_20_body" style:list-style-name="L1">
      <style:text-properties fo:color="#ff8c00" loext:opacity="100%" style:font-name="Times New Roman" officeooo:rsid="007cdf5f" officeooo:paragraph-rsid="0041aa99" style:font-size-asian="12pt"/>
    </style:style>
    <style:style style:name="P18" style:family="paragraph" style:parent-style-name="Text_20_body" style:list-style-name="L1">
      <style:text-properties fo:color="#ff8c00" loext:opacity="100%" style:font-name="Times New Roman" officeooo:rsid="007cdf5f" style:font-size-asian="12pt"/>
    </style:style>
    <style:style style:name="P19" style:family="paragraph" style:parent-style-name="Standard">
      <loext:graphic-properties draw:fill="none"/>
      <style:paragraph-properties fo:background-color="transparent"/>
      <style:text-properties fo:color="#ff8c00" loext:opacity="100%" officeooo:paragraph-rsid="003a36a9"/>
    </style:style>
    <style:style style:name="P20" style:family="paragraph" style:parent-style-name="Heading_20_2">
      <style:paragraph-properties fo:break-before="page"/>
      <style:text-properties officeooo:paragraph-rsid="001eb3ec"/>
    </style:style>
    <style:style style:name="P21" style:family="paragraph" style:parent-style-name="Heading_20_3">
      <style:text-properties officeooo:rsid="001eb3ec" officeooo:paragraph-rsid="001eb3ec"/>
    </style:style>
    <style:style style:name="P22" style:family="paragraph" style:parent-style-name="Text_20_body" style:list-style-name="L2">
      <style:text-properties fo:color="#556b2f" loext:opacity="100%" style:text-line-through-style="solid" style:text-line-through-type="single" officeooo:paragraph-rsid="001eb3ec"/>
    </style:style>
    <style:style style:name="P23" style:family="paragraph" style:parent-style-name="Text_20_body" style:list-style-name="L2">
      <style:text-properties fo:color="#556b2f" loext:opacity="100%" style:text-line-through-style="solid" style:text-line-through-type="single" officeooo:rsid="00459d6a" officeooo:paragraph-rsid="00459d6a"/>
    </style:style>
    <style:style style:name="P24" style:family="paragraph" style:parent-style-name="Text_20_body" style:list-style-name="L3"/>
    <style:style style:name="P25" style:family="paragraph" style:parent-style-name="Text_20_body" style:list-style-name="L3">
      <style:text-properties officeooo:rsid="004f81cc" officeooo:paragraph-rsid="004f81cc"/>
    </style:style>
    <style:style style:name="P26" style:family="paragraph" style:parent-style-name="Text_20_body" style:list-style-name="L3">
      <style:text-properties officeooo:paragraph-rsid="004f81cc"/>
    </style:style>
    <style:style style:name="P27" style:family="paragraph" style:parent-style-name="Text_20_body">
      <style:text-properties officeooo:paragraph-rsid="004f81cc"/>
    </style:style>
    <style:style style:name="P28" style:family="paragraph" style:parent-style-name="Text_20_body">
      <style:text-properties officeooo:rsid="00553b4f" officeooo:paragraph-rsid="00566d69"/>
    </style:style>
    <style:style style:name="P29" style:family="paragraph" style:parent-style-name="Text_20_body" style:list-style-name="L4">
      <style:text-properties officeooo:rsid="00566d69" officeooo:paragraph-rsid="00566d69"/>
    </style:style>
    <style:style style:name="P30" style:family="paragraph" style:parent-style-name="Text_20_body" style:list-style-name="L4">
      <style:text-properties officeooo:rsid="00566d69" officeooo:paragraph-rsid="0059b897"/>
    </style:style>
    <style:style style:name="P31" style:family="paragraph" style:parent-style-name="Figure">
      <style:paragraph-properties fo:keep-with-next="always"/>
    </style:style>
    <style:style style:name="P32" style:family="paragraph" style:parent-style-name="Text_20_body">
      <style:text-properties officeooo:paragraph-rsid="005b330a"/>
    </style:style>
    <style:style style:name="P33" style:family="paragraph" style:parent-style-name="Text_20_body" style:list-style-name="L5">
      <style:text-properties officeooo:rsid="005b330a" officeooo:paragraph-rsid="005b330a"/>
    </style:style>
    <style:style style:name="P34" style:family="paragraph" style:parent-style-name="Text_20_body">
      <style:text-properties fo:color="#556b2f" loext:opacity="100%" officeooo:rsid="00566d69" officeooo:paragraph-rsid="00566d69"/>
    </style:style>
    <style:style style:name="P35" style:family="paragraph" style:parent-style-name="Heading_20_3">
      <style:text-properties officeooo:rsid="001fecfd" officeooo:paragraph-rsid="001fecfd"/>
    </style:style>
    <style:style style:name="P36" style:family="paragraph" style:parent-style-name="Text_20_body" style:list-style-name="L6">
      <style:paragraph-properties fo:margin-left="0in" fo:margin-right="0in" fo:margin-top="0in" fo:margin-bottom="0in" style:contextual-spacing="false" fo:text-indent="0in" style:auto-text-indent="false"/>
      <style:text-properties fo:color="#556b2f" loext:opacity="100%" style:text-line-through-style="solid" style:text-line-through-type="single"/>
    </style:style>
    <style:style style:name="P37" style:family="paragraph" style:parent-style-name="Text_20_body" style:list-style-name="L6">
      <style:paragraph-properties fo:margin-left="0in" fo:margin-right="0in" fo:text-indent="0in" style:auto-text-indent="false"/>
      <style:text-properties fo:color="#556b2f" loext:opacity="100%"/>
    </style:style>
    <style:style style:name="P38"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fo:font-weight="normal" officeooo:rsid="006fa2cc" officeooo:paragraph-rsid="0034d96e" style:font-size-asian="12pt" style:font-style-asian="normal" style:font-size-complex="12pt" style:font-style-complex="normal"/>
    </style:style>
    <style:style style:name="P39"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P40" style:family="paragraph" style:parent-style-name="Text_20_body">
      <style:paragraph-properties fo:text-align="justify" style:justify-single-word="false"/>
      <style:text-properties officeooo:paragraph-rsid="003a36a9"/>
    </style:style>
    <style:style style:name="P41"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7381f3" officeooo:paragraph-rsid="003a36a9" style:font-size-asian="12pt" style:font-style-asian="normal" style:font-size-complex="12pt" style:font-style-complex="normal"/>
    </style:style>
    <style:style style:name="P42" style:family="paragraph" style:parent-style-name="Text_20_body">
      <style:paragraph-properties fo:margin-left="0in"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fo:font-weight="normal" officeooo:rsid="007381f3" officeooo:paragraph-rsid="0034d96e" style:font-size-asian="12pt" style:font-style-asian="normal" style:font-size-complex="12pt" style:font-style-complex="normal"/>
    </style:style>
    <style:style style:name="P43" style:family="paragraph" style:parent-style-name="Heading_20_3" style:list-style-name="">
      <style:text-properties officeooo:paragraph-rsid="00232e57"/>
    </style:style>
    <style:style style:name="P44" style:family="paragraph" style:parent-style-name="Heading_20_3">
      <style:paragraph-properties fo:break-before="page"/>
      <style:text-properties officeooo:paragraph-rsid="00232e57"/>
    </style:style>
    <style:style style:name="P45" style:family="paragraph" style:parent-style-name="Text_20_body" style:list-style-name="L7">
      <style:text-properties fo:color="#556b2f" loext:opacity="100%" style:text-line-through-style="solid" style:text-line-through-type="single" officeooo:paragraph-rsid="00232e57"/>
    </style:style>
    <style:style style:name="P46" style:family="paragraph" style:parent-style-name="Text_20_body" style:list-style-name="L7">
      <style:text-properties fo:color="#556b2f" loext:opacity="100%" officeooo:paragraph-rsid="00232e57"/>
    </style:style>
    <style:style style:name="P47" style:family="paragraph" style:parent-style-name="Text_20_body">
      <style:paragraph-properties fo:margin-left="0in" fo:text-indent="0in" style:auto-text-indent="false"/>
      <style:text-properties officeooo:paragraph-rsid="00232e57"/>
    </style:style>
    <style:style style:name="P48" style:family="paragraph" style:parent-style-name="Text_20_body">
      <style:paragraph-properties fo:text-align="justify" style:justify-single-word="false"/>
      <style:text-properties officeooo:paragraph-rsid="00395a42"/>
    </style:style>
    <style:style style:name="P49" style:family="paragraph" style:parent-style-name="Text_20_body">
      <style:paragraph-properties fo:text-align="justify" style:justify-single-word="false"/>
      <style:text-properties style:use-window-font-color="true" loext:opacity="0%" officeooo:paragraph-rsid="00395a42"/>
    </style:style>
    <style:style style:name="P50" style:family="paragraph" style:parent-style-name="Text_20_body" style:list-style-name="L8">
      <style:paragraph-properties fo:text-align="justify" style:justify-single-word="false"/>
      <style:text-properties style:use-window-font-color="true" loext:opacity="0%" officeooo:paragraph-rsid="00395a42"/>
    </style:style>
    <style:style style:name="P51" style:family="paragraph" style:parent-style-name="Text_20_body">
      <style:paragraph-properties fo:text-align="justify" style:justify-single-word="false"/>
      <style:text-properties officeooo:paragraph-rsid="003c1c57"/>
    </style:style>
    <style:style style:name="P52"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0c81" officeooo:paragraph-rsid="003c1c57" style:font-size-asian="12pt" style:font-style-asian="normal" style:font-size-complex="12pt" style:font-style-complex="normal"/>
    </style:style>
    <style:style style:name="P53"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0c81" officeooo:paragraph-rsid="0044cd0d"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fo:color="#556b2f" loext:opacity="100%" style:font-name="Times New Roman" fo:font-size="12pt" fo:font-style="normal" style:text-underline-style="none" fo:font-weight="normal" officeooo:rsid="0044cd0d" officeooo:paragraph-rsid="0044cd0d" style:font-size-asian="12pt" style:font-style-asian="normal" style:font-size-complex="12pt" style:font-style-complex="normal"/>
    </style:style>
    <style:style style:name="P55" style:family="paragraph" style:parent-style-name="Text_20_body">
      <style:text-properties officeooo:paragraph-rsid="003c1c57"/>
    </style:style>
    <style:style style:name="P56" style:family="paragraph" style:parent-style-name="Heading_20_3" style:list-style-name=""/>
    <style:style style:name="P57" style:family="paragraph" style:parent-style-name="Heading_20_3">
      <style:paragraph-properties fo:break-before="page"/>
    </style:style>
    <style:style style:name="P58" style:family="paragraph" style:parent-style-name="Text_20_body" style:list-style-name="L9">
      <style:text-properties fo:color="#556b2f" loext:opacity="100%" style:text-line-through-style="solid" style:text-line-through-type="single"/>
    </style:style>
    <style:style style:name="P59" style:family="paragraph" style:parent-style-name="Text_20_body" style:list-style-name="L9">
      <style:text-properties fo:color="#556b2f" loext:opacity="100%" style:text-line-through-style="solid" style:text-line-through-type="single" officeooo:rsid="0031cac6" officeooo:paragraph-rsid="00374472"/>
    </style:style>
    <style:style style:name="P60" style:family="paragraph" style:parent-style-name="Text_20_body" style:list-style-name="L9">
      <style:text-properties officeooo:paragraph-rsid="00374472"/>
    </style:style>
    <style:style style:name="P61" style:family="paragraph" style:parent-style-name="Text_20_body">
      <style:paragraph-properties fo:text-align="justify" style:justify-single-word="false"/>
      <style:text-properties style:use-window-font-color="true" loext:opacity="0%" style:font-name="Times New Roman" fo:font-style="normal" style:text-underline-style="none" fo:font-weight="normal" officeooo:rsid="0064da2c" officeooo:paragraph-rsid="00374472" style:font-style-asian="normal" style:font-style-complex="normal"/>
    </style:style>
    <style:style style:name="P62" style:family="paragraph" style:parent-style-name="Standard">
      <style:paragraph-properties fo:margin-left="0in" fo:line-height="115%" fo:text-align="justify" style:justify-single-word="false"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officeooo:rsid="0078da0c" officeooo:paragraph-rsid="0037a5cc" style:font-size-asian="12pt" style:font-style-asian="normal" style:font-size-complex="12pt" style:font-style-complex="normal"/>
    </style:style>
    <style:style style:name="P63" style:family="paragraph" style:parent-style-name="Text_20_body">
      <style:text-properties fo:color="#ffffff" loext:opacity="100%" officeooo:rsid="0031cac6" officeooo:paragraph-rsid="0031cac6"/>
    </style:style>
    <style:style style:name="P64" style:family="paragraph" style:parent-style-name="Heading_20_3" style:list-style-name="">
      <style:text-properties officeooo:rsid="0031cac6" officeooo:paragraph-rsid="0031cac6"/>
    </style:style>
    <style:style style:name="P65" style:family="paragraph" style:parent-style-name="Heading_20_3">
      <style:paragraph-properties fo:break-before="page"/>
      <style:text-properties officeooo:rsid="0031cac6" officeooo:paragraph-rsid="0031cac6"/>
    </style:style>
    <style:style style:name="P66" style:family="paragraph" style:parent-style-name="Text_20_body" style:list-style-name="L10">
      <style:text-properties fo:color="#556b2f" loext:opacity="100%" style:text-line-through-style="solid" style:text-line-through-type="single"/>
    </style:style>
    <style:style style:name="P67" style:family="paragraph" style:parent-style-name="Text_20_body" style:list-style-name="L11">
      <style:paragraph-properties fo:margin-left="0in" fo:margin-right="0in" fo:text-indent="0in" style:auto-text-indent="false"/>
      <style:text-properties fo:color="#556b2f" loext:opacity="100%" style:text-line-through-style="solid" style:text-line-through-type="single"/>
    </style:style>
    <style:style style:name="P68" style:family="paragraph" style:parent-style-name="Text_20_body" style:list-style-name="L12">
      <style:paragraph-properties>
        <style:tab-stops>
          <style:tab-stop style:position="0.0346in"/>
        </style:tab-stops>
      </style:paragraph-properties>
      <style:text-properties style:use-window-font-color="true" loext:opacity="0%" officeooo:paragraph-rsid="00367867"/>
    </style:style>
    <style:style style:name="P69" style:family="paragraph" style:parent-style-name="Text_20_body" style:list-style-name="L12">
      <style:paragraph-properties>
        <style:tab-stops>
          <style:tab-stop style:position="0.0346in"/>
        </style:tab-stops>
      </style:paragraph-properties>
      <style:text-properties style:use-window-font-color="true" loext:opacity="0%" style:font-name="Times New Roman" fo:font-size="12pt" fo:font-style="normal" style:text-underline-style="none" fo:font-weight="normal" officeooo:rsid="0074a815" officeooo:paragraph-rsid="00367867" style:font-size-asian="12pt" style:font-style-asian="normal" style:font-size-complex="12pt" style:font-style-complex="normal"/>
    </style:style>
    <style:style style:name="P70" style:family="paragraph" style:parent-style-name="Text_20_body">
      <style:text-properties fo:color="#556b2f" loext:opacity="100%"/>
    </style:style>
    <style:style style:name="P71" style:family="paragraph" style:parent-style-name="Text_20_body" style:list-style-name="L13">
      <style:text-properties fo:color="#556b2f" loext:opacity="100%"/>
    </style:style>
    <style:style style:name="P72" style:family="paragraph" style:parent-style-name="Text_20_body">
      <style:paragraph-properties fo:break-before="page"/>
    </style:style>
    <style:style style:name="T1" style:family="text">
      <style:text-properties officeooo:rsid="002ce802"/>
    </style:style>
    <style:style style:name="T2" style:family="text">
      <style:text-properties officeooo:rsid="002c1a12"/>
    </style:style>
    <style:style style:name="T3" style:family="text">
      <style:text-properties fo:language="en" fo:country="US" officeooo:rsid="0028bca7"/>
    </style:style>
    <style:style style:name="T4" style:family="text">
      <style:text-properties fo:language="en" fo:country="US" officeooo:rsid="0027afd5"/>
    </style:style>
    <style:style style:name="T5" style:family="text">
      <style:text-properties officeooo:rsid="002a8018"/>
    </style:style>
    <style:style style:name="T6" style:family="text">
      <style:text-properties officeooo:rsid="003a36a9"/>
    </style:style>
    <style:style style:name="T7" style:family="text">
      <style:text-properties officeooo:rsid="002aa633"/>
    </style:style>
    <style:style style:name="T8" style:family="text">
      <style:text-properties officeooo:rsid="0030adeb"/>
    </style:style>
    <style:style style:name="T9" style:family="text">
      <style:text-properties fo:font-size="12pt" fo:font-style="normal" style:text-underline-style="none" fo:font-weight="normal" style:font-style-asian="normal" style:font-size-complex="12pt" style:font-style-complex="normal"/>
    </style:style>
    <style:style style:name="T10" style:family="text">
      <style:text-properties officeooo:rsid="001eb3ec"/>
    </style:style>
    <style:style style:name="T11" style:family="text">
      <style:text-properties officeooo:rsid="00305c09"/>
    </style:style>
    <style:style style:name="T12" style:family="text">
      <style:text-properties officeooo:rsid="00486540"/>
    </style:style>
    <style:style style:name="T13" style:family="text">
      <style:text-properties officeooo:rsid="00488caf"/>
    </style:style>
    <style:style style:name="T14" style:family="text">
      <style:text-properties officeooo:rsid="004f4071"/>
    </style:style>
    <style:style style:name="T15" style:family="text">
      <style:text-properties officeooo:rsid="004a3d34"/>
    </style:style>
    <style:style style:name="T16" style:family="text">
      <style:text-properties officeooo:rsid="004a94fa"/>
    </style:style>
    <style:style style:name="T17" style:family="text">
      <style:text-properties officeooo:rsid="004c12fc"/>
    </style:style>
    <style:style style:name="T18" style:family="text">
      <style:text-properties officeooo:rsid="004d9cf6"/>
    </style:style>
    <style:style style:name="T19" style:family="text">
      <style:text-properties officeooo:rsid="004f81cc"/>
    </style:style>
    <style:style style:name="T20" style:family="text">
      <style:text-properties officeooo:rsid="00517204"/>
    </style:style>
    <style:style style:name="T21" style:family="text">
      <style:text-properties officeooo:rsid="0051c7e5"/>
    </style:style>
    <style:style style:name="T22" style:family="text">
      <style:text-properties officeooo:rsid="0053884d"/>
    </style:style>
    <style:style style:name="T23" style:family="text">
      <style:text-properties officeooo:rsid="00553b4f"/>
    </style:style>
    <style:style style:name="T24" style:family="text">
      <style:text-properties officeooo:rsid="005b330a"/>
    </style:style>
    <style:style style:name="T25" style:family="text">
      <style:text-properties fo:font-family="'Times New Roman'" style:font-style-name="Regular" style:font-family-generic="roman" officeooo:rsid="0053884d"/>
    </style:style>
    <style:style style:name="T26" style:family="text">
      <style:text-properties officeooo:rsid="00566d69"/>
    </style:style>
    <style:style style:name="T27" style:family="text">
      <style:text-properties officeooo:rsid="0057b7c5"/>
    </style:style>
    <style:style style:name="T28" style:family="text">
      <style:text-properties officeooo:rsid="0057eb9c"/>
    </style:style>
    <style:style style:name="T29" style:family="text">
      <style:text-properties officeooo:rsid="0059b897"/>
    </style:style>
    <style:style style:name="T30" style:family="text">
      <style:text-properties officeooo:rsid="005bf4e9"/>
    </style:style>
    <style:style style:name="T31" style:family="text">
      <style:text-properties officeooo:rsid="00395a42"/>
    </style:style>
    <style:style style:name="T32" style:family="text">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T33" style:family="text">
      <style:text-properties style:use-window-font-color="true" loext:opacity="0%" style:font-name="Times New Roman" fo:font-size="12pt" fo:font-style="italic" style:text-underline-style="none" fo:font-weight="normal" officeooo:rsid="006fa2cc" style:font-size-asian="12pt" style:font-style-asian="italic" style:font-size-complex="12pt" style:font-style-complex="italic"/>
    </style:style>
    <style:style style:name="T34" style:family="text">
      <style:text-properties style:use-window-font-color="true" loext:opacity="0%" style:font-name="Times New Roman" fo:font-size="12pt" fo:font-style="normal" style:text-underline-style="none" fo:font-weight="normal" officeooo:rsid="00705f89" style:font-size-asian="12pt" style:font-style-asian="normal" style:font-size-complex="12pt" style:font-style-complex="normal"/>
    </style:style>
    <style:style style:name="T35" style:family="text">
      <style:text-properties style:use-window-font-color="true" loext:opacity="0%" style:font-name="Times New Roman" fo:font-size="12pt" fo:font-style="normal" style:text-underline-style="none" fo:font-weight="normal" officeooo:rsid="0071b504" style:font-size-asian="12pt" style:font-style-asian="normal" style:font-size-complex="12pt" style:font-style-complex="normal"/>
    </style:style>
    <style:style style:name="T36" style:family="text">
      <style:text-properties style:use-window-font-color="true" loext:opacity="0%" style:font-name="Times New Roman" fo:font-size="12pt" fo:font-style="normal" style:text-underline-style="none" fo:font-weight="normal" officeooo:rsid="00722684" style:font-size-asian="12pt" style:font-style-asian="normal" style:font-size-complex="12pt" style:font-style-complex="normal"/>
    </style:style>
    <style:style style:name="T37" style:family="text">
      <style:text-properties style:use-window-font-color="true" loext:opacity="0%" style:font-name="Times New Roman" fo:font-size="12pt" fo:font-style="normal" style:text-underline-style="none" fo:font-weight="normal" officeooo:rsid="007381f3" style:font-size-asian="12pt" style:font-style-asian="normal" style:font-size-complex="12pt" style:font-style-complex="normal"/>
    </style:style>
    <style:style style:name="T38" style:family="text">
      <style:text-properties style:use-window-font-color="true" loext:opacity="0%" style:font-name="Times New Roman" fo:font-size="12pt" fo:font-style="italic" style:text-underline-style="none" fo:font-weight="normal" officeooo:rsid="007381f3" style:font-size-asian="12pt" style:font-style-asian="italic" style:font-size-complex="12pt" style:font-style-complex="italic"/>
    </style:style>
    <style:style style:name="T39" style:family="text">
      <style:text-properties fo:font-variant="normal" fo:text-transform="none" style:text-position="0% 100%" fo:font-style="normal" style:text-underline-style="none" fo:font-weight="normal"/>
    </style:style>
    <style:style style:name="T40" style:family="text">
      <style:text-properties officeooo:rsid="0031cac6"/>
    </style:style>
    <style:style style:name="T41" style:family="text">
      <style:text-properties fo:font-style="italic"/>
    </style:style>
    <style:style style:name="T42" style:family="text">
      <style:text-properties officeooo:rsid="00383eec"/>
    </style:style>
    <style:style style:name="T43" style:family="text">
      <style:text-properties style:use-window-font-color="true" loext:opacity="0%"/>
    </style:style>
    <style:style style:name="T44" style:family="text">
      <style:text-properties style:use-window-font-color="true" loext:opacity="0%" officeooo:rsid="00395a42"/>
    </style:style>
    <style:style style:name="T45" style:family="text">
      <style:text-properties officeooo:rsid="00430b1f"/>
    </style:style>
    <style:style style:name="T46" style:family="text">
      <style:text-properties style:use-window-font-color="true" loext:opacity="0%" style:font-name="Times New Roman" fo:font-size="12pt" fo:font-style="normal" style:text-underline-style="none" fo:font-weight="normal" officeooo:rsid="00430b1f" style:font-size-asian="12pt" style:font-style-asian="normal" style:font-size-complex="12pt" style:font-style-complex="normal"/>
    </style:style>
    <style:style style:name="T47" style:family="text">
      <style:text-properties style:use-window-font-color="true" loext:opacity="0%" style:font-name="Times New Roman" fo:font-size="12pt" fo:font-style="normal" style:text-underline-style="none" fo:font-weight="normal" officeooo:rsid="0069423b" style:font-size-asian="12pt" style:font-style-asian="normal" style:font-size-complex="12pt" style:font-style-complex="normal"/>
    </style:style>
    <style:style style:name="T48" style:family="text">
      <style:text-properties style:use-window-font-color="true" loext:opacity="0%" style:font-name="Times New Roman" fo:font-size="12pt" fo:font-style="normal" style:text-underline-style="none" fo:font-weight="normal" officeooo:rsid="006b3a71" style:font-size-asian="12pt" style:font-style-asian="normal" style:font-size-complex="12pt" style:font-style-complex="normal"/>
    </style:style>
    <style:style style:name="T49" style:family="text">
      <style:text-properties style:use-window-font-color="true" loext:opacity="0%" style:font-name="Times New Roman" fo:font-size="12pt" fo:font-style="normal" style:text-underline-style="none" fo:font-weight="normal" officeooo:rsid="006f076c" style:font-size-asian="12pt" style:font-style-asian="normal" style:font-size-complex="12pt" style:font-style-complex="normal"/>
    </style:style>
    <style:style style:name="T50" style:family="text">
      <style:text-properties style:use-window-font-color="true" loext:opacity="0%" style:font-name="Times New Roman" fo:font-size="12pt" fo:font-style="normal" style:text-underline-style="none" fo:font-weight="normal" officeooo:rsid="006d6f59" style:font-size-asian="12pt" style:font-style-asian="normal" style:font-size-complex="12pt" style:font-style-complex="normal"/>
    </style:style>
    <style:style style:name="T51" style:family="text">
      <style:text-properties style:use-window-font-color="true" loext:opacity="0%" style:font-name="Times New Roman" fo:font-size="12pt" fo:font-style="normal" style:text-underline-style="none" fo:font-weight="normal" officeooo:rsid="006c6eae" style:font-size-asian="12pt" style:font-style-asian="normal" style:font-size-complex="12pt" style:font-style-complex="normal"/>
    </style:style>
    <style:style style:name="T52" style:family="text">
      <style:text-properties style:use-window-font-color="true" loext:opacity="0%" style:font-name="Times New Roman" fo:font-size="12pt" fo:font-style="normal" style:text-underline-style="none" fo:font-weight="normal" officeooo:rsid="006f0c81" style:font-size-asian="12pt" style:font-style-asian="normal" style:font-size-complex="12pt" style:font-style-complex="normal"/>
    </style:style>
    <style:style style:name="T53" style:family="text">
      <style:text-properties style:use-window-font-color="true" loext:opacity="0%" style:font-name="Times New Roman" fo:font-size="12pt" fo:font-style="normal" style:text-underline-style="none" fo:font-weight="normal" officeooo:rsid="0044cd0d" style:font-size-asian="12pt" style:font-style-asian="normal" style:font-size-complex="12pt" style:font-style-complex="normal"/>
    </style:style>
    <style:style style:name="T54" style:family="text">
      <style:text-properties style:use-window-font-color="true" loext:opacity="0%" style:font-name="Times New Roman" fo:font-size="12pt" fo:font-style="normal" style:text-underline-style="none" fo:font-weight="normal" officeooo:rsid="00383eec" style:font-size-asian="12pt" style:font-style-asian="normal" style:font-size-complex="12pt" style:font-style-complex="normal"/>
    </style:style>
    <style:style style:name="T55" style:family="text">
      <style:text-properties fo:color="#556b2f" loext:opacity="100%" officeooo:rsid="0044cd0d"/>
    </style:style>
    <style:style style:name="T56" style:family="text">
      <style:text-properties officeooo:rsid="003c1c57"/>
    </style:style>
    <style:style style:name="T57" style:family="text">
      <style:text-properties style:use-window-font-color="true" loext:opacity="0%" style:font-name="Times New Roman" fo:font-style="normal" style:text-underline-style="none" fo:font-weight="normal" officeooo:rsid="0064da2c" style:font-style-asian="normal" style:font-style-complex="normal"/>
    </style:style>
    <style:style style:name="T58" style:family="text">
      <style:text-properties officeooo:rsid="00374472"/>
    </style:style>
    <style:style style:name="T59" style:family="text">
      <style:text-properties officeooo:rsid="007a9265"/>
    </style:style>
    <style:style style:name="T60" style:family="text">
      <style:text-properties officeooo:rsid="0037a5cc"/>
    </style:style>
    <style:style style:name="T61" style:family="text">
      <style:text-properties fo:font-style="italic" officeooo:rsid="007a9265" style:font-style-asian="italic" style:font-style-complex="italic"/>
    </style:style>
    <style:style style:name="T62" style:family="text">
      <style:text-properties officeooo:rsid="007c79c3"/>
    </style:style>
    <style:style style:name="T63" style:family="text">
      <style:text-properties style:use-window-font-color="true" loext:opacity="0%" style:font-name="Times New Roman" fo:font-size="12pt" fo:font-style="normal" style:text-underline-style="none" fo:font-weight="normal" officeooo:rsid="0073c159" style:font-size-asian="12pt" style:font-style-asian="normal" style:font-size-complex="12pt" style:font-style-complex="normal"/>
    </style:style>
    <style:style style:name="T64" style:family="text">
      <style:text-properties style:use-window-font-color="true" loext:opacity="0%" style:font-name="Times New Roman" fo:font-size="12pt" fo:font-style="normal" style:text-underline-style="none" fo:font-weight="normal" officeooo:rsid="00367867" style:font-size-asian="12pt" style:font-style-asian="normal" style:font-size-complex="12pt" style:font-style-complex="normal"/>
    </style:style>
    <style:style style:name="T65" style:family="text">
      <style:text-properties style:use-window-font-color="true" loext:opacity="0%" style:font-name="Times New Roman" fo:font-size="12pt" fo:font-style="normal" style:text-underline-style="none" fo:font-weight="normal" officeooo:rsid="0074a815" style:font-size-asian="12pt" style:font-style-asian="normal" style:font-size-complex="12pt" style:font-style-complex="normal"/>
    </style:style>
    <style:style style:name="T66" style:family="text">
      <style:text-properties officeooo:rsid="00367867"/>
    </style:style>
    <style:style style:name="T67" style:family="text">
      <style:text-properties officeooo:rsid="0041aa99"/>
    </style:style>
    <style:style style:name="T68" style:family="text">
      <style:text-properties fo:font-style="italic" style:font-style-asian="italic"/>
    </style:style>
    <style:style style:name="fr1" style:family="graphic" style:parent-style-name="Inline_20_Heading">
      <style:graphic-properties style:vertical-pos="from-top"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118_2365495780"/><draw:frame draw:style-name="fr1" draw:name="Frame1" text:anchor-type="as-char" svg:y="0.102in" draw:z-index="0"><draw:text-box fo:min-height="0.0161in" fo:min-width="0.0161in"><text:p text:style-name="P2"><text:bookmark-start text:name="__RefHeading___Toc14116_2365495780"/>Interactive Beat Annotation GUI<text:bookmark-end text:name="__RefHeading___Toc14116_2365495780"/></text:p></draw:text-box></draw:frame><text:bookmark-end text:name="__RefHeading___Toc14118_2365495780"/></text:h>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4120_2365495780" office:name="Introduction" text:style-name="Index_20_Link" text:visited-style-name="Index_20_Link">Introduction<text:tab/>3</text:a></text:p>
          <text:p text:style-name="P5"><text:a xlink:type="simple" xlink:href="#__RefHeading___Toc5209_3106982271" office:name="Contextualization and Problem Framing" text:style-name="Index_20_Link" text:visited-style-name="Index_20_Link">Contextualization and Problem Framing<text:tab/>3</text:a></text:p>
          <text:p text:style-name="P5"><text:a xlink:type="simple" xlink:href="#__RefHeading___Toc5100_3106982271" office:name="Research Questions" text:style-name="Index_20_Link" text:visited-style-name="Index_20_Link">Research Questions<text:tab/>4</text:a></text:p>
          <text:p text:style-name="P4"><text:a xlink:type="simple" xlink:href="#__RefHeading___Toc16566_2365495780" office:name="State-of-the-Art" text:style-name="Index_20_Link" text:visited-style-name="Index_20_Link">State-of-the-Art<text:tab/>5</text:a></text:p>
          <text:p text:style-name="P5"><text:a xlink:type="simple" xlink:href="#__RefHeading___Toc16568_2365495780" office:name="Beat tracking Research" text:style-name="Index_20_Link" text:visited-style-name="Index_20_Link">Beat tracking Research<text:tab/>5</text:a></text:p>
          <text:p text:style-name="P5"><text:a xlink:type="simple" xlink:href="#__RefHeading___Toc16570_2365495780" office:name="Beat Annotation Methods" text:style-name="Index_20_Link" text:visited-style-name="Index_20_Link">Beat Annotation Methods<text:tab/>7</text:a></text:p>
          <text:p text:style-name="P5"><text:a xlink:type="simple" xlink:href="#__RefHeading___Toc16572_2365495780" office:name="Existing Tools for Beat Annotation" text:style-name="Index_20_Link" text:visited-style-name="Index_20_Link">Existing Tools for Beat Annotation<text:tab/>8</text:a></text:p>
          <text:p text:style-name="P5"><text:a xlink:type="simple" xlink:href="#__RefHeading___Toc4080_3106982271" office:name="HIL Approach for BT" text:style-name="Index_20_Link" text:visited-style-name="Index_20_Link">HIL Approach for BT<text:tab/>10</text:a></text:p>
          <text:p text:style-name="P5"><text:a xlink:type="simple" xlink:href="#__RefHeading___Toc4080_3106982271%20Copy%201" office:name="Audio-to-Score Alignment for BT" text:style-name="Index_20_Link" text:visited-style-name="Index_20_Link">Audio-to-Score Alignment for BT<text:tab/>11</text:a></text:p>
          <text:p text:style-name="P5"><text:a xlink:type="simple" xlink:href="#__RefHeading___Toc16574_2365495780" office:name="Identified Gaps" text:style-name="Index_20_Link" text:visited-style-name="Index_20_Link">Identified Gaps<text:tab/>12</text:a></text:p>
          <text:p text:style-name="P4"><text:a xlink:type="simple" xlink:href="#__RefHeading___Toc16576_2365495780" office:name="Work Plan" text:style-name="Index_20_Link" text:visited-style-name="Index_20_Link">Work Plan<text:tab/>13</text:a></text:p>
          <text:p text:style-name="P4"><text:a xlink:type="simple" xlink:href="#__RefHeading___Toc16578_2365495780COPY_IS_MOVE" office:name="Bibliography" text:style-name="Index_20_Link" text:visited-style-name="Index_20_Link">Bibliography<text:tab/>13</text:a></text:p>
        </text:index-body>
      </text:table-of-content>
      <text:p text:style-name="Text_20_body"/>
      <text:h text:style-name="P6" text:outline-level="2"><text:bookmark-start text:name="__RefHeading___Toc14120_2365495780"/>Introduction<text:bookmark-end text:name="__RefHeading___Toc14120_2365495780"/></text:h>
      <text:h text:style-name="Heading_20_3" text:outline-level="3"><text:bookmark-start text:name="__RefHeading___Toc5209_3106982271"/>Contextualization and Problem Framing<text:bookmark-end text:name="__RefHeading___Toc5209_3106982271"/></text:h>
      <text:p text:style-name="P7">Music Information Retrieval (MIR) is a research field that develops computational methods to analyze, interpret, and retrieve musical information from audio, <text:span text:style-name="T1">examples include:</text:span> harmony, melody, rhythm, and structural elements. Within MIR, Beat Tracking (BT) focuses on the automatic extraction of musical beat information from recordings. <text:span text:style-name="T2">Since </text:span>the beat provides a fundamental temporal framework for music, BT is a critical component of many MIR systems. </text:p>
      <text:p text:style-name="P8"><text:span text:style-name="T3"><text:line-break/>“Many MIR systems first analyze the beats as the starting point, assume the results would be correct, and use them as a unit for further processing.” </text:span><text:reference-mark-start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span text:style-name="T4">(Yamamoto, 2021)</text:span><text:reference-mark-end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p>
      <text:p text:style-name="P9"/>
      <text:p text:style-name="P9">The beat is typically defined as a regularly occurring pulse that underlies the temporal organization of a musical piece. However, the perception of the beat can vary across listeners. <text:span text:style-name="T2">An</text:span> <text:span text:style-name="T2">objectively</text:span> definitive beat can only be established if <text:span text:style-name="T2">it is </text:span>explicitly defined by the composer or agreed upon by performing musicians.</text:p>
      <text:p text:style-name="P9"/>
      <text:p text:style-name="P10">BT has been a research focus for decades. Existing algorithms perform reliably for music with steady, predictable tempos, such as <text:span text:style-name="T5">P</text:span>op music. In contrast, music with expressive <text:span text:style-name="T5">and/or </text:span>fluctuating tempos<text:span text:style-name="T5"> </text:span>remains challenging for auto<text:span text:style-name="T6">nomous </text:span>beat detection. <text:span text:style-name="T7">Examples of music genres that are still </text:span><text:span text:style-name="T1">difficult to assess</text:span><text:span text:style-name="T7"> are, classical, jazz </text:span><text:span text:style-name="T1">or </text:span><text:span text:style-name="T7">world music. </text:span><text:span text:style-name="T1">These can make</text:span><text:span text:style-name="T7"> the process of beat tracking more complex and ambiguous.</text:span></text:p>
      <text:p text:style-name="P10"><text:span text:style-name="T7"><text:line-break/><text:line-break/>For this reason SoTA BT autonomous algorithms are all </text:span><text:span text:style-name="T1">m</text:span><text:span text:style-name="T7">achine </text:span><text:span text:style-name="T1">l</text:span><text:span text:style-name="T7">earning </text:span><text:span text:style-name="T6">(ML) </text:span><text:span text:style-name="T1">b</text:span><text:span text:style-name="T7">ased. And although there are a few that are self-supervised </text:span><text:reference-mark-start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text:span text:style-name="T7">(Desblancs et al., 2023)</text:span><text:reference-mark-end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 <text:span text:style-name="T7">t</text:span><text:span text:style-name="T2">hese are usually genre specific or are bound to certain musical configurations. For the cases that SoTA BT still can’t solve, human-made beat annotation </text:span><text:span text:style-name="T1">(or revisions)</text:span><text:span text:style-name="T2"> are still the most reliable. </text:span></text:p>
      <text:p text:style-name="P11"/>
      <text:p text:style-name="P12">Although there has been a lot of effort in advancing autonomous BT solutions, the same can not be said for human focused BT tools where it seems that they have been stayed largely unchanged for years now.</text:p>
      <text:h text:style-name="P13" text:outline-level="3"/>
      <text:h text:style-name="P14" text:outline-level="3"><text:bookmark-start text:name="__RefHeading___Toc5100_3106982271"/><text:span text:style-name="T8">Research Questions</text:span><text:bookmark-end text:name="__RefHeading___Toc5100_3106982271"/></text:h>
      <text:p text:style-name="P15"><text:span text:style-name="T9">RQ1. What limitations exist in current beat annotation workflows when applied to challenging music with high expressiveness, such as tempo variability?</text:span></text:p>
      <text:p text:style-name="P16">RQ2. How can different musical, model and signal representations support and guide the beat annotation process?</text:p>
      <text:p text:style-name="P16"><text:tab/>A RQ2 é intencionalmente abstrata, em termos práticos poderia ser partida em sub-questões:</text:p>
      <text:list text:style-name="L1">
        <text:list-item>
          <text:p text:style-name="P17">RQ2.1. How can a symbolic score representation, defined in musical time, be aligned with an audio-based representation defined in absolute time?</text:p>
        </text:list-item>
        <text:list-item>
          <text:p text:style-name="P18">RQ2.2. How can an audio spectrogram support accurate manual beat annotation in challenging music?</text:p>
        </text:list-item>
        <text:list-item>
          <text:p text:style-name="P18">RQ2.3. How can deep neural network output activations, representing the probability of beat presence over time, guide the annotation process?</text:p>
        </text:list-item>
        <text:list-item>
          <text:p text:style-name="P17">RQ2.4. Can such activation functions be used to define or support a beat quantization grid during annotation?</text:p>
        </text:list-item>
      </text:list>
      <text:p text:style-name="P16">RQ3. To what extent does the proposed beat annotation workflow affect annotation time and efficiency when compared with existing tools?</text:p>
      <text:p text:style-name="P19"/>
      <text:h text:style-name="P20" text:outline-level="2"><text:bookmark-start text:name="__RefHeading___Toc16566_2365495780"/><text:span text:style-name="T10">State-of-</text:span><text:span text:style-name="T11">t</text:span><text:span text:style-name="T10">he-Art</text:span><text:bookmark-end text:name="__RefHeading___Toc16566_2365495780"/></text:h>
      <text:h text:style-name="P21" text:outline-level="3"><text:bookmark-start text:name="__RefHeading___Toc16568_2365495780"/>Beat tracking Research<text:bookmark-end text:name="__RefHeading___Toc16568_2365495780"/></text:h>
      <text:list text:style-name="L2">
        <text:list-item>
          <text:p text:style-name="P22">Autonomous BT performance discussion //explicar que hj os BT são à base de ML</text:p>
        </text:list-item>
        <text:list-item>
          <text:p text:style-name="P22">SoTA vs expressive music limitations //falar nos casos onde BT ainda n consegue dar resultados decentes</text:p>
        </text:list-item>
        <text:list-item>
          <text:p text:style-name="P22">Evaluation metrics (F-measure)</text:p>
          <text:list>
            <text:list-item>
              <text:p text:style-name="P23">Main Datasets: SMC MIREX, Hainsworth, Ballroom, OSU2MIR?</text:p>
            </text:list-item>
          </text:list>
        </text:list-item>
        <text:list-item>
          <text:p text:style-name="P22">Clear separation between: Algorithmic BT -VS- Human annotation practices //ok talvez isto faça sentido</text:p>
        </text:list-item>
      </text:list>
      <text:p text:style-name="Text_20_body"><text:span text:style-name="T12">It is clear that BT is one of MIR’s most fundamental and most researched fields. </text:span><text:span text:style-name="T13">As of now</text:span><text:span text:style-name="T12"> BT </text:span><text:span text:style-name="T13">is considered a “solved” problem for music with steady 4/4 tempo, this includes a majority of western commercially available music (Country, Disco, HipHop, Rock, Metal, Pop etc.). </text:span><text:span text:style-name="T14">W</text:span><text:span text:style-name="T13">here SoTA BT algorithms still fa</text:span><text:span text:style-name="T14">lter</text:span><text:span text:style-name="T13"> is in music that </text:span><text:span text:style-name="T14">goes a stray</text:span><text:span text:style-name="T13"> fall from </text:span><text:span text:style-name="T15">the </text:span><text:span text:style-name="T13">never changing,</text:span><text:span text:style-name="T15"> </text:span><text:span text:style-name="T13">4/4 </text:span><text:span text:style-name="T15">metric and </text:span><text:span text:style-name="T13">steady bpm that is the standard for modern western music. In musical genres/examples with fluctuating bpm </text:span><text:span text:style-name="T15">and</text:span><text:span text:style-name="T13"> complex or unconventional time signatures </text:span><text:span text:style-name="T15">SoTA BT still falters. </text:span><text:span text:style-name="T16">This includes music that is “acoustically” performed, meaning, music where the bpm can fluctuate for performative or expressive reasons. Examples include genres such as Classical, Jazz and World Music.</text:span><text:span text:style-name="T11"><text:line-break/><text:line-break/>Besides this, the act of assessing the beat can be ambiguous. In some examples, annotators might tap at half, double, or even triple the actual beat. It is also possible for one to feel the subdivision at different levels, and this may impact the beat assessment of the annotator. For these cases, there can only be a "correct" assessment if the recording in question has an underlying musical score that explicitly describes the beat, i.e., classical music.</text:span><text:span text:style-name="T17"><text:line-break/></text:span><text:span text:style-name="T11"><text:line-break/></text:span><text:span text:style-name="T15">For th</text:span><text:span text:style-name="T18">ese</text:span><text:span text:style-name="T15"> reason</text:span><text:span text:style-name="T18">s</text:span><text:span text:style-name="T15">, c</text:span><text:span text:style-name="T11">urrent SoTA beat tracking methods are predominantly based on neural networks (CNN, TCN’s, Transformers). </text:span><text:span text:style-name="T14">ZeroNS </text:span><text:reference-mark-start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text:span text:style-name="T14">(Desblancs et al., 2023)</text:span><text:reference-mark-end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 <text:span text:style-name="T14">BeatThis! </text:span><text:reference-mark-start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text:span text:style-name="T14">(Foscarin et al., 2024)</text:span><text:reference-mark-end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 <text:span text:style-name="T14">and HingeNet </text:span><text:reference-mark-start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span text:style-name="T14">(Ru et al., 2025) </text:span><text:span text:style-name="T19">are just 3 examples of SoTA algorithms that illustrate the complexity of BT:</text:span><text:reference-mark-end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p>
      <text:list text:style-name="L3">
        <text:list-item>
          <text:p text:style-name="P24"><text:span text:style-name="T19">ZeroNS was the first self-supervised BT model. It works by analyzing separately the percussive (drums) and melodic parts of a given recording. A problem with this model is that by design is dependent of instrumentation, this model works best for music with drums and clear melodic instrument distinction (voice, guitar, keys, bass etc…). </text:span><text:span text:style-name="T20">Besides this, ZeroNS performs poorly against other supervised SoTA models. </text:span></text:p>
        </text:list-item>
        <text:list-item>
          <text:p text:style-name="P25">BeatThis! Is still considered the SoTA BT model. It works by analyzing spectogram windows of the recording.</text:p>
        </text:list-item>
        <text:list-item>
          <text:p text:style-name="P26"><text:soft-page-break/><text:span text:style-name="T19">HingeNet combines different BT models and ands a harmonically aware layer on top. Although HingeNet is newer, it is still F-measure testes show that it is slightly behind BeatThis!.</text:span></text:p>
        </text:list-item>
      </text:list>
      <text:p text:style-name="P27"><text:span text:style-name="T21">The performance of BT algorithms is based on </text:span><text:span text:style-name="T22">an F-measure</text:span><text:span text:style-name="T21"> </text:span><text:span text:style-name="T22">metric </text:span><text:span text:style-name="T23">presented in 0.</text:span><text:span text:style-name="T24">0</text:span><text:span text:style-name="T23"> to 1.</text:span><text:span text:style-name="T24">0</text:span><text:span text:style-name="T23"> ratio or the equivalent in percentage</text:span><text:span text:style-name="T22">. This measures a BT assessment against a ground-truth assessment </text:span><text:span text:style-name="T24">of a given dataset. I</text:span><text:span text:style-name="T22">t takes into account correct beats, false positives (extra beats) and false negatives (missed beats), it also </text:span><text:span text:style-name="T23">allows for a</text:span><text:span text:style-name="T22"> </text:span><text:span text:style-name="T25">±</text:span><text:span text:style-name="T22">70ms window of tolerance for each beat.</text:span></text:p>
      <text:p text:style-name="P28"><text:span text:style-name="T26">BT models are tested against well documented datasets. </text:span><text:s/><text:span text:style-name="T26">I</text:span>n <text:sequence-ref text:reference-format="category-and-value" text:ref-name="refFigure0">Figure 1</text:sequence-ref><text:s/><text:span text:style-name="T26">I present four that are common to see as benchmark tests for BT:</text:span></text:p>
      <text:list text:style-name="L4">
        <text:list-item>
          <text:p text:style-name="P29">GTZAN <text:span text:style-name="T24">was s</text:span>pecifically designed for musical genre classification. <text:span text:style-name="T27">It is a collection of 2000 music excerpts of 30sec each. It covers 10 different music genres, plus 4 and 6 sub-genres of classical and jazz music respectively, each having 100 excerpts. This gives a total of 19h of audio to be tested. </text:span></text:p>
        </text:list-item>
        <text:list-item>
          <text:p text:style-name="P30">Ballroom<text:span text:style-name="T28"> is a dataset consisting </text:span><text:span text:style-name="T29">a total </text:span><text:span text:style-name="T28">of </text:span><text:span text:style-name="T29">698 total examples.</text:span><text:span text:style-name="T28"> </text:span><text:span text:style-name="T29">With eight different dance music genres:</text:span><text:span text:style-name="T28"> Cha-Cha, Jive, Quickstep, Rumba, Samba, Tango, Viennese Waltz, and Slow Waltz</text:span><text:span text:style-name="T29">. <text:s/>BPM ranges from 60-224. <text:s/>As this dance-music, bpm stays mostly the same across the excerpts, for this reason it is expected for SoTA models to perform F-measures &gt; 90%. </text:span></text:p>
        </text:list-item>
        <text:list-item>
          <text:p text:style-name="P29">Hainsworth: <text:span text:style-name="T24">A dataset consisting of 221 musical examples from a variety of genres, rock/pop, dance, classical, folk and jazz.</text:span></text:p>
        </text:list-item>
        <text:list-item>
          <text:p text:style-name="P29">SMC Mirex: <text:s/><text:span text:style-name="T29">C</text:span>ompiled to include pieces that are<text:span text:style-name="T29"> challenging for SoTA benchmark test. This data set consists of 217 manually-annotated highly precise musical pieces. </text:span></text:p>
        </text:list-item>
      </text:list>
      <text:p text:style-name="P31">Figure <text:sequence text:ref-name="refFigure0" text:name="Figure" text:formula="ooow:Figure+1" style:num-format="1">1</text:sequence>: Tabel comparing the performance <text:span text:style-name="T23">(F-measure </text:span><text:span text:style-name="T28">in %</text:span><text:span text:style-name="T23">)</text:span> of SoTA BT model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ext_20_body">Dataset</text:p>
          </table:table-cell>
          <table:table-cell table:style-name="Table1.A1" office:value-type="string">
            <text:p text:style-name="Text_20_body">Zero-Note Samba <text:span text:style-name="T22">(2023)</text:span></text:p>
          </table:table-cell>
          <table:table-cell table:style-name="Table1.A1" office:value-type="string">
            <text:p text:style-name="Text_20_body">Beat This! <text:span text:style-name="T22">(2024)</text:span></text:p>
          </table:table-cell>
          <table:table-cell table:style-name="Table1.A1" office:value-type="string">
            <text:p text:style-name="Text_20_body">HingeNet (MERT-based) <text:span text:style-name="T22">(2025)</text:span></text:p>
          </table:table-cell>
        </table:table-row>
        <table:table-row>
          <table:table-cell table:style-name="Table1.A1" office:value-type="string">
            <text:p text:style-name="Text_20_body">GTZAN</text:p>
          </table:table-cell>
          <table:table-cell table:style-name="Table1.A1" office:value-type="string">
            <text:p text:style-name="Text_20_body">87.5%</text:p>
          </table:table-cell>
          <table:table-cell table:style-name="Table1.A1" office:value-type="string">
            <text:p text:style-name="Text_20_body">89.1%</text:p>
          </table:table-cell>
          <table:table-cell table:style-name="Table1.A1" office:value-type="string">
            <text:p text:style-name="Text_20_body">89.7%</text:p>
          </table:table-cell>
        </table:table-row>
        <table:table-row>
          <table:table-cell table:style-name="Table1.A1" office:value-type="string">
            <text:p text:style-name="Text_20_body">Ballroom</text:p>
          </table:table-cell>
          <table:table-cell table:style-name="Table1.A1" office:value-type="string">
            <text:p text:style-name="Text_20_body">91.1%</text:p>
          </table:table-cell>
          <table:table-cell table:style-name="Table1.A1" office:value-type="string">
            <text:p text:style-name="Text_20_body">97.5%</text:p>
          </table:table-cell>
          <table:table-cell table:style-name="Table1.A1" office:value-type="string">
            <text:p text:style-name="Text_20_body">97.3%</text:p>
          </table:table-cell>
        </table:table-row>
        <table:table-row>
          <table:table-cell table:style-name="Table1.A1" office:value-type="string">
            <text:p text:style-name="Text_20_body">Hainsworth</text:p>
          </table:table-cell>
          <table:table-cell table:style-name="Table1.A1" office:value-type="string">
            <text:p text:style-name="Text_20_body">78.3%</text:p>
          </table:table-cell>
          <table:table-cell table:style-name="Table1.A1" office:value-type="string">
            <text:p text:style-name="Text_20_body">91.9%</text:p>
          </table:table-cell>
          <table:table-cell table:style-name="Table1.A1" office:value-type="string">
            <text:p text:style-name="Text_20_body">91.4%</text:p>
          </table:table-cell>
        </table:table-row>
        <table:table-row>
          <table:table-cell table:style-name="Table1.A1" office:value-type="string">
            <text:p text:style-name="Text_20_body">SMC <text:span text:style-name="T20">Mirex</text:span></text:p>
          </table:table-cell>
          <table:table-cell table:style-name="Table1.A1" office:value-type="string">
            <text:p text:style-name="Text_20_body">52.0%</text:p>
          </table:table-cell>
          <table:table-cell table:style-name="Table1.A1" office:value-type="string">
            <text:p text:style-name="Text_20_body">62.7%</text:p>
          </table:table-cell>
          <table:table-cell table:style-name="Table1.A1" office:value-type="string">
            <text:p text:style-name="Text_20_body">61.7%</text:p>
          </table:table-cell>
        </table:table-row>
      </table:table>
      <text:p text:style-name="P32"><text:span text:style-name="T24"><text:line-break/>It is important to note the distinction between Beat Tracking (BT) and Beat Annotation (BA).</text:span></text:p>
      <text:list text:style-name="L5">
        <text:list-item>
          <text:p text:style-name="P33">BT refers to autonomous beat prediction models.</text:p>
        </text:list-item>
        <text:list-item>
          <text:p text:style-name="P33">BA refers <text:span text:style-name="T30">to a human-made annotation, as in using SV for doing a beat assessment. BA might use a BT algorithm as a starting point and then go from there.</text:span></text:p>
        </text:list-item>
      </text:list>
      <text:p text:style-name="P34"/>
      <text:h text:style-name="P35" text:outline-level="3"><text:bookmark-start text:name="__RefHeading___Toc16570_2365495780"/><text:soft-page-break/>Beat Annotation Methods<text:bookmark-end text:name="__RefHeading___Toc16570_2365495780"/></text:h>
      <text:list text:style-name="L6">
        <text:list-item>
          <text:p text:style-name="P36">Tapping-based annotation </text:p>
        </text:list-item>
        <text:list-item>
          <text:p text:style-name="P36">Motor noise, jitter, latency </text:p>
        </text:list-item>
        <text:list-item>
          <text:p text:style-name="P37">Need for correction and shifting operations, <text:span text:style-name="T31">ELABORAR MAIS</text:span></text:p>
        </text:list-item>
      </text:list>
      <text:p text:style-name="P38">For music in which autonomous SoTA BT systems aren’t efficient enough, relaying on human made beat annotations still might be preferable to the annotator:</text:p>
      <text:p text:style-name="P38"/>
      <text:p text:style-name="P11"><text:span text:style-name="T32">“</text:span><text:span text:style-name="T33">A common method to create beat annotations for music recordings is to let a human annotator tap along with them.</text:span><text:span text:style-name="T32">” </text:span><text:reference-mark-start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span text:style-name="T32">(Driedger et al., 2019)</text:span><text:reference-mark-end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p>
      <text:p text:style-name="P39"/>
      <text:p text:style-name="P40"><text:span text:style-name="T34">The problem with this, is that these annotations will probably not be accurate enough even if the user preforming them is an experienced musician. There are multiple reasons that stem from </text:span><text:span text:style-name="T35">perception, </text:span><text:span text:style-name="T36">human motor noise, jitter and system latency </text:span><text:span text:style-name="T32"><text:s/></text:span><text:reference-mark-start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32">(Driedger et al., 2019)</text:span><text:reference-mark-end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36">. </text:span><text:span text:style-name="T37">Thus when tapping, there is the need to shift marked beats in order to make them accurate:</text:span></text:p>
      <text:p text:style-name="P41"><text:s/></text:p>
      <text:p text:style-name="P11"><text:span text:style-name="T37">“</text:span><text:span text:style-name="T38">This shifting operation is particularly relevant when correcting tapped beats, which can be subject to human motor noise as well as jitter and latency during acquisition.</text:span><text:span text:style-name="T37">” </text:span><text:reference-mark-start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span text:style-name="T39">(Sá Pinto et al., 2020)</text:span><text:reference-mark-end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p>
      <text:p text:style-name="P42"/>
      <text:h text:style-name="P43" text:outline-level="3"/>
      <text:h text:style-name="P44" text:outline-level="3"><text:bookmark-start text:name="__RefHeading___Toc16572_2365495780"/>Existing Tools for Beat Annotation<text:bookmark-end text:name="__RefHeading___Toc16572_2365495780"/></text:h>
      <text:list text:style-name="L7">
        <text:list-item>
          <text:p text:style-name="P45">Sonic Visualizer </text:p>
        </text:list-item>
        <text:list-item>
          <text:p text:style-name="P45">VAMP plugins </text:p>
        </text:list-item>
        <text:list-item>
          <text:p text:style-name="P45">Export/import workflows <text:span text:style-name="T40">(.txt)</text:span></text:p>
        </text:list-item>
        <text:list-item>
          <text:p text:style-name="P46">Emphasize <text:span text:style-name="T41">design intent mismatch</text:span> (general-purpose vs BT-specific<text:span text:style-name="T42">), </text:span><text:span text:style-name="T31">mmm será mesmo necessário?</text:span></text:p>
        </text:list-item>
      </text:list>
      <text:p text:style-name="P47"/>
      <text:p text:style-name="P48"><text:span text:style-name="T43">Sonic Visualizer is still the go-to software for scientific and MIR purposed audio analysis. However when it comes to BT, SV is outdated due to it’s inefficient BT labeling process, that is still very much manual and cumbersome </text:span><text:reference-mark-start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43">(Yamamoto, 2021)</text:span><text:reference-mark-end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43">. SV also is heavily reliant on VAMP plug-ins, modern SoTA BT algorithms are complex ML applications that may be difficult to implement into VAMP plug-ins and/or there is no direct or valued incentive for making these algorithms available </text:span><text:span text:style-name="T44">in this way.</text:span></text:p>
      <text:p text:style-name="P49"/>
      <text:p text:style-name="P49">Time Instances inside SV (name of the main tool in SV for BT), can be exported and imported as simple .txt files. Thus, for one to benefit from a SoTA BT algorithm, one needs to follow a few steps:</text:p>
      <text:list text:style-name="L8">
        <text:list-item>
          <text:p text:style-name="P50">First, one needs to have access the algorithm in itself which might involve not only browsing/<text:span text:style-name="T45">researching</text:span>, but also probably, accessing some publicly available source-code repository. </text:p>
        </text:list-item>
        <text:list-item>
          <text:p text:style-name="P50">Secondly, one needs to know <text:span text:style-name="T45">not only</text:span> how to compile and run the program, <text:span text:style-name="T45">but also</text:span> export the retrieved data into a .txt file that SV can read. </text:p>
        </text:list-item>
        <text:list-item>
          <text:p text:style-name="P50">Besides this, we also need to take into account that to accomplish these steps, one needs at least, to be minimally literate/experienced with programming.</text:p>
          <text:p text:style-name="P50"/>
        </text:list-item>
      </text:list>
      <text:p text:style-name="P51"><text:span text:style-name="T46">A</text:span><text:span text:style-name="T47"> problem with this, is that other users, who may not be experienced in programming or literate in MIR research, will rely on the most easily accessible BT algorithm inside SV, and </text:span><text:span text:style-name="T48">these will probably </text:span><text:span text:style-name="T49">be</text:span><text:span text:style-name="T48"> Beat Trackers like: BeatRoot </text:span><text:reference-mark-start text:name="ZOTERO_ITEM CSL_CITATION {&quot;citationID&quot;:&quot;k3AXep9K&quot;,&quot;properties&quot;:{&quot;unsorted&quot;:false,&quot;formattedCitation&quot;:&quot;(Dixon, 2001)&quot;,&quot;plainCitation&quot;:&quot;(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DBferf89gM"/><text:span text:style-name="T48">(Dixon, 2001)</text:span><text:reference-mark-end text:name="ZOTERO_ITEM CSL_CITATION {&quot;citationID&quot;:&quot;k3AXep9K&quot;,&quot;properties&quot;:{&quot;unsorted&quot;:false,&quot;formattedCitation&quot;:&quot;(Dixon, 2001)&quot;,&quot;plainCitation&quot;:&quot;(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DBferf89gM"/><text:span text:style-name="T48">, </text:span><text:span text:style-name="T50">Tempo and Beat Tracker - </text:span><text:span text:style-name="T49">Q</text:span><text:span text:style-name="T51">ueen Mary University of London</text:span><text:span text:style-name="T50"> </text:span><text:reference-mark-start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50">(Stark et al., 2009)</text:span><text:reference-mark-end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49">, and</text:span><text:span text:style-name="T51"> </text:span><text:span text:style-name="T48">IBT – I</text:span><text:span text:style-name="T51">NESC Beat Tracker </text:span><text:reference-mark-start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51">(Oliveira et al., 2010)</text:span><text:reference-mark-end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51"> </text:span><text:span text:style-name="T49">among others. </text:span><text:span text:style-name="T50">The reason being that, although they don’t come pre-installed with SV, they can be added via </text:span><text:span text:style-name="T52">a</text:span><text:span text:style-name="T50"> </text:span><text:span text:style-name="T49">native feature</text:span><text:span text:style-name="T50"> that allows to browse and install VAMP plugins without exiting the program </text:span><text:span text:style-name="T52">(referring to the “Find Transform” <text:s/>SV </text:span><text:span text:style-name="T53">tool</text:span><text:span text:style-name="T52">)</text:span><text:span text:style-name="T50">. </text:span><text:span text:style-name="T49">Crucially it is important to note that, as of the writing of this paper, you will not find any </text:span><text:span text:style-name="T52">SoTA BT using this SV built in feature, in fact one will only find outdated BT that are at least </text:span><text:span text:style-name="T54">more then a</text:span><text:span text:style-name="T52"> decade old.</text:span></text:p>
      <text:p text:style-name="P52"/>
      <text:p text:style-name="P53"><text:span text:style-name="T55">Falta aqui algo para ligar estas partes…</text:span></text:p>
      <text:p text:style-name="P54"><text:soft-page-break/></text:p>
      <text:p text:style-name="P55">One of the most common <text:span text:style-name="T56">autonomous </text:span>BT assessment mistakes are the Double/Half time errors, in which the algorithm might mark the beat in orders of integer multiplication (or division) from the actually correct beat.</text:p>
      <text:p text:style-name="P55">Another common mistake might be inducing multiple closely sequenced markings in the place where only one should be, or the contrary, omitting/skipping beats. For correcting these type of mistakes, current Beat Tracking software only allow correcting beats one-by-one. A simple workaround for this mistake would be to develop a feature in which the user could select a time region of beats and perform an operation such as:</text:p>
      <text:p text:style-name="P55">‘In this region, that start at xx:xx and ends at <text:span text:style-name="T56">yy</text:span>:<text:span text:style-name="T56">yy</text:span> , the tempo is a steady X bpm with Y/Z timeSignature.’ <text:span text:style-name="T56">T</text:span>he program would then shift/eliminate/highlight marked beats that deviate from the “user statement”. </text:p>
      <text:h text:style-name="P56" text:outline-level="3"/>
      <text:h text:style-name="P57" text:outline-level="3"><text:bookmark-start text:name="__RefHeading___Toc4080_3106982271"/>HIL Approach for BT<text:bookmark-end text:name="__RefHeading___Toc4080_3106982271"/></text:h>
      <text:list text:style-name="L9">
        <text:list-item>
          <text:p text:style-name="P58">Yamamoto (2023) </text:p>
        </text:list-item>
        <text:list-item>
          <text:p text:style-name="P58">Discussion of closed-source limitations</text:p>
        </text:list-item>
        <text:list-item>
          <text:p text:style-name="P59">The Spectogram Flaw</text:p>
          <text:p text:style-name="P60"><text:span text:style-name="T57"/></text:p>
        </text:list-item>
      </text:list>
      <text:p text:style-name="P61">In 202<text:span text:style-name="T42">1</text:span> Yamamoto proposed a Human-In-the-Loop <text:span text:style-name="T58">(HIL) </text:span>approach for BT, the problem is, although this paper seems promising, the software developed for this paper is closed-sourced, property of Yamaha Corp. and thus, it is not likely to be publicly accessible.</text:p>
      <text:p text:style-name="P61"/>
      <text:p text:style-name="P62"><text:span text:style-name="T31">The</text:span> paper <text:span text:style-name="T31">also</text:span> fails to mention how a spectrogram<text:span text:style-name="T59"> </text:span>can be beneficial as opposed to the more conventional waveform <text:span text:style-name="T59">representation </text:span><text:span text:style-name="T58">of audio</text:span>. <text:span text:style-name="T58">A</text:span> waveform can be useful for <text:span text:style-name="T59">identifying general differences in energy, </text:span><text:span text:style-name="T60">on the other hand</text:span><text:span text:style-name="T58"> s</text:span><text:span text:style-name="T59">pectograms can, besides that, represent information related with spectral energy in time </text:span><text:span text:style-name="T60">(frequency-energy)</text:span><text:span text:style-name="T59">.</text:span></text:p>
      <text:p text:style-name="P62"/>
      <text:p text:style-name="P62"><text:span text:style-name="T59">A clear example of this would be: In a waveform, one can distinguish a <text:s/></text:span><text:span text:style-name="T61">ff</text:span><text:span text:style-name="T59"> section of from a </text:span><text:span text:style-name="T61">pp</text:span><text:span text:style-name="T59"> in a recording. In a spectogram, one can not only distinguish these, but also understand if </text:span><text:span text:style-name="T62">a particular section </text:span><text:span text:style-name="T59">would be chord hit, or a</text:span><text:span text:style-name="T62">n</text:span><text:span text:style-name="T59"> </text:span><text:span text:style-name="T61">arpeggio, </text:span><text:span text:style-name="T62">along side noticing where these note onsets would be located pitch wise.</text:span></text:p>
      <text:p text:style-name="P63"/>
      <text:h text:style-name="P64" text:outline-level="3"/>
      <text:h text:style-name="P65" text:outline-level="3"><text:bookmark-start text:name="__RefHeading___Toc4080_3106982271 Copy 1"/>Audio-to-Score Alignment for BT<text:bookmark-end text:name="__RefHeading___Toc4080_3106982271 Copy 1"/></text:h>
      <text:list xml:id="list1404702699" text:style-name="L10">
        <text:list-item>
          <text:p text:style-name="P66">Piano Precision </text:p>
        </text:list-item>
        <text:list-item text:style-override="L11">
          <text:p text:style-name="P67">Audio-to-score alignment </text:p>
        </text:list-item>
      </text:list>
      <text:p text:style-name="P40"><text:span text:style-name="T63">Something that is not very well documented, is the relevance of following along a music score when </text:span><text:span text:style-name="T64">performing a</text:span><text:span text:style-name="T63"> beat </text:span><text:span text:style-name="T64">annotation</text:span><text:span text:style-name="T63">. Besides helping the annotator follow along more accurately the recording, a score might notice the annotator in advance of any bpm or time signature changes. Besides that, when using a Spectrogram-Based view of the recording, one can distinctively align a specific onset to a concrete and exact </text:span><text:span text:style-name="T65">moment in the recording timeline, this is essential to know if a beat is accurately assessed or not.<text:line-break/><text:line-break/>Piano Precision </text:span><text:reference-mark-start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65">(Jiang et al., 2025)</text:span><text:reference-mark-end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65">, is an example of a SV fork that was designed for displaying musical scores alongside audio recordings in a unified graphical interface. This program works surprisingly well for </text:span><text:span text:style-name="T64">classical</text:span><text:span text:style-name="T65"> Solo Piano pieces. Now there are two question that arrive from this: </text:span></text:p>
      <text:list text:style-name="L12">
        <text:list-item>
          <text:p text:style-name="P68">One is that, by following along the music sheet, Beat Tracking autonomously should be as straight forward as making the program align a beat marking with the respective note onsets that are marked in the score. <text:span text:style-name="T66">Although Piano Precision already does this with high enough accuracy for Audio-to-Score alignment, for beat tracking </text:span><text:span text:style-name="T58">adjustments might be needed, yet, it still </text:span><text:span text:style-name="T67">might </text:span><text:span text:style-name="T58">give a </text:span><text:span text:style-name="T67">better</text:span><text:span text:style-name="T58"> starting point </text:span><text:span text:style-name="T67">than some SoTA beat assesments</text:span><text:span text:style-name="T58">. </text:span></text:p>
        </text:list-item>
        <text:list-item>
          <text:p text:style-name="P69">The other would be to integrate this idea of Audio-to-Score alignment with a Spectral View of the recording. In Piano Precision this is done via a side-window that displays the a single A4 page of the score, one at a time. When the user hits play, a darkened highlight displays the current playback position in the score, while in another window a spectral view of the audio is following along the playback position horizontally. This allows for a musically natural follow-along of the score, mimicking how a musical score is actually read. However, for audio analysis and visualization purposes, it could be beneficial for the score to be aligned and viewed along side the playback position, meaning, horizontally and with note onsets that are aligned with their respective absolute position in the timeline. For BT this could allow the user to “grab a beat” and position it on the it’s corresponding position on top of the spectogram representation. Also this could be beneficial for more easily detecting beats that should be shifted.<text:line-break/><text:line-break/></text:p>
        </text:list-item>
      </text:list>
      <text:p text:style-name="Text_20_body"/>
      <text:h text:style-name="P56" text:outline-level="3"/>
      <text:h text:style-name="P57" text:outline-level="3"><text:bookmark-start text:name="__RefHeading___Toc16574_2365495780"/>Identified Gaps<text:bookmark-end text:name="__RefHeading___Toc16574_2365495780"/></text:h>
      <text:p text:style-name="P70">Add a synthesis subsection (currently missing)</text:p>
      <text:p text:style-name="P70">This is crucial.</text:p>
      <text:p text:style-name="P70">Summarize:</text:p>
      <text:list text:style-name="L13">
        <text:list-item>
          <text:p text:style-name="P71">Tooling gap </text:p>
        </text:list-item>
        <text:list-item>
          <text:p text:style-name="P71">Interaction gap </text:p>
        </text:list-item>
        <text:list-item>
          <text:p text:style-name="P71">Accessibility gap </text:p>
        </text:list-item>
        <text:list-item>
          <text:p text:style-name="P71">Visualization gap </text:p>
        </text:list-item>
      </text:list>
      <text:p text:style-name="P70">This subsection should directly justify your contribution</text:p>
      <text:p text:style-name="P72"><text:tab/></text:p>
      <text:h text:style-name="Heading_20_2" text:outline-level="2"><text:bookmark-start text:name="__RefHeading___Toc16576_2365495780"/>Work Plan<text:bookmark-end text:name="__RefHeading___Toc16576_2365495780"/></text:h>
      <text:p text:style-name="Text_20_body"/>
      <text:p text:style-name="P70">12/February:<text:tab/><text:tab/>Submission of state-of-the-art report</text:p>
      <text:p text:style-name="P70">20 to 24/April:<text:tab/><text:tab/>Intermediate presentation</text:p>
      <text:p text:style-name="P70">15/June:<text:tab/><text:tab/>Submission of thesis for supervisor validation (SIGARRA)</text:p>
      <text:p text:style-name="P70">30/June: <text:tab/><text:tab/>Validation by supervisors (SIGARRA)</text:p>
      <text:p text:style-name="P70">13 to 24/July: <text:tab/><text:tab/>Public presentation/Defence</text:p>
      <text:p text:style-name="P70">31/July: <text:tab/><text:tab/>Final version submitted (SIGARRA)</text:p>
      <text:p text:style-name="P70"/>
      <text:h text:style-name="Heading_20_2" text:outline-level="2"><text:bookmark-start text:name="__RefHeading___Toc16578_2365495780COPY_IS_MOVE"/>Bibliography<text:bookmark-end text:name="__RefHeading___Toc16578_2365495780COPY_IS_MOVE"/></text:h>
      <text:section text:style-name="Sect1" text:name="ZOTERO_BIBL {&quot;uncited&quot;:[],&quot;omitted&quot;:[],&quot;custom&quot;:[]} CSL_BIBLIOGRAPHY RND2A9QuaH6c9">
        <text:p text:style-name="Bibliography_20_1">Desblancs, D., Lostanlen, V., &amp; Hennequin, R. (2023). Zero-Note Samba: Self-Supervised Beat Tracking. <text:span text:style-name="T68">IEEE/ACM Transactions on Audio, Speech, and Language Processing</text:span>, <text:span text:style-name="T68">31</text:span>, 2922–2934.</text:p>
        <text:p text:style-name="Bibliography_20_1">Dixon, S. (2001). An interactive beat tracking and visualisation system. <text:span text:style-name="T68">Proceedings of the International Computer Music Conference (ICMC)</text:span>, 215–218.</text:p>
        <text:p text:style-name="Bibliography_20_1">Driedger, J., Schreiber, H., de Haas, W. B., &amp; Müller, M. (2019). Towards Automatically Correcting Tapped Beat Annotations for Music Recordings. <text:span text:style-name="T68">Proceedings of the 20th International Society for Music Information Retrieval Conference (ISMIR)</text:span>.</text:p>
        <text:p text:style-name="Bibliography_20_1">Foscarin, F., Schlüter, J., &amp; Widmer, G. (2024). Beat this! Accurate beat tracking without DBN postprocessing. <text:span text:style-name="T68">Proceedings of the 25th International Society for Music Information Retrieval Conference (ISMIR 2024)</text:span>.</text:p>
        <text:p text:style-name="Bibliography_20_1">Jiang, Y., Weigl, D. M., &amp; Goebl, W. (2025). Piano Precision: Advancing Music Performance Analysis by Integrating User-Correctable Audio-to-Score Alignment. <text:span text:style-name="T68">Proceedings of the International Computer Music Conference (ICMC)</text:span>.</text:p>
        <text:p text:style-name="Bibliography_20_1">Oliveira, J. L., Gouyon, F., Martins, L. G., &amp; Reis, L. P. (2010). IBT: A Real-Time Tempo and Beat Tracking System. <text:span text:style-name="T68">Proceedings of the 11th International Society for Music Information Retrieval Conference (ISMIR)</text:span>.</text:p>
        <text:p text:style-name="Bibliography_20_1"><text:soft-page-break/>Ru, G., Wang, J., Zhao, J., Wu, Y., Yu, Y., Jiang, N., Wang, W., &amp; Li, W. (2025). <text:span text:style-name="T68">HingeNet: A Harmonic-Aware Fine-Tuning Approach for Beat Tracking</text:span> (arXiv:2508.09788). arXiv. https://doi.org/10.48550/arXiv.2508.09788</text:p>
        <text:p text:style-name="Bibliography_20_1">Sá Pinto, A., Domingues, I., &amp; Davies, M. E. P. (2020). Shift If You Can: Counting and Visualising Correction Operations for Beat Tracking Evaluation. <text:span text:style-name="T68">Extended Abstracts for the Late-Breaking Demo Session of the 21st International Society for Music Information Retrieval Conference (ISMIR)</text:span>.</text:p>
        <text:p text:style-name="Bibliography_20_1">Stark, A. M., Davies, M. E. P., &amp; Plumbley, M. D. (2009). Real-time beat-synchronous analysis of musical audio. <text:span text:style-name="T68">Proceedings of the 12th International Conference on Digital Audio Effects (DAFx-09)</text:span>.</text:p>
        <text:p text:style-name="Bibliography_20_1">Yamamoto, K. (2021). Human-in-the-Loop Adaptation for Interactive Musical Beat Tracking. <text:span text:style-name="T68">Proceedings of the 22nd International Society for Music Information Retrieval Conference (ISMIR)</text:span>.</text:p>
      </text:section>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imes New Roman1" fo:font-family="'Times New Roman'" style:font-style-name="Bold" style:font-family-generic="roman" style:font-pitch="variable"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PT"/>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4:51:16.167864000</meta:creation-date>
    <dc:date>2026-02-09T21:00:41.522163000</dc:date>
    <meta:editing-duration>PT36M40S</meta:editing-duration>
    <meta:editing-cycles>7</meta:editing-cycles>
    <meta:generator>LibreOffice/26.2.0.3$MacOSX_X86_64 LibreOffice_project/afbbd0df0edb6d40b450b0337ac646b0913a760c</meta:generator>
    <meta:print-date>2026-02-09T20:58:44.255700000</meta:print-date>
    <meta:document-statistic meta:table-count="1" meta:image-count="0" meta:object-count="0" meta:page-count="14" meta:paragraph-count="141" meta:word-count="2848" meta:character-count="18046" meta:non-whitespace-character-count="15325"/>
    <meta:user-defined meta:name="ZOTERO_PREF_1">&lt;data data-version="3" zotero-version="8.0.2"&gt;&lt;session id="gmdyA3JU"/&gt;&lt;style id="http://www.zotero.org/styles/apa" locale="en-US" hasBibliography="1" bibliographyStyleHasBeenSet="1"/&gt;&lt;prefs&gt;&lt;pref name="fieldType" value="ReferenceMark"/&gt;&lt;pref name="automat</meta:user-defined>
    <meta:user-defined meta:name="ZOTERO_PREF_2">icJournalAbbreviations" value="true"/&gt;&lt;/prefs&gt;&lt;/data&gt;</meta:user-defined>
  </office:meta>
</office:document-meta>
</file>