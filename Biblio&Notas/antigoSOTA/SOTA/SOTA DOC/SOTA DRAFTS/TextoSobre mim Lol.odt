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officeooo:rsid="00179482" officeooo:paragraph-rsid="001864e3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12a76f" officeooo:paragraph-rsid="00165de3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rsid="0012a76f" officeooo:paragraph-rsid="0012a76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12a76f" officeooo:paragraph-rsid="00179482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12a76f" officeooo:paragraph-rsid="00174f42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174f42" officeooo:paragraph-rsid="00179482" style:font-size-asian="11pt" style:font-size-complex="11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officeooo:rsid="00174f42" officeooo:paragraph-rsid="00179482" style:font-size-asian="11pt" style:font-size-complex="11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1pt" officeooo:rsid="00174f42" officeooo:paragraph-rsid="00174f42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1864e3" officeooo:paragraph-rsid="001864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officeooo:rsid="00179482" officeooo:paragraph-rsid="001864e3"/>
    </style:style>
    <style:style style:name="T1" style:family="text">
      <style:text-properties officeooo:rsid="00179482"/>
    </style:style>
    <style:style style:name="T2" style:family="text">
      <style:text-properties officeooo:rsid="00165de3"/>
    </style:style>
    <style:style style:name="T3" style:family="text">
      <style:text-properties officeooo:rsid="00174f42"/>
    </style:style>
    <style:style style:name="T4" style:family="text">
      <style:text-properties officeooo:rsid="001864e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864e3" style:font-size-asian="11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João, escrevo este pequeno texto para fazer uma pequena introdução sobre mim.</text:p>
      <text:p text:style-name="P1"/>
      <text:p text:style-name="P1"><text:span text:style-name="T1">Sou o </text:span>Fernando Azeredo, tenho 25 anos e considero-me uma pessoa multifacetada, com um interesse genuíno em aprender um pouco de tudo.</text:p>
      <text:p text:style-name="P2"/>
      <text:p text:style-name="P2">Trabalho como técnico de som em bares noturnos <text:span text:style-name="T2">(quero deixar de trabalhar nesta área)</text:span>, sou músico, <text:span text:style-name="T2">faço</text:span> edição/<text:span text:style-name="T2">gravaç</text:span><text:span text:style-name="T3">ão</text:span> de vídeo <text:span text:style-name="T2">e música</text:span> e estou atualmente a criar uma startup focada em instrumentos musicais.</text:p>
      <text:p text:style-name="P3"/>
      <text:p text:style-name="P4">Desde cedo que a música faz parte da minha vida, <text:span text:style-name="T3">mas sempre gostei de explorar diferentes áreas do conhecimento. </text:span><text:span text:style-name="T1">N</text:span><text:span text:style-name="T3">a minha formação tive uma maior ênfase na música </text:span><text:span text:style-name="T1">e dai ter seguido um percurso mais ligado a essa área, acho que podia ter seguido outro caminho qualquer, mas acabei por envergar pela música/som por isso</text:span><text:span text:style-name="T3">.</text:span></text:p>
      <text:p text:style-name="P4"><text:span text:style-name="T3"><text:line-break/>Fiz</text:span> a licenciatura em Produção e Tecnologias da Música<text:span text:style-name="T3">, este é um curso que liga a música à tecnologia e à ciência (tinha unidades curriculares não só de música mas também de acústica, programação e eletrónica entre outras)</text:span>. <text:span text:style-name="T3">A</text:span>pós concluir o curso, comecei a interessar-me mais pelo funcionamento interno dos equipamentos que utilizava, o que despertou em mim uma curiosidade mais técnica e aprofundada, especialmente na área da programação de áudio,<text:span text:style-name="T3"> DSP </text:span><text:span text:style-name="T1">e interfaces</text:span>. Foi esse interesse que me levou a ingressar no <text:span text:style-name="T1">M</text:span>estrado em Multimédia na FEUP</text:p>
      <text:p text:style-name="P3"/>
      <text:p text:style-name="P3">A minha tese insere-se na área de Music Information Retrieval, um campo de investigação que procura desenvolver métodos algorítmicos para a análise de música. Dentro deste domínio, um dos pilares fundamentais é o Beat Tracking, <text:span text:style-name="T3">que se refere à</text:span> deteção do tempo musical. Atualmente, os algoritmos mais avançados nesta área baseiam-se <text:span text:style-name="T1">diversos métodos de </text:span>machine learning, o que implica a necessidade de grandes bases de dados musicais com anotações de beat precisas e fiáveis para trein<text:span text:style-name="T3">ar novos modelos</text:span>.</text:p>
      <text:p text:style-name="P5">É precisamente neste contexto que o meu projeto se posiciona, com o objetivo de desenvolver ferramentas que facilitem e melhorem o processo de anotação de beat em música. Em concreto, a minha investigação procura demonstrar duas ideias principais:</text:p>
      <text:p text:style-name="P5"><text:span text:style-name="T3"><text:tab/>1ª)</text:span> <text:tab/><text:span text:style-name="T3">Provar que </text:span>o uso de visualizações espectrais de áudio pode ajudar os anotadores a <text:tab/><text:tab/><text:tab/>realizar o seu trabalho de forma mais eficiente e precisa.</text:p>
      <text:p text:style-name="P5"><text:tab/><text:span text:style-name="T3">2º) <text:tab/>Provar</text:span> que existe valor acrescentado em realizar essas anotações combinando <text:tab/><text:tab/><text:tab/><text:tab/>simultaneamente a informação de um espectrograma com a de uma partitura musical.</text:p>
      <text:p text:style-name="P6">Para este projeto, estou a desenvolver código em JS/HTML e Python. Mas tenho de trabalhar com bases de código em C++.</text:p>
      <text:p text:style-name="P6"><text:line-break/>Para a minha startup <text:span text:style-name="T4">(OMI) </text:span>eu estou encarregue de des<text:span text:style-name="T4">en</text:span>volver UI e trabalho com Qt/C++ e Qt/QML. <text:line-break/><text:line-break/>Posso não ser um “Engenheiro de Software” com <text:span text:style-name="T1">uma</text:span> formação <text:span text:style-name="T1">académica</text:span>, mas considero-me um auto-ditada nesta área. <text:span text:style-name="T1">T</text:span>rabalho com as seguintes línguas:</text:p>
      <text:list text:style-name="L1">
        <text:list-item>
          <text:p text:style-name="P7">Python</text:p>
        </text:list-item>
        <text:list-item>
          <text:p text:style-name="P7">JavaScript</text:p>
        </text:list-item>
        <text:list-item>
          <text:p text:style-name="P8">HTML</text:p>
        </text:list-item>
        <text:list-item>
          <text:p text:style-name="P7">Qt/QML e Qt/C++</text:p>
        </text:list-item>
        <text:list-item>
          <text:p text:style-name="P8">C/C++</text:p>
        </text:list-item>
      </text:list>
      <text:p text:style-name="P9"><text:line-break/>Trabalho com três sistemas operativos diferentes: Linux (Debian - PopOS), MacOS e Windows. <text:line-break/></text:p>
      <text:p text:style-name="P10"><text:span text:style-name="T5">Para além disso sou músico, tenho uma banda com amigos que tem vindo a ter um crescimento gradual, se quisere</text:span><text:span text:style-name="T6">s</text:span><text:span text:style-name="T5"> pode</text:span><text:span text:style-name="T6">s</text:span><text:span text:style-name="T5"> ouvir no Spotify, procu</text:span><text:span text:style-name="T6">ra</text:span><text:span text:style-name="T5"> “</text:span><text:a xlink:type="simple" xlink:href="https://open.spotify.com/intl-pt/artist/0vcETH75cBPibAlU4fjp4n?si=LsswuNvwTDKeF9_kudQ4pA" text:style-name="Internet_20_link" text:visited-style-name="Visited_20_Internet_20_Link"><text:span text:style-name="T5">Pomadinha</text:span></text:a><text:span text:style-name="T5">”. Para esta minha banda também tenho feito muito trabalho de edição/gravação de vídeo.</text:span><text:span text:style-name="T6"> Vejo a banda como outro “projeto empreendedor” do qual faço parte. <text:line-break/><text:line-break/>Eu posso falar de muito mais coisas sobre mim, mas acho que para já isto serve como uma introdução à minha pessoa.</text:span></text:p>
      <text:p text:style-name="P9"><text:line-break/>Até já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9mm" style:writing-mode="page"/>
      <style:text-properties style:use-window-font-color="true" loext:opacity="0%" style:font-name="Liberation Serif" fo:font-size="12pt" fo:language="pt" fo:country="P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22:26:04.445062000</meta:creation-date>
    <meta:print-date>2026-04-09T00:00:27.832812000</meta:print-date>
    <dc:date>2026-04-09T00:01:19.600957000</dc:date>
    <meta:editing-duration>PT9M11S</meta:editing-duration>
    <meta:editing-cycles>1</meta:editing-cycles>
    <meta:generator>LibreOffice/26.2.0.3$MacOSX_X86_64 LibreOffice_project/afbbd0df0edb6d40b450b0337ac646b0913a760c</meta:generator>
    <meta:document-statistic meta:table-count="0" meta:image-count="0" meta:object-count="0" meta:page-count="1" meta:paragraph-count="19" meta:word-count="534" meta:character-count="3287" meta:non-whitespace-character-count="2755"/>
  </office:meta>
</office:document-meta>
</file>