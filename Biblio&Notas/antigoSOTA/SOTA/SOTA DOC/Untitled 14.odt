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Heading_20_1">
      <style:paragraph-properties fo:text-align="center" style:justify-single-word="false"/>
      <style:text-properties fo:color="#000000" loext:opacity="100%"/>
    </style:style>
    <style:style style:name="P2" style:family="paragraph" style:parent-style-name="Heading_20_1">
      <style:paragraph-properties fo:margin-top="0in" fo:margin-bottom="0in" style:contextual-spacing="false" fo:text-align="center" style:justify-single-word="false"/>
      <style:text-properties style:font-name="Times New Roman" fo:font-size="18pt" officeooo:paragraph-rsid="001dbdc0" style:font-size-asian="18pt" style:font-size-complex="18pt"/>
    </style:style>
    <style:style style:name="P3" style:family="paragraph" style:parent-style-name="Contents_20_Heading">
      <style:paragraph-properties fo:break-before="page"/>
      <style:text-properties fo:color="#000000" loext:opacity="100%"/>
    </style:style>
    <style:style style:name="P4" style:family="paragraph" style:parent-style-name="Contents_20_2">
      <style:paragraph-properties>
        <style:tab-stops>
          <style:tab-stop style:position="17.6681in" style:type="right" style:leader-style="dotted" style:leader-text="."/>
        </style:tab-stops>
      </style:paragraph-properties>
    </style:style>
    <style:style style:name="P5" style:family="paragraph" style:parent-style-name="Contents_20_3">
      <style:paragraph-properties>
        <style:tab-stops>
          <style:tab-stop style:position="17.4709in" style:type="right" style:leader-style="dotted" style:leader-text="."/>
        </style:tab-stops>
      </style:paragraph-properties>
    </style:style>
    <style:style style:name="P6" style:family="paragraph" style:parent-style-name="Text_20_body">
      <style:text-properties fo:color="#000000" loext:opacity="100%"/>
    </style:style>
    <style:style style:name="P7" style:family="paragraph" style:parent-style-name="Heading_20_2" style:list-style-name="">
      <style:text-properties fo:color="#000000" loext:opacity="100%" officeooo:paragraph-rsid="001dbdc0"/>
    </style:style>
    <style:style style:name="P8" style:family="paragraph" style:parent-style-name="Heading_20_2">
      <style:paragraph-properties fo:break-before="page"/>
      <style:text-properties fo:color="#000000" loext:opacity="100%" officeooo:paragraph-rsid="001dbdc0"/>
    </style:style>
    <style:style style:name="P9" style:family="paragraph" style:parent-style-name="Standard">
      <style:text-properties fo:color="#000000" loext:opacity="100%" officeooo:rsid="00216694" officeooo:paragraph-rsid="001a2f8a"/>
    </style:style>
    <style:style style:name="P10" style:family="paragraph" style:parent-style-name="Heading_20_2">
      <style:paragraph-properties fo:break-before="page"/>
      <style:text-properties fo:color="#000000" loext:opacity="100%"/>
    </style:style>
    <style:style style:name="P11" style:family="paragraph" style:parent-style-name="Text_20_body" style:list-style-name="L1">
      <style:text-properties fo:color="#000000" loext:opacity="100%"/>
    </style:style>
    <style:style style:name="P12" style:family="paragraph" style:parent-style-name="Text_20_body">
      <style:text-properties fo:color="#000000" loext:opacity="100%" officeooo:paragraph-rsid="001c7891"/>
    </style:style>
    <style:style style:name="P13" style:family="paragraph" style:parent-style-name="Text_20_body" style:list-style-name="L2">
      <style:text-properties fo:color="#000000" loext:opacity="100%"/>
    </style:style>
    <style:style style:name="P14" style:family="paragraph" style:parent-style-name="Text_20_body" style:list-style-name="L3">
      <style:text-properties fo:color="#000000" loext:opacity="100%"/>
    </style:style>
    <style:style style:name="P15" style:family="paragraph" style:parent-style-name="Text_20_body">
      <loext:graphic-properties draw:fill="none"/>
      <style:paragraph-properties fo:line-height="115%" fo:text-align="justify" style:justify-single-word="false" fo:break-before="page" fo:background-color="transparent"/>
      <style:text-properties fo:color="#000000" loext:opacity="100%" officeooo:paragraph-rsid="001a2f8a"/>
    </style:style>
    <style:style style:name="P16" style:family="paragraph" style:parent-style-name="Text_20_body" style:list-style-name="L4">
      <loext:graphic-properties draw:fill="none"/>
      <style:paragraph-properties fo:line-height="115%" fo:text-align="justify" style:justify-single-word="false" fo:background-color="transparent"/>
      <style:text-properties fo:color="#000000" loext:opacity="100%" officeooo:paragraph-rsid="001a2f8a"/>
    </style:style>
    <style:style style:name="P17" style:family="paragraph" style:parent-style-name="Text_20_body" style:list-style-name="L4">
      <loext:graphic-properties draw:fill="none"/>
      <style:paragraph-properties fo:line-height="115%" fo:text-align="justify" style:justify-single-word="false" fo:background-color="transparent"/>
      <style:text-properties fo:color="#000000" loext:opacity="100%" style:font-name="Times New Roman" fo:font-size="12pt" fo:font-style="normal" style:text-underline-style="none" fo:font-weight="normal" officeooo:rsid="004bbe4a" officeooo:paragraph-rsid="001a2f8a" style:font-size-asian="12pt" style:font-style-asian="normal" style:font-size-complex="12pt" style:font-style-complex="normal"/>
    </style:style>
    <style:style style:name="P18" style:family="paragraph" style:parent-style-name="Text_20_body">
      <loext:graphic-properties draw:fill="none"/>
      <style:paragraph-properties fo:line-height="115%" fo:text-align="justify" style:justify-single-word="false" fo:background-color="transparent"/>
      <style:text-properties fo:color="#000000" loext:opacity="100%" officeooo:paragraph-rsid="001a2f8a"/>
    </style:style>
    <style:style style:name="P19" style:family="paragraph" style:parent-style-name="Heading_20_3">
      <style:text-properties fo:color="#000000" loext:opacity="100%"/>
    </style:style>
    <style:style style:name="P20" style:family="paragraph" style:parent-style-name="Text_20_body">
      <style:paragraph-properties fo:text-align="justify" style:justify-single-word="false"/>
      <style:text-properties fo:color="#000000" loext:opacity="100%" style:font-name="Times New Roman" fo:font-size="12pt" style:font-size-asian="12pt" style:font-size-complex="12pt"/>
    </style:style>
    <style:style style:name="P21" style:family="paragraph" style:parent-style-name="Text_20_body">
      <style:text-properties fo:color="#000000" loext:opacity="100%" style:font-name="Times New Roman" fo:font-size="12pt" style:font-size-asian="12pt" style:font-size-complex="12pt"/>
    </style:style>
    <style:style style:name="P22" style:family="paragraph" style:parent-style-name="Text_20_body">
      <style:paragraph-properties fo:margin-left="0in" fo:margin-top="0in" fo:margin-bottom="0.0972in" style:contextual-spacing="false" fo:line-height="115%" fo:text-align="justify" style:justify-single-word="false" fo:text-indent="0in" style:auto-text-indent="false">
        <style:tab-stops>
          <style:tab-stop style:position="0.0346in"/>
        </style:tab-stops>
      </style:paragraph-properties>
      <style:text-properties fo:color="#000000" loext:opacity="100%" style:font-name="Times New Roman" fo:font-size="12pt" fo:font-style="normal" style:text-underline-style="none" fo:font-weight="normal" officeooo:rsid="0069423b" officeooo:paragraph-rsid="001c6ad1" style:font-size-asian="12pt" style:font-style-asian="normal" style:font-size-complex="12pt" style:font-style-complex="normal"/>
    </style:style>
    <style:style style:name="P23" style:family="paragraph" style:parent-style-name="Text_20_body">
      <style:paragraph-properties fo:break-before="page"/>
      <style:text-properties fo:color="#000000" loext:opacity="100%" style:font-name="Times New Roman" fo:font-size="12pt" officeooo:paragraph-rsid="001c7891" style:font-size-asian="12pt" style:font-size-complex="12pt"/>
    </style:style>
    <style:style style:name="P24" style:family="paragraph" style:parent-style-name="Text_20_body">
      <style:text-properties fo:color="#000000" loext:opacity="100%" style:font-name="Times New Roman" fo:font-size="12pt" fo:font-style="normal" style:text-underline-style="none" fo:font-weight="normal" officeooo:rsid="006f0c81" officeooo:paragraph-rsid="001c7891" style:font-size-asian="12pt" style:font-style-asian="normal" style:font-size-complex="12pt" style:font-style-complex="normal"/>
    </style:style>
    <style:style style:name="P25" style:family="paragraph" style:parent-style-name="Text_20_body">
      <style:paragraph-properties fo:margin-left="0in" fo:text-align="center" style:justify-single-word="false" fo:text-indent="0in" style:auto-text-indent="false">
        <style:tab-stops>
          <style:tab-stop style:position="0.0346in"/>
        </style:tab-stops>
      </style:paragraph-properties>
      <style:text-properties fo:color="#000000" loext:opacity="100%" style:font-name="Times New Roman" fo:font-size="12pt" fo:font-style="normal" style:text-underline-style="none" fo:font-weight="normal" officeooo:rsid="0069423b" officeooo:paragraph-rsid="001c6ad1" style:font-size-asian="12pt" style:font-style-asian="normal" style:font-size-complex="12pt" style:font-style-complex="normal"/>
    </style:style>
    <style:style style:name="P26" style:family="paragraph" style:parent-style-name="Text_20_body">
      <style:paragraph-properties fo:margin-left="0in" fo:text-align="justify" style:justify-single-word="false" fo:text-indent="0in" style:auto-text-indent="false">
        <style:tab-stops>
          <style:tab-stop style:position="0.0346in"/>
        </style:tab-stops>
      </style:paragraph-properties>
      <style:text-properties fo:color="#000000" loext:opacity="100%" style:font-name="Times New Roman" fo:font-size="12pt" fo:font-style="normal" style:text-underline-style="none" fo:font-weight="normal" officeooo:rsid="0069423b" officeooo:paragraph-rsid="001c6ad1" style:font-size-asian="12pt" style:font-style-asian="normal" style:font-size-complex="12pt" style:font-style-complex="normal"/>
    </style:style>
    <style:style style:name="P27" style:family="paragraph" style:parent-style-name="Text_20_body">
      <style:paragraph-properties fo:margin-left="0in" fo:text-align="center" style:justify-single-word="false" fo:text-indent="0in" style:auto-text-indent="false">
        <style:tab-stops>
          <style:tab-stop style:position="0.0346in"/>
        </style:tab-stops>
      </style:paragraph-properties>
      <style:text-properties fo:color="#000000" loext:opacity="100%" style:font-name="Times New Roman" fo:font-size="12pt" fo:font-style="normal" style:text-underline-style="none" fo:font-weight="normal" officeooo:rsid="007381f3" officeooo:paragraph-rsid="001c6ad1" style:font-size-asian="12pt" style:font-style-asian="normal" style:font-size-complex="12pt" style:font-style-complex="normal"/>
    </style:style>
    <style:style style:name="P28" style:family="paragraph" style:parent-style-name="Heading_20_3">
      <style:text-properties fo:color="#000000" loext:opacity="100%" style:font-name="Times New Roman" fo:font-size="16pt" officeooo:paragraph-rsid="001c6ad1" style:font-size-asian="16pt" style:font-size-complex="16pt"/>
    </style:style>
    <style:style style:name="P29" style:family="paragraph" style:parent-style-name="Heading_20_3">
      <style:paragraph-properties fo:break-before="page"/>
      <style:text-properties fo:color="#000000" loext:opacity="100%" style:font-name="Times New Roman" fo:font-size="16pt" officeooo:paragraph-rsid="001c6ad1" style:font-size-asian="16pt" style:font-size-complex="16pt"/>
    </style:style>
    <style:style style:name="P30" style:family="paragraph" style:parent-style-name="Text_20_body">
      <style:paragraph-properties fo:margin-left="0in" fo:text-align="justify" style:justify-single-word="false" fo:text-indent="0in" style:auto-text-indent="false">
        <style:tab-stops>
          <style:tab-stop style:position="0.0346in"/>
        </style:tab-stops>
      </style:paragraph-properties>
      <style:text-properties fo:color="#000000" loext:opacity="100%" style:font-name="Times New Roman" fo:font-size="12pt" officeooo:paragraph-rsid="001c6ad1" style:font-size-asian="12pt" style:font-size-complex="12pt"/>
    </style:style>
    <style:style style:name="P31" style:family="paragraph" style:parent-style-name="Text_20_body">
      <style:paragraph-properties fo:margin-left="0in" fo:text-align="justify" style:justify-single-word="false" fo:text-indent="0in" style:auto-text-indent="false">
        <style:tab-stops>
          <style:tab-stop style:position="0.0346in"/>
        </style:tab-stops>
      </style:paragraph-properties>
      <style:text-properties fo:color="#000000" loext:opacity="100%" style:font-name="Times New Roman" fo:font-size="12pt" fo:font-style="normal" style:text-underline-style="none" fo:font-weight="normal" officeooo:rsid="0074a815" officeooo:paragraph-rsid="001c6ad1" style:font-size-asian="12pt" style:font-style-asian="normal" style:font-size-complex="12pt" style:font-style-complex="normal"/>
    </style:style>
    <style:style style:name="P32" style:family="paragraph" style:parent-style-name="Text_20_body">
      <style:paragraph-properties fo:margin-left="0in" fo:text-align="justify" style:justify-single-word="false" fo:text-indent="0in" style:auto-text-indent="false">
        <style:tab-stops>
          <style:tab-stop style:position="0.0346in"/>
        </style:tab-stops>
      </style:paragraph-properties>
      <style:text-properties fo:color="#000000" loext:opacity="100%" style:font-name="Times New Roman" fo:font-size="12pt" fo:font-style="normal" style:text-underline-style="none" fo:font-weight="normal" officeooo:rsid="0073c159" officeooo:paragraph-rsid="001c6ad1" style:font-size-asian="12pt" style:font-style-asian="normal" style:font-size-complex="12pt" style:font-style-complex="normal"/>
    </style:style>
    <style:style style:name="P33" style:family="paragraph" style:parent-style-name="Text_20_body">
      <style:paragraph-properties fo:margin-left="0in" fo:text-align="justify" style:justify-single-word="false" fo:text-indent="0in" style:auto-text-indent="false">
        <style:tab-stops>
          <style:tab-stop style:position="0.0346in"/>
        </style:tab-stops>
      </style:paragraph-properties>
      <style:text-properties fo:color="#000000" loext:opacity="100%" officeooo:paragraph-rsid="001c7891"/>
    </style:style>
    <style:style style:name="P34" style:family="paragraph" style:parent-style-name="Text_20_body">
      <style:paragraph-properties fo:margin-left="0in" fo:text-align="justify" style:justify-single-word="false" fo:text-indent="0in" style:auto-text-indent="false">
        <style:tab-stops>
          <style:tab-stop style:position="0.0346in"/>
        </style:tab-stops>
      </style:paragraph-properties>
      <style:text-properties fo:color="#000000" loext:opacity="100%" style:font-name="Times New Roman" fo:font-size="16pt" officeooo:rsid="001ba997" officeooo:paragraph-rsid="001c7891" style:font-size-asian="16pt" style:font-size-complex="16pt"/>
    </style:style>
    <style:style style:name="P35" style:family="paragraph" style:parent-style-name="Heading_20_3">
      <style:paragraph-properties fo:break-before="page"/>
      <style:text-properties fo:color="#000000" loext:opacity="100%"/>
    </style:style>
    <style:style style:name="P36" style:family="paragraph" style:parent-style-name="Text_20_body" style:list-style-name="L5">
      <style:text-properties fo:color="#000000" loext:opacity="100%"/>
    </style:style>
    <style:style style:name="P37" style:family="paragraph" style:parent-style-name="Heading_20_3">
      <style:text-properties fo:color="#000000" loext:opacity="100%" officeooo:rsid="001f9965" officeooo:paragraph-rsid="001f9965"/>
    </style:style>
    <style:style style:name="P38" style:family="paragraph" style:parent-style-name="Text_20_body">
      <style:text-properties fo:color="#000000" loext:opacity="100%" officeooo:paragraph-rsid="001f9965"/>
    </style:style>
    <style:style style:name="P39" style:family="paragraph" style:parent-style-name="Heading_20_3">
      <style:text-properties fo:color="#000000" loext:opacity="100%" officeooo:paragraph-rsid="00216694"/>
    </style:style>
    <style:style style:name="P40" style:family="paragraph" style:parent-style-name="Text_20_body">
      <style:text-properties fo:color="#000000" loext:opacity="100%" officeooo:paragraph-rsid="00216694"/>
    </style:style>
    <style:style style:name="P41" style:family="paragraph" style:parent-style-name="Heading_20_3">
      <style:text-properties fo:color="#000000" loext:opacity="100%" officeooo:rsid="00216694" officeooo:paragraph-rsid="00216694"/>
    </style:style>
    <style:style style:name="P42" style:family="paragraph" style:parent-style-name="Heading_20_2">
      <style:paragraph-properties fo:break-before="page"/>
      <style:text-properties fo:color="#000000" loext:opacity="100%" officeooo:rsid="001f9965" officeooo:paragraph-rsid="001f9965"/>
    </style:style>
    <style:style style:name="P43" style:family="paragraph" style:parent-style-name="Text_20_body">
      <style:text-properties fo:color="#000000" loext:opacity="100%" fo:font-size="10pt" style:font-size-asian="10pt" style:font-size-complex="10pt"/>
    </style:style>
    <style:style style:name="T1" style:family="text">
      <style:text-properties fo:color="#000000" loext:opacity="100%"/>
    </style:style>
    <style:style style:name="T2" style:family="text">
      <style:text-properties style:font-name="Times New Roman" fo:font-size="12pt" fo:font-style="normal" style:text-underline-style="solid" style:text-underline-width="auto" style:text-underline-color="font-color" fo:font-weight="normal" officeooo:rsid="004909c5" style:font-size-asian="12pt" style:font-style-asian="normal" style:font-size-complex="12pt" style:font-style-complex="normal"/>
    </style:style>
    <style:style style:name="T3" style:family="text">
      <style:text-properties style:font-name="Times New Roman" fo:font-size="12pt" fo:font-style="normal" style:text-underline-style="none" fo:font-weight="normal" officeooo:rsid="004909c5" style:font-size-asian="12pt" style:font-style-asian="normal" style:font-size-complex="12pt" style:font-style-complex="normal"/>
    </style:style>
    <style:style style:name="T4" style:family="text">
      <style:text-properties style:font-name="Times New Roman" fo:font-size="12pt" fo:font-style="normal" style:text-underline-style="none" fo:font-weight="normal" officeooo:rsid="0049efe7" style:font-size-asian="12pt" style:font-style-asian="normal" style:font-size-complex="12pt" style:font-style-complex="normal"/>
    </style:style>
    <style:style style:name="T5" style:family="text">
      <style:text-properties style:font-name="Times New Roman" fo:font-size="12pt" fo:font-style="normal" style:text-underline-style="none" fo:font-weight="normal" officeooo:rsid="004835ba" style:font-size-asian="12pt" style:font-style-asian="normal" style:font-size-complex="12pt" style:font-style-complex="normal"/>
    </style:style>
    <style:style style:name="T6" style:family="text">
      <style:text-properties style:font-name="Times New Roman" fo:font-size="12pt" fo:font-style="normal" style:text-underline-style="solid" style:text-underline-width="auto" style:text-underline-color="font-color" fo:font-weight="normal" officeooo:rsid="00459b9c" style:font-size-asian="12pt" style:font-style-asian="normal" style:font-size-complex="12pt" style:font-style-complex="normal"/>
    </style:style>
    <style:style style:name="T7" style:family="text">
      <style:text-properties style:font-name="Times New Roman" fo:font-size="12pt" fo:font-style="normal" style:text-underline-style="none" fo:font-weight="normal" officeooo:rsid="00459b9c" style:font-size-asian="12pt" style:font-style-asian="normal" style:font-size-complex="12pt" style:font-style-complex="normal"/>
    </style:style>
    <style:style style:name="T8" style:family="text">
      <style:text-properties style:font-name="Times New Roman" fo:font-size="12pt" fo:font-style="normal" style:text-underline-style="none" fo:font-weight="normal" officeooo:rsid="00472cc3" style:font-size-asian="12pt" style:font-style-asian="normal" style:font-size-complex="12pt" style:font-style-complex="normal"/>
    </style:style>
    <style:style style:name="T9" style:family="text">
      <style:text-properties style:font-name="Times New Roman" fo:font-size="12pt" fo:font-style="normal" style:text-underline-style="solid" style:text-underline-width="auto" style:text-underline-color="font-color" fo:font-weight="normal" officeooo:rsid="0049efe7" style:font-size-asian="12pt" style:font-style-asian="normal" style:font-size-complex="12pt" style:font-style-complex="normal"/>
    </style:style>
    <style:style style:name="T10" style:family="text">
      <style:text-properties style:font-name="Times New Roman" fo:font-size="12pt" fo:font-style="normal" style:text-underline-style="none" fo:font-weight="normal" officeooo:rsid="004b0704" style:font-size-asian="12pt" style:font-style-asian="normal" style:font-size-complex="12pt" style:font-style-complex="normal"/>
    </style:style>
    <style:style style:name="T11" style:family="text">
      <style:text-properties style:font-name="Times New Roman" fo:font-size="12pt" fo:font-style="italic" style:text-underline-style="solid" style:text-underline-width="auto" style:text-underline-color="font-color" fo:font-weight="normal" officeooo:rsid="004bbe4a" style:font-size-asian="12pt" style:font-style-asian="italic" style:font-size-complex="12pt" style:font-style-complex="italic"/>
    </style:style>
    <style:style style:name="T12" style:family="text">
      <style:text-properties style:font-name="Times New Roman" fo:font-size="12pt" fo:font-style="normal" style:text-underline-style="solid" style:text-underline-width="auto" style:text-underline-color="font-color" fo:font-weight="normal" officeooo:rsid="004bbe4a" style:font-size-asian="12pt" style:font-style-asian="normal" style:font-size-complex="12pt" style:font-style-complex="normal"/>
    </style:style>
    <style:style style:name="T13" style:family="text">
      <style:text-properties style:font-name="Times New Roman" fo:font-size="12pt" fo:font-style="normal" style:text-underline-style="none" fo:font-weight="normal" officeooo:rsid="004bbe4a" style:font-size-asian="12pt" style:font-style-asian="normal" style:font-size-complex="12pt" style:font-style-complex="normal"/>
    </style:style>
    <style:style style:name="T14" style:family="text">
      <style:text-properties style:font-name="Times New Roman" fo:font-size="12pt" fo:font-style="normal" style:text-underline-style="none" fo:font-weight="normal" officeooo:rsid="003dbda2" style:font-size-asian="12pt" style:font-style-asian="normal" style:font-size-complex="12pt" style:font-style-complex="normal"/>
    </style:style>
    <style:style style:name="T15" style:family="text">
      <style:text-properties style:font-name="Times New Roman" fo:font-size="12pt" fo:font-style="italic" style:text-underline-style="none" fo:font-weight="normal" officeooo:rsid="003dbda2" style:font-size-asian="12pt" style:font-style-asian="italic" style:font-size-complex="12pt" style:font-style-complex="italic"/>
    </style:style>
    <style:style style:name="T16" style:family="text">
      <style:text-properties style:font-name="Times New Roman" fo:font-size="12pt" fo:font-style="italic" style:text-underline-style="none" fo:font-weight="normal" officeooo:rsid="004bbe4a" style:font-size-asian="12pt" style:font-style-asian="italic" style:font-size-complex="12pt" style:font-style-complex="italic"/>
    </style:style>
    <style:style style:name="T17" style:family="text">
      <style:text-properties style:font-name="Times New Roman" fo:font-size="12pt" fo:font-style="normal" officeooo:rsid="004c1be2" style:font-size-asian="12pt" style:font-style-asian="normal" style:font-size-complex="12pt" style:font-style-complex="normal"/>
    </style:style>
    <style:style style:name="T18" style:family="text">
      <style:text-properties style:font-name="Times New Roman" fo:font-size="12pt" fo:font-style="normal" officeooo:rsid="004ca7e5" style:font-size-asian="12pt" style:font-style-asian="normal" style:font-size-complex="12pt" style:font-style-complex="normal"/>
    </style:style>
    <style:style style:name="T19" style:family="text">
      <style:text-properties style:font-name="Times New Roman" fo:font-size="12pt" fo:font-style="normal" officeooo:rsid="004d7cad" style:font-size-asian="12pt" style:font-style-asian="normal" style:font-size-complex="12pt" style:font-style-complex="normal"/>
    </style:style>
    <style:style style:name="T20" style:family="text">
      <style:text-properties style:font-name="Times New Roman" fo:font-size="12pt" fo:font-style="normal" officeooo:rsid="0063a9c2" style:font-size-asian="12pt" style:font-style-asian="normal" style:font-size-complex="12pt" style:font-style-complex="normal"/>
    </style:style>
    <style:style style:name="T21" style:family="text">
      <style:text-properties style:font-name="Times New Roman" fo:font-size="12pt" fo:font-style="normal" officeooo:rsid="004d91c3" style:font-size-asian="12pt" style:font-style-asian="normal" style:font-size-complex="12pt" style:font-style-complex="normal"/>
    </style:style>
    <style:style style:name="T22" style:family="text">
      <style:text-properties style:font-name="Times New Roman" fo:font-size="12pt" fo:font-style="normal" officeooo:rsid="004ee147" style:font-size-asian="12pt" style:font-style-asian="normal" style:font-size-complex="12pt" style:font-style-complex="normal"/>
    </style:style>
    <style:style style:name="T23" style:family="text">
      <style:text-properties style:font-name="Times New Roman" fo:font-size="12pt" fo:font-style="normal" officeooo:rsid="00532f03" style:font-size-asian="12pt" style:font-style-asian="normal" style:font-size-complex="12pt" style:font-style-complex="normal"/>
    </style:style>
    <style:style style:name="T24" style:family="text">
      <style:text-properties style:font-name="Times New Roman" fo:font-size="12pt" fo:font-style="normal" officeooo:rsid="005092ec" style:font-size-asian="12pt" style:font-style-asian="normal" style:font-size-complex="12pt" style:font-style-complex="normal"/>
    </style:style>
    <style:style style:name="T25" style:family="text">
      <style:text-properties officeooo:rsid="001ba997"/>
    </style:style>
    <style:style style:name="T26" style:family="text">
      <style:text-properties style:font-name="Times New Roman" fo:font-size="12pt" style:font-size-asian="12pt" style:font-size-complex="12pt"/>
    </style:style>
    <style:style style:name="T27" style:family="text">
      <style:text-properties style:font-name="Times New Roman" fo:font-size="12pt" officeooo:rsid="006686c2" style:font-size-asian="12pt" style:font-size-complex="12pt"/>
    </style:style>
    <style:style style:name="T28" style:family="text">
      <style:text-properties style:font-name="Times New Roman" fo:font-size="12pt" officeooo:rsid="00674a14" style:font-size-asian="12pt" style:font-size-complex="12pt"/>
    </style:style>
    <style:style style:name="T29" style:family="text">
      <style:text-properties fo:font-style="normal" style:text-underline-style="none" fo:font-weight="normal" officeooo:rsid="005f8d60" style:font-style-asian="normal" style:font-style-complex="normal"/>
    </style:style>
    <style:style style:name="T30" style:family="text">
      <style:text-properties fo:font-style="normal" style:text-underline-style="none" fo:font-weight="normal" officeooo:rsid="0069423b" style:font-style-asian="normal" style:font-style-complex="normal"/>
    </style:style>
    <style:style style:name="T31" style:family="text">
      <style:text-properties fo:font-style="normal" style:text-underline-style="none" fo:font-weight="normal" officeooo:rsid="006686c2" style:font-style-asian="normal" style:font-style-complex="normal"/>
    </style:style>
    <style:style style:name="T32" style:family="text">
      <style:text-properties fo:font-style="normal" style:text-underline-style="none" fo:font-weight="normal" officeooo:rsid="005fabaa" style:font-style-asian="normal" style:font-style-complex="normal"/>
    </style:style>
    <style:style style:name="T33" style:family="text">
      <style:text-properties fo:font-style="normal" style:text-underline-style="none" fo:font-weight="normal" officeooo:rsid="00674a14" style:font-style-asian="normal" style:font-style-complex="normal"/>
    </style:style>
    <style:style style:name="T34" style:family="text">
      <style:text-properties fo:font-style="normal" style:text-underline-style="none" fo:font-weight="normal" officeooo:rsid="006b3a71" style:font-style-asian="normal" style:font-style-complex="normal"/>
    </style:style>
    <style:style style:name="T35" style:family="text">
      <style:text-properties fo:font-style="normal" style:text-underline-style="none" fo:font-weight="normal" officeooo:rsid="006f076c" style:font-style-asian="normal" style:font-style-complex="normal"/>
    </style:style>
    <style:style style:name="T36" style:family="text">
      <style:text-properties fo:font-style="normal" style:text-underline-style="none" fo:font-weight="normal" officeooo:rsid="006c6eae" style:font-style-asian="normal" style:font-style-complex="normal"/>
    </style:style>
    <style:style style:name="T37" style:family="text">
      <style:text-properties fo:font-style="normal" style:text-underline-style="none" fo:font-weight="normal" officeooo:rsid="006d6f59" style:font-style-asian="normal" style:font-style-complex="normal"/>
    </style:style>
    <style:style style:name="T38" style:family="text">
      <style:text-properties fo:font-style="normal" style:text-underline-style="none" fo:font-weight="normal" officeooo:rsid="006f0c81" style:font-style-asian="normal" style:font-style-complex="normal"/>
    </style:style>
    <style:style style:name="T39" style:family="text">
      <style:text-properties fo:font-size="16pt" officeooo:rsid="001ba997" style:font-size-asian="16pt" style:font-size-complex="16pt"/>
    </style:style>
    <style:style style:name="T40" style:family="text">
      <style:text-properties fo:font-size="16pt" style:font-size-asian="16pt" style:font-size-complex="16pt"/>
    </style:style>
    <style:style style:name="T41" style:family="text">
      <style:text-properties officeooo:rsid="006fa2cc"/>
    </style:style>
    <style:style style:name="T42" style:family="text">
      <style:text-properties fo:font-style="italic" officeooo:rsid="006fa2cc" style:font-style-asian="italic" style:font-style-complex="italic"/>
    </style:style>
    <style:style style:name="T43" style:family="text">
      <style:text-properties officeooo:rsid="00705f89"/>
    </style:style>
    <style:style style:name="T44" style:family="text">
      <style:text-properties officeooo:rsid="0071b504"/>
    </style:style>
    <style:style style:name="T45" style:family="text">
      <style:text-properties officeooo:rsid="00722684"/>
    </style:style>
    <style:style style:name="T46" style:family="text">
      <style:text-properties officeooo:rsid="007381f3"/>
    </style:style>
    <style:style style:name="T47" style:family="text">
      <style:text-properties fo:font-style="italic" style:font-style-asian="italic" style:font-style-complex="italic"/>
    </style:style>
    <style:style style:name="T48" style:family="text">
      <style:text-properties style:font-name="Times New Roman" fo:font-size="12pt" fo:font-style="normal" style:text-underline-style="none" fo:font-weight="normal" officeooo:rsid="007391a7" style:font-size-asian="12pt" style:font-style-asian="normal" style:font-size-complex="12pt" style:font-style-complex="normal"/>
    </style:style>
    <style:style style:name="T49" style:family="text">
      <style:text-properties style:font-name="Times New Roman" fo:font-size="12pt" fo:font-style="normal" style:text-underline-style="none" fo:font-weight="normal" officeooo:rsid="007f91b7" style:font-size-asian="12pt" style:font-style-asian="normal" style:font-size-complex="12pt" style:font-style-complex="normal"/>
    </style:style>
    <style:style style:name="T50" style:family="text">
      <style:text-properties style:font-name="Times New Roman" fo:font-size="12pt" fo:font-style="normal" style:text-underline-style="none" fo:font-weight="normal" officeooo:rsid="0073c159" style:font-size-asian="12pt" style:font-style-asian="normal" style:font-size-complex="12pt" style:font-style-complex="normal"/>
    </style:style>
    <style:style style:name="T51" style:family="text">
      <style:text-properties style:font-name="Times New Roman" fo:font-size="12pt" fo:font-style="italic" style:text-underline-style="none" fo:font-weight="normal" officeooo:rsid="007391a7" style:font-size-asian="12pt" style:font-style-asian="italic" style:font-size-complex="12pt" style:font-style-complex="italic"/>
    </style:style>
    <style:style style:name="T52" style:family="text">
      <style:text-properties style:font-name="Times New Roman" fo:font-size="12pt" fo:font-style="italic" style:text-underline-style="none" fo:font-weight="normal" officeooo:rsid="0073c159" style:font-size-asian="12pt" style:font-style-asian="italic" style:font-size-complex="12pt" style:font-style-complex="italic"/>
    </style:style>
    <style:style style:name="T53" style:family="text">
      <style:text-properties style:font-name="Times New Roman" fo:font-size="12pt" fo:font-style="italic" style:text-underline-style="none" fo:font-weight="normal" officeooo:rsid="007f91b7" style:font-size-asian="12pt" style:font-style-asian="italic" style:font-size-complex="12pt" style:font-style-complex="italic"/>
    </style:style>
    <style:style style:name="T54" style:family="text">
      <style:text-properties fo:font-style="normal" style:text-underline-style="none" fo:font-weight="normal" officeooo:rsid="0073c159" style:font-style-asian="normal" style:font-style-complex="normal"/>
    </style:style>
    <style:style style:name="T55" style:family="text">
      <style:text-properties fo:font-style="normal" style:text-underline-style="none" fo:font-weight="normal" officeooo:rsid="0074a815" style:font-style-asian="normal" style:font-style-complex="normal"/>
    </style:style>
    <style:style style:name="T56" style:family="text">
      <style:text-properties style:font-name="Times New Roman" fo:font-size="12pt" fo:font-style="normal" style:text-underline-style="none" fo:font-weight="normal" officeooo:rsid="0075f331" style:font-size-asian="12pt" style:font-style-asian="normal" style:font-size-complex="12pt" style:font-style-complex="normal"/>
    </style:style>
    <style:style style:name="T57" style:family="text">
      <style:text-properties style:font-name="Times New Roman" fo:font-size="12pt" fo:font-style="normal" style:text-underline-style="none" fo:font-weight="normal" officeooo:rsid="007707aa" style:font-size-asian="12pt" style:font-style-asian="normal" style:font-size-complex="12pt" style:font-style-complex="normal"/>
    </style:style>
    <style:style style:name="T58" style:family="text">
      <style:text-properties style:font-name="Times New Roman" fo:font-size="12pt" fo:font-style="normal" style:text-underline-style="none" fo:font-weight="normal" officeooo:rsid="00781b80" style:font-size-asian="12pt" style:font-style-asian="normal" style:font-size-complex="12pt" style:font-style-complex="normal"/>
    </style:style>
    <style:style style:name="T59" style:family="text">
      <style:text-properties style:font-name="Times New Roman" fo:font-size="12pt" fo:font-style="normal" style:text-underline-style="none" fo:font-weight="normal" officeooo:rsid="0078da0c" style:font-size-asian="12pt" style:font-style-asian="normal" style:font-size-complex="12pt" style:font-style-complex="normal"/>
    </style:style>
    <style:style style:name="T60" style:family="text">
      <style:text-properties style:font-name="Times New Roman" fo:font-size="16pt" officeooo:rsid="001ba997" style:font-size-asian="16pt" style:font-size-complex="16pt"/>
    </style:style>
    <style:style style:name="T61" style:family="text">
      <style:text-properties style:font-name="Times New Roman" fo:font-size="16pt" style:font-size-asian="16pt" style:font-size-complex="16pt"/>
    </style:style>
    <style:style style:name="T62" style:family="text">
      <style:text-properties style:font-name="Times New Roman" fo:font-size="12pt" fo:font-style="normal" fo:font-weight="normal" officeooo:rsid="0078da0c" style:font-size-asian="12pt" style:font-style-asian="normal" style:font-size-complex="12pt" style:font-style-complex="normal"/>
    </style:style>
    <style:style style:name="T63" style:family="text">
      <style:text-properties officeooo:rsid="007a9265"/>
    </style:style>
    <style:style style:name="T64" style:family="text">
      <style:text-properties fo:font-style="italic" officeooo:rsid="007a9265" style:font-style-asian="italic" style:font-style-complex="italic"/>
    </style:style>
    <style:style style:name="T65" style:family="text">
      <style:text-properties officeooo:rsid="007c79c3"/>
    </style:style>
    <style:style style:name="T66" style:family="text">
      <style:text-properties style:font-name="Times New Roman"/>
    </style:style>
    <style:style style:name="T67" style:family="text">
      <style:text-properties officeooo:rsid="007cdf5f"/>
    </style:style>
    <style:style style:name="T68" style:family="text">
      <style:text-properties officeooo:rsid="001c7891"/>
    </style:style>
    <style:style style:name="T69" style:family="text">
      <style:text-properties officeooo:rsid="001f9965"/>
    </style:style>
    <style:style style:name="fr1" style:family="graphic" style:parent-style-name="Inline_20_Heading">
      <style:graphic-properties style:vertical-pos="from-top" style:horizontal-pos="from-left" style:horizontal-rel="paragraph-conten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194_2365495780"/><draw:frame draw:style-name="fr1" draw:name="Frame1" text:anchor-type="as-char" svg:y="-0.2638in" draw:z-index="0"><draw:text-box fo:min-height="0.0161in" fo:min-width="0.0161in"><text:h text:style-name="P2" text:outline-level="1"><text:bookmark-start text:name="__RefHeading___Toc7192_2365495780"/>Interactive Musical Beat Annotation GUI<text:bookmark-end text:name="__RefHeading___Toc7192_2365495780"/></text:h></draw:text-box></draw:frame><text:bookmark-end text:name="__RefHeading___Toc7194_2365495780"/></text:h>
      <text:table-of-content text:style-name="Sect1" text:name="Table of Contents1">
        <text:table-of-content-source text:outline-level="10" text:index-scope="chapter">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dex</text:p>
          </text:index-title>
          <text:p text:style-name="P4"><text:a xlink:type="simple" xlink:href="#__RefHeading___Toc7196_2365495780" text:style-name="Index_20_Link" text:visited-style-name="Index_20_Link"><text:span text:style-name="T1">Introduction<text:tab/>1</text:span></text:a></text:p>
          <text:p text:style-name="P4"><text:a xlink:type="simple" xlink:href="#__RefHeading___Toc7198_2365495780" text:style-name="Index_20_Link" text:visited-style-name="Index_20_Link"><text:span text:style-name="T1">Contextualization<text:tab/>1</text:span></text:a></text:p>
          <text:p text:style-name="P4"><text:a xlink:type="simple" xlink:href="#__RefHeading___Toc7200_2365495780" text:style-name="Index_20_Link" text:visited-style-name="Index_20_Link"><text:span text:style-name="T1">Identification of the problem<text:tab/>1</text:span></text:a></text:p>
          <text:p text:style-name="P5"><text:a xlink:type="simple" xlink:href="#__RefHeading___Toc7202_2365495780" text:style-name="Index_20_Link" text:visited-style-name="Index_20_Link"><text:span text:style-name="T1">1. Lack of Dedicated Beat Annotation Software<text:tab/>1</text:span></text:a></text:p>
          <text:p text:style-name="P5"><text:a xlink:type="simple" xlink:href="#__RefHeading___Toc7204_2365495780" text:style-name="Index_20_Link" text:visited-style-name="Index_20_Link"><text:span text:style-name="T1">2. Outdated UI/UX and Integration of SoTA BT Algorithms<text:tab/>1</text:span></text:a></text:p>
          <text:p text:style-name="P5"><text:a xlink:type="simple" xlink:href="#__RefHeading___Toc7206_2365495780" text:style-name="Index_20_Link" text:visited-style-name="Index_20_Link"><text:span text:style-name="T1">3. Manual Annotation Problems<text:tab/>1</text:span></text:a></text:p>
          <text:p text:style-name="P5"><text:a xlink:type="simple" xlink:href="#__RefHeading___Toc7208_2365495780" text:style-name="Index_20_Link" text:visited-style-name="Index_20_Link"><text:span text:style-name="T1">4. Intelligent Beat Annotation Tools<text:tab/>1</text:span></text:a></text:p>
          <text:p text:style-name="P5"><text:a xlink:type="simple" xlink:href="#__RefHeading___Toc7210_2365495780" text:style-name="Index_20_Link" text:visited-style-name="Index_20_Link"><text:span text:style-name="T1">5. Audio-to-Score Alignment<text:tab/>1</text:span></text:a></text:p>
          <text:p text:style-name="P5"><text:a xlink:type="simple" xlink:href="#__RefHeading___Toc7212_2365495780" text:style-name="Index_20_Link" text:visited-style-name="Index_20_Link"><text:span text:style-name="T1">6. Spectogram Relevance in BT<text:tab/>1</text:span></text:a></text:p>
          <text:p text:style-name="P4"><text:a xlink:type="simple" xlink:href="#__RefHeading___Toc7214_2365495780" text:style-name="Index_20_Link" text:visited-style-name="Index_20_Link"><text:span text:style-name="T1">Research Questions<text:tab/>1</text:span></text:a></text:p>
          <text:p text:style-name="P4"><text:a xlink:type="simple" xlink:href="#__RefHeading___Toc9357_2365495780" text:style-name="Index_20_Link" text:visited-style-name="Index_20_Link"><text:span text:style-name="T1">State of the Art<text:tab/>1</text:span></text:a></text:p>
          <text:p text:style-name="P4"><text:a xlink:type="simple" xlink:href="#__RefHeading___Toc9359_2365495780" text:style-name="Index_20_Link" text:visited-style-name="Index_20_Link"><text:span text:style-name="T1">Work Plan<text:tab/>1</text:span></text:a></text:p>
          <text:p text:style-name="P4"><text:a xlink:type="simple" xlink:href="#__RefHeading___Toc9361_2365495780" text:style-name="Index_20_Link" text:visited-style-name="Index_20_Link"><text:span text:style-name="T1">Bibliography<text:tab/>1</text:span></text:a></text:p>
        </text:index-body>
      </text:table-of-content>
      <text:p text:style-name="P6"/>
      <text:h text:style-name="P7" text:outline-level="2"/>
      <text:h text:style-name="P8" text:outline-level="2"><text:bookmark-start text:name="__RefHeading___Toc7196_2365495780"/>Introduction<text:bookmark-end text:name="__RefHeading___Toc7196_2365495780"/></text:h>
      <text:p text:style-name="P9"/>
      <text:h text:style-name="P10" text:outline-level="2"><text:bookmark-start text:name="__RefHeading___Toc7198_2365495780"/>Contextualization<text:bookmark-end text:name="__RefHeading___Toc7198_2365495780"/></text:h>
      <text:p text:style-name="P6">Music Information Retrieval (MIR) is a research field that aims to develop computational methods to analyze, interpret and retrieve music information from audio. <text:s/>One of the most relevant areas of study within MIR is Beat Tracking (BT) that aims to retrieve musical Beat information <text:s/>from a music recording or audio file. This may include:</text:p>
      <text:list text:style-name="L1">
        <text:list-item>
          <text:p text:style-name="P11">BPM of the audio</text:p>
        </text:list-item>
        <text:list-item>
          <text:p text:style-name="P11">Beats position</text:p>
        </text:list-item>
        <text:list-item>
          <text:p text:style-name="P11">Time signature detection</text:p>
        </text:list-item>
        <text:list-item>
          <text:p text:style-name="P11">Measure count.</text:p>
        </text:list-item>
      </text:list>
      <text:p text:style-name="P12">In order to understand Beat Tracking, we first need to define it’s musical related terms:</text:p>
      <text:p text:style-name="P12"><text:s/></text:p>
      <text:list text:style-name="L2">
        <text:list-header>
          <text:p text:style-name="P13"><text:span text:style-name="T2">Rhythm</text:span><text:span text:style-name="T3">: “Often refers to the organization of events in time, such that they combine perceptually into groups or induce a sense of meter. In this sense, </text:span><text:span text:style-name="T4">rhythm is not a objective property of music, it is an experience that has both objective and subjective components. The experience of rhythm arises from the interaction of various materials of music – pitch, intensity, timbre and so forth – within the individual listener.” </text:span><text:span text:style-name="T5">[1]</text:span></text:p>
        </text:list-header>
      </text:list>
      <text:list text:style-name="L3">
        <text:list-header>
          <text:p text:style-name="P14"><text:span text:style-name="T6">Beat:</text:span><text:span text:style-name="T7"> “… a series of perceived pulses marking su</text:span><text:span text:style-name="T8">b</text:span><text:span text:style-name="T7">jectively equal units </text:span><text:span text:style-name="T8">in temporal continuum. Although the sense, of beat is generally established, and supported by objectively occurring musical events, beat is a subjective experience. Once a sense of beat has been established, it continues in the mind of the listener, even after the supporting stimulus ceased. The experience of beat is necessary for the experience of meter. The term “tempo” refers to a rate (beats per unit time) </text:span><text:span text:style-name="T5">at wich beats occour.” [1]</text:span></text:p>
          <text:p text:style-name="P14"><text:span text:style-name="T9">Meter:</text:span><text:span text:style-name="T4"> “as it is traditionally defined, refers to the measurement of the number of beats between more or less regularly recurring accents. (…) in order for met</text:span><text:span text:style-name="T10">er to exist, the listener must feel some beats to be accented relative to others. Accented beats are called “strong”, while unaccented beats are called “weak”. [1]</text:span></text:p>
          <text:p text:style-name="P14"><text:span text:style-name="T10"><text:line-break/></text:span><text:span text:style-name="T11">Tactus</text:span><text:span text:style-name="T12">:</text:span><text:span text:style-name="T13"> It is the human natural feel for beat. It can be characterized by the level at which the listener “taps their foot” to music.</text:span></text:p>
        </text:list-header>
      </text:list>
      <text:p text:style-name="P6"/>
      <text:p text:style-name="P15"><text:span text:style-name="T14">Beat Tracking is a fundamental pillar </text:span><text:span text:style-name="T10">for</text:span><text:span text:style-name="T14"> MIR because it forms the basis for a lot of MIR </text:span><text:span text:style-name="T10">computational models: </text:span><text:span text:style-name="T14">“</text:span><text:span text:style-name="T15">Many MIR systems first analyze the beats as the starting point, assume the results would be correct, and use them as a unit for further processing.</text:span><text:span text:style-name="T14">” </text:span><text:span text:style-name="T10">[2] . Now we can understand the complexity and importance that BT represents in MIR due to the fact that:</text:span></text:p>
      <text:list text:style-name="L4">
        <text:list-item>
          <text:p text:style-name="P16"><text:span text:style-name="T10">Musical beat </text:span><text:span text:style-name="T13">can fluctuate and change along a musical recording. </text:span></text:p>
        </text:list-item>
        <text:list-item>
          <text:p text:style-name="P16"><text:span text:style-name="T13">The </text:span><text:span text:style-name="T16">tactus</text:span><text:span text:style-name="T13"> <text:s/>(beat feel) can be differ from individuals: “...several musicians may judge the beat rate to belong to unequal levels of the pulse hierarchy: for example, one might tap twice or three times faster than the other. Yet, both will internalize musical meter in a comparable way, and thus will remain able to play together.” [3]</text:span></text:p>
        </text:list-item>
        <text:list-item>
          <text:p text:style-name="P17">Beat can vary along a musical piece. Measures can change their time signatures, strong and weak beats can also be music specific, or specific for a certain genre, piece, musician etc. </text:p>
        </text:list-item>
      </text:list>
      <text:p text:style-name="P18"><text:span text:style-name="T17">Alt</text:span><text:span text:style-name="T18">hough BT algorithms already work well enough for music with steady and predictable tempo (such as Pop music)</text:span><text:span text:style-name="T19">, there is still significant progress to be made when it comes to music in which the beat may vary or with complex rhythms[4], this includes Classical, Jazz, World music and more generally speaking, music that is “acoustically” performed, highly expressive </text:span><text:span text:style-name="T20">or rhythmically complex or unconventional</text:span><text:span text:style-name="T19"> music. In these cases, even SoTA BT autonomous algorithms still perform poorly </text:span><text:span text:style-name="T21">[2]</text:span><text:span text:style-name="T19">. <text:s/></text:span><text:span text:style-name="T21">Even though BT is a field that is growing fast, there is still a long way to go for achieving a reliable autonomous BT algorithm that can consistently perform </text:span><text:span text:style-name="T20">reliably (&gt;0.9 F1 Measure)</text:span><text:span text:style-name="T21">. </text:span><text:span text:style-name="T20">H</text:span><text:span text:style-name="T21">uman made beat tracking still is the most reliable way to access these cases. That being said, it is </text:span><text:span text:style-name="T22">important to note that although a lot of effort is being put for </text:span><text:span text:style-name="T23">researching and developing</text:span><text:span text:style-name="T22"> autonomous BT solutions, the same is not being done to the same degree, for human made Beat Tracking t</text:span><text:span text:style-name="T24">echnology</text:span><text:span text:style-name="T22">. Software such as Audacity and Sonic Visualizer allow for beat tracking of audio files, yet the process is still very much made “beat-to-beat” where users either have to introduce and adjust beats one by one, or at least verify that a SoTA BT prediction </text:span><text:span text:style-name="T24">is </text:span><text:span text:style-name="T22">correct from end-to-end. Besides this, most software that allows for BT, is either outdated for this task or at the very least, not optimized for </text:span><text:span text:style-name="T23">it</text:span><text:span text:style-name="T22">.</text:span></text:p>
      <text:h text:style-name="P10" text:outline-level="2"><text:bookmark-start text:name="__RefHeading___Toc7200_2365495780"/>Identification of the problem<text:bookmark-end text:name="__RefHeading___Toc7200_2365495780"/></text:h>
      <text:h text:style-name="P19" text:outline-level="3"><text:bookmark-start text:name="__RefHeading___Toc7202_2365495780"/><text:span text:style-name="T25">1. </text:span>Lack of Dedicated Beat Annotation Software<text:bookmark-end text:name="__RefHeading___Toc7202_2365495780"/></text:h>
      <text:p text:style-name="P20">Although Beat Tracking is a research filed that can go as far back as 1995 at least [8], the tools being used for this task stayed largely the same for a years. Not only that, software that allows for Beat Tracking, such as Audacity and Sonic Visualizer (SV) are programs that are designed for a multitude of other audio related tasks. When it comes to Beat Tracking optimized software, there are few options if none. In 2023 Yamamoto proposed a Human-In-the-Loop approach for BT [2], the problem is, although this paper seems promising, the software developed for this paper is closed-sourced, property of Yamaha Corp. and thus, it is not likely to be publicly accessible. </text:p>
      <text:p text:style-name="P20"/>
      <text:p text:style-name="P20">There are lots of software for all sorts of MIR tasks. Due to it´s open source nature, SV has enabled a lot of different MIR task specific software to be developed such as Piano Precision [7]: for score to audio “follow along”. There have been attempts to make web-based technology for enabling active listening and collaboration on various MIR tasks, examples include Songle (2011) [5] and Dezrann (2025) [6]. But crucially, none are BT focused. </text:p>
      <text:p text:style-name="P20"/>
      <text:h text:style-name="P19" text:outline-level="3"><text:bookmark-start text:name="__RefHeading___Toc7204_2365495780"/>2. Outdated UI/UX and Integration of SoTA BT Algorithms<text:bookmark-end text:name="__RefHeading___Toc7204_2365495780"/></text:h>
      <text:p text:style-name="P6"><text:span text:style-name="T26">Sonic Visualizer is still the go-to software for scientific and MIR purposed audio analysis. However when it comes to BT, SV is ou</text:span><text:span text:style-name="T27">t</text:span><text:span text:style-name="T26">dated due to it’s <text:s/>inefficient BT labeling process, that is still very much manual and cumbersome [2]. SV also is heavily reliant on VAMP plug-ins, modern SoTA BT algorithms are complex ML applications that may be difficult to implement into VAMP plug-ins and/or there is no </text:span><text:span text:style-name="T28">direct or valued </text:span><text:span text:style-name="T26">incentive for making these algorithms available as VAMP plugins. </text:span></text:p>
      <text:p text:style-name="P21"/>
      <text:p text:style-name="P21"><text:span text:style-name="T29">Time Instances </text:span><text:span text:style-name="T30">inside SV (name of the tool in SV for BT),</text:span><text:span text:style-name="T29"> can be exported and imported as simple .txt files. Thus, for one to benefit from a SoTA </text:span><text:span text:style-name="T31">BT</text:span><text:span text:style-name="T29"> algorithm, </text:span><text:span text:style-name="T31">one needs to follow a few steps</text:span><text:span text:style-name="T29">: Firs</text:span><text:span text:style-name="T31">t</text:span><text:span text:style-name="T29">, one needs to have access the algorithm in itself which might involve not only browsing, but also probably, accessing some </text:span><text:span text:style-name="T31">publicly available</text:span><text:span text:style-name="T29"> </text:span><text:span text:style-name="T30">source-code </text:span><text:span text:style-name="T29">repository. Secondly, one needs to know how to compile and run the program and export the retrieved data </text:span><text:span text:style-name="T30">in</text:span><text:span text:style-name="T29">to a .txt file that SV can read. </text:span><text:span text:style-name="T32">Besides this, we also need to take into account that to accomplish these steps, one needs at least, </text:span><text:span text:style-name="T33">to</text:span><text:span text:style-name="T32"> be minimally </text:span><text:span text:style-name="T31">literate/</text:span><text:span text:style-name="T32">experienced with programming.</text:span></text:p>
      <text:p text:style-name="P22"/>
      <text:p text:style-name="P23"><text:span text:style-name="T30">One problem with this, is that other users who may not be experienced in programming or literate in MIR research will rely on the most easily accessible BT algorithm inside SV, and </text:span><text:span text:style-name="T34">these will probably </text:span><text:span text:style-name="T35">be</text:span><text:span text:style-name="T34"> Beat Trackers like: BeatRoot </text:span><text:span text:style-name="T36">(2001)</text:span><text:span text:style-name="T34"> [11], </text:span><text:span text:style-name="T37">Tempo and Beat Tracker - </text:span><text:span text:style-name="T35">Q</text:span><text:span text:style-name="T36">ueen Mary University of London </text:span><text:span text:style-name="T37">(2009) </text:span><text:span text:style-name="T35">[12] and</text:span><text:span text:style-name="T36"> </text:span><text:span text:style-name="T34">IBT – I</text:span><text:span text:style-name="T36">NESC Beat Tracker (2010) [1</text:span><text:span text:style-name="T35">3</text:span><text:span text:style-name="T36">] </text:span><text:span text:style-name="T35">among others. </text:span><text:span text:style-name="T37">The reason being that, although they don’t come pre-installed with SV, they can be added via </text:span><text:span text:style-name="T38">a</text:span><text:span text:style-name="T37"> SV </text:span><text:span text:style-name="T35">native feature</text:span><text:span text:style-name="T37"> that allows to browse and install VAMP plugins without exiting the program </text:span><text:span text:style-name="T38">(referring to the “Find Transform” <text:s/>SV feature)</text:span><text:span text:style-name="T37">. </text:span><text:span text:style-name="T35">Crucially it is important to note that, as of the writing of this paper, you will not find any </text:span><text:span text:style-name="T38">SoTA BT using this SV built in feature, in fact one will only find outdated BT that are at least one decade old. <text:s/></text:span></text:p>
      <text:p text:style-name="P24"/>
      <text:h text:style-name="P19" text:outline-level="3"><text:bookmark-start text:name="__RefHeading___Toc7206_2365495780"/><text:span text:style-name="T39">3. </text:span><text:span text:style-name="T40">Manual Annotation Problems</text:span><text:bookmark-end text:name="__RefHeading___Toc7206_2365495780"/></text:h>
      <text:p text:style-name="P6">For music in which autonomous SoTA BT systems aren’t efficient enough, relaying on human made beat annotations still might be preferable to the annotator: </text:p>
      <text:p text:style-name="P25"><text:span text:style-name="T41"><text:line-break/>“</text:span><text:span text:style-name="T42">A common method to create beat annotations for music recordings is to let a human annotator tap along with them.</text:span><text:span text:style-name="T41">” </text:span><text:span text:style-name="T43">[10]</text:span></text:p>
      <text:p text:style-name="P26"><text:span text:style-name="T41"><text:line-break/></text:span><text:span text:style-name="T43">The problem with this, is that these annotations will probably not be accurate enough even if the user preforming them is an experienced musician. There are multiple reasons that stem from </text:span><text:span text:style-name="T44">perception, </text:span><text:span text:style-name="T45">human motor noise, jitter and system latency </text:span><text:span text:style-name="T46">[10]</text:span><text:span text:style-name="T45">. </text:span><text:span text:style-name="T46">Thus when tapping, there is the need to shift marked beats in order to make them accurate: </text:span></text:p>
      <text:p text:style-name="P26"/>
      <text:p text:style-name="P27">“<text:span text:style-name="T47">This shifting operation is particularly relevant when correcting tapped beats, which can be subject to human motor noise as well as jitter and latency during acquisition.</text:span>” [9]</text:p>
      <text:p text:style-name="P27"/>
      <text:h text:style-name="P28" text:outline-level="3"><text:bookmark-start text:name="__RefHeading___Toc7208_2365495780"/><text:span text:style-name="T25">4. </text:span>Intelligent Beat Annotation Tools<text:bookmark-end text:name="__RefHeading___Toc7208_2365495780"/></text:h>
      <text:p text:style-name="P6"><text:span text:style-name="T48">One of the most common BT assessment mistakes are the Double/Half time errors, in which the BT algorithm might mark the beat in orders of integer multiplication (or division) from the </text:span><text:span text:style-name="T49">actually correct </text:span><text:span text:style-name="T48">beat. </text:span><text:span text:style-name="T49">Ano</text:span><text:span text:style-name="T48">ther common mistake might be inducing multiple closely sequenced markings in the place where only one should be, or the contrary, omitting/skipping beats. For correcting these type of mistakes, current Beat Tracking software only allow correcting beats one-by-one. A simple workaround </text:span><text:span text:style-name="T50">for this</text:span><text:span text:style-name="T48"> mistake would be to develop a feature in which the user could select</text:span><text:span text:style-name="T49">s </text:span><text:span text:style-name="T48">a time region of beats and perform </text:span><text:span text:style-name="T50">an</text:span><text:span text:style-name="T48"> operation such as: ‘</text:span><text:span text:style-name="T51">In this region, </text:span><text:span text:style-name="T52">that start at </text:span><text:span text:style-name="T53">xx:xx</text:span><text:span text:style-name="T52"> and ends at </text:span><text:span text:style-name="T53">xx:xx </text:span><text:span text:style-name="T51">, the tempo is a steady X bpm with Y/</text:span><text:span text:style-name="T52">Z</text:span><text:span text:style-name="T51"> time</text:span><text:span text:style-name="T52">S</text:span><text:span text:style-name="T51">ignature</text:span><text:span text:style-name="T48">’ </text:span><text:span text:style-name="T50">the program would then shift/eliminate/highlight marked beats that deviate from the “user statement”. </text:span></text:p>
      <text:h text:style-name="P29" text:outline-level="3"><text:bookmark-start text:name="__RefHeading___Toc7210_2365495780"/><text:span text:style-name="T25">5. </text:span>Audio-to-Score Alignment<text:bookmark-end text:name="__RefHeading___Toc7210_2365495780"/></text:h>
      <text:p text:style-name="P30"><text:span text:style-name="T54">Something that is not very well documented is the relevance and importance of following along a music score when beat tapping. Besides helping the annotator follow along more accurately the recording, a score might notice the annotator in advance of any bpm or time signature changes. Besides that, when using a Spectrogram-Based view of the recording, one can distinctively align a specific onset to a concrete and exact </text:span><text:span text:style-name="T55">moment in the recording timeline, this is essential to know if a beat is accurately assessed or not.</text:span></text:p>
      <text:p text:style-name="P31"><text:line-break/>Piano Precision [7] is an example of an SV fork that was designed for displaying musical scores alongside audio recordings in a unified graphical interface. This program works surprisingly well for Solo Piano pieces. Now there are two question that arrive from this: </text:p>
      <text:p text:style-name="P32"/>
      <text:p text:style-name="P31">One is that, by following along the music sheet, Beat Tracking autonomously should be as straight forward as making the program align a beat marking with the respective note onsets that are marked in the score. </text:p>
      <text:p text:style-name="P31"/>
      <text:p text:style-name="P33"><text:span text:style-name="T56">The other would be to integrate this idea of Audio-to-Score alignment with a Spectral View of the recording. </text:span><text:span text:style-name="T57">I</text:span><text:span text:style-name="T56">n PianoPrecision this is done via a side-window that displays the a single A4 page </text:span><text:span text:style-name="T57">of the score</text:span><text:span text:style-name="T56">, one at a time. </text:span><text:span text:style-name="T57">When the user hits play, a darkened highlight displays the current playback position in the score, while in another window a spectral view of the audio is is following along the playback position horizontally. </text:span><text:span text:style-name="T58">T</text:span><text:span text:style-name="T57">his allows for a musically natural follow-</text:span><text:span text:style-name="T58">along </text:span><text:span text:style-name="T57">of </text:span><text:span text:style-name="T58">the</text:span><text:span text:style-name="T57"> score, </text:span><text:span text:style-name="T58">mimicking how a musical score is actually read.</text:span><text:span text:style-name="T57"> </text:span><text:span text:style-name="T58">However, </text:span><text:span text:style-name="T57">for audio analysis and visualization </text:span><text:span text:style-name="T58">purposes</text:span><text:span text:style-name="T57">, it could be beneficial for the score to </text:span><text:span text:style-name="T58">be </text:span><text:span text:style-name="T57">aligned </text:span><text:span text:style-name="T58">and viewed along side the playback position, meaning, horizontally and with note onsets that are aligned with their respective absolute position in the timeline. For BT this could allow the user to “grab a beat” and position it on the </text:span><text:span text:style-name="T59">it’s </text:span><text:span text:style-name="T58">corresponding position on top of the spectogram representation. </text:span><text:span text:style-name="T59">Also this could be beneficial for more easily detecting beats that should be shifted.</text:span></text:p>
      <text:p text:style-name="P34"/>
      <text:h text:style-name="P35" text:outline-level="3"><text:bookmark-start text:name="__RefHeading___Toc7212_2365495780"/><text:span text:style-name="T60">6. </text:span><text:span text:style-name="T61">Spectogram Relevance in BT</text:span><text:bookmark-end text:name="__RefHeading___Toc7212_2365495780"/></text:h>
      <text:p text:style-name="P6"><text:span text:style-name="T62">Yamamoto’s Human-In-the-Loop proposal [2] seems to be a step in the right direction for a BT UI. However, </text:span>a flaw with his paper is, that it fails to mention how a spectrogram<text:span text:style-name="T63">s </text:span>can be beneficial as opposed to the more conventional waveform <text:span text:style-name="T63">representations</text:span>, for the act of beat tracking. While a waveform representation can be useful for <text:span text:style-name="T63">identifying transients and general differences in energy <text:s/>along audio file. Spectograms can besides that, represent more accurately information related with spectral energy in time. A clear example of this would be: In a waveform, one can distinguish a <text:s/></text:span><text:span text:style-name="T64">ff</text:span><text:span text:style-name="T63"> section of from a </text:span><text:span text:style-name="T64">pp</text:span><text:span text:style-name="T63"> in a recording. In a spectogram, one can not only distinguish these, but also understand if </text:span><text:span text:style-name="T65">a particular section </text:span><text:span text:style-name="T63">would be chord hit, or a</text:span><text:span text:style-name="T65">n</text:span><text:span text:style-name="T63"> </text:span><text:span text:style-name="T64">arpeggio, </text:span><text:span text:style-name="T65">along side noticing where these note onsets would be located pitch wise. </text:span><text:span text:style-name="T66">Research Questions</text:span></text:p>
      <text:p text:style-name="P6">With this, there are a couple of research question that summarize the problems that we intend to tackle:</text:p>
      <text:list text:style-name="L5">
        <text:list-item>
          <text:p text:style-name="P36">How can we improve the accuracy and efficiency <text:span text:style-name="T67">of contemporary beat annotation workflows?</text:span></text:p>
        </text:list-item>
        <text:list-item>
          <text:p text:style-name="P36">How can we make an effective music score representation, that can be aligned to show notes in their absolute time positions?</text:p>
        </text:list-item>
        <text:list-item>
          <text:p text:style-name="P36">How can we make <text:span text:style-name="T68">the </text:span>align<text:span text:style-name="T68">ment between music score and</text:span> <text:span text:style-name="T68">the </text:span>spectogram <text:span text:style-name="T68">representation</text:span> of <text:span text:style-name="T68">a</text:span> recording?</text:p>
        </text:list-item>
      </text:list>
      <text:h text:style-name="P10" text:outline-level="2"><text:bookmark-start text:name="__RefHeading___Toc9357_2365495780"/>State of the Art<text:bookmark-end text:name="__RefHeading___Toc9357_2365495780"/></text:h>
      <text:h text:style-name="P19" text:outline-level="3">Sonic Visualizer (SV)</text:h>
      <text:p text:style-name="P6"/>
      <text:h text:style-name="P37" text:outline-level="3">Yamamoto’s HIL Approach</text:h>
      <text:p text:style-name="P38"/>
      <text:h text:style-name="P39" text:outline-level="3"><text:span text:style-name="T69">Shift If You Ca</text:span>n</text:h>
      <text:p text:style-name="P40"/>
      <text:h text:style-name="P41" text:outline-level="3">PianoPrecision</text:h>
      <text:p text:style-name="P40"/>
      <text:h text:style-name="P42" text:outline-level="2"><text:bookmark-start text:name="__RefHeading___Toc9359_2365495780"/>Work Plan<text:bookmark-end text:name="__RefHeading___Toc9359_2365495780"/></text:h>
      <text:h text:style-name="P42" text:outline-level="2"><text:bookmark-start text:name="__RefHeading___Toc9361_2365495780"/>Bibliography<text:bookmark-end text:name="__RefHeading___Toc9361_2365495780"/></text:h>
      <text:p text:style-name="P43">[1] E. W. Large and J. F. Kolen, “Resonance and the perception of musical meter” Conn. Sci., vol. 6, no. 2-3, pp. 177–208, 1994.</text:p>
      <text:p text:style-name="P43">[2] Yamamoto, K. (2021). "Human-in-the-Loop Adaptation for Interactive Musical Beat Tracking." In Proceedings of the 22nd International Society for Music Information Retrieval Conference (ISMIR). </text:p>
      <text:p text:style-name="P43">[3] Desblancs, D., Lostanlen, V., &amp; Hennequin, R. (2023). "Zero-Note Samba: Self-Supervised Beat Tracking." IEEE/ACM Transactions on Audio, Speech, and Language Processing, vol. 31, pp. 2922–2934.</text:p>
      <text:p text:style-name="P43">[4] Foscarin, F., Schlüter, J., &amp; Widmer, G. (2024). "Beat this! Accurate beat tracking without DBN postprocessing". In Proceedings of the 25th International Society for Music Information Retrieval Conference (ISMIR 2024), San Francisco, United States</text:p>
      <text:p text:style-name="P43">[5] Goto, M., Yoshii, K., Fujihara, H., Mauch, M., &amp; Nakano, T. (2011). "Songle: A Web Service for Active Music Listening Improved by User Contributions." In Proceedings of the 12th International Society for Music Information Retrieval Conference (ISMIR).</text:p>
      <text:p text:style-name="P43">[6] Ballester, C., et al. (2025). "Interacting with annotated and synchronized music corpora on the Dezrann web platform." Transactions of the International Society for Music Information Retrieval (TISMIR).</text:p>
      <text:p text:style-name="P43">[7] Jiang, Y., Weigl, D. M., &amp; Goebl, W. (2025). "Piano Precision: Advancing Music Performance Analysis by Integrating User-Correctable Audio-to-Score Alignment." In Proceedings of the International Computer Music Conference (ICMC).</text:p>
      <text:p text:style-name="P43">[8] Large, E. W. (1996). "Modeling Beat Perception with a Nonlinear Oscillator." In Proceedings of the 18th Annual Conference of the Cognitive Science Society.</text:p>
      <text:p text:style-name="P43">[9] Sá Pinto, A., Domingues, I., &amp; Davies, M. E. P. (2020). "Shift If You Can: Counting and Visualising Correction Operations for Beat Tracking Evaluation." In Extended Abstracts for the Late-Breaking Demo Session of the 21st International Society for Music Information Retrieval Conference (ISMIR)</text:p>
      <text:p text:style-name="P43">[10] Driedger, J., Schreiber, H., de Haas, W. B., &amp; Müller, M. (2019). "Towards Automatically Correcting Tapped Beat Annotations for Music Recordings." In Proceedings of the 20th International Society for Music Information Retrieval Conference (ISMIR)</text:p>
      <text:p text:style-name="P43">[11] Dixon, S. (2001). "An interactive beat tracking and visualisation system." In Proceedings of the International Computer Music Conference (ICMC), Havana, Cuba, pp. 215–218.</text:p>
      <text:p text:style-name="P43">[12] Stark, A. M., Davies, M. E. P., &amp; Plumbley, M. D. (2009). "Real-time beat-synchronous analysis of musical audio." In Proceedings of the 12th International Conference on Digital Audio Effects (DAFx-09), Como, Italy.</text:p>
      <text:p text:style-name="P43">[13] Oliveira, J. L., Gouyon, F., Martins, L. G., &amp; Reis, L. P. (2010). "IBT: A Real-Time Tempo and Beat Tracking System." In Proceedings of the 11th International Society for Music Information Retrieval Conference (ISMI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Times New Roman1" fo:font-family="'Times New Roman'" style:font-style-name="Bold"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faf0e6" style:writing-mode="lr-tb" style:layout-grid-color="#c0c0c0" style:layout-grid-lines="20" style:layout-grid-base-height="0.278in" style:layout-grid-ruby-height="0.139in" style:layout-grid-mode="none" style:layout-grid-ruby-below="false" style:layout-grid-print="false" style:layout-grid-display="false" draw:fill="solid" draw:fill-color="#faf0e6"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af0e6"/>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0</text:page-number></text:p>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5T20:21:17.668759000</meta:creation-date>
    <dc:date>2026-02-06T15:30:07.806316000</dc:date>
    <meta:editing-duration>PT4H56M27S</meta:editing-duration>
    <meta:editing-cycles>3</meta:editing-cycles>
    <meta:generator>LibreOffice/25.2.2.2$MacOSX_X86_64 LibreOffice_project/7370d4be9e3cf6031a51beef54ff3bda878e3fac</meta:generator>
    <meta:document-statistic meta:table-count="0" meta:image-count="0" meta:object-count="0" meta:page-count="12" meta:paragraph-count="81" meta:word-count="2587" meta:character-count="15864" meta:non-whitespace-character-count="13343"/>
  </office:meta>
</office:document-meta>
</file>