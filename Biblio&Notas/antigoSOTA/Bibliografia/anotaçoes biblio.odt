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8b19" officeooo:paragraph-rsid="0019e9ef"/>
    </style:style>
    <style:style style:name="P2" style:family="paragraph" style:parent-style-name="Standard">
      <style:text-properties fo:font-size="11pt" fo:font-weight="normal" officeooo:rsid="0019e9ef" officeooo:paragraph-rsid="0019e9ef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4pt" officeooo:rsid="000f8b19" officeooo:paragraph-rsid="00104942" style:font-size-asian="4pt" style:font-size-complex="4pt"/>
    </style:style>
    <style:style style:name="P4" style:family="paragraph" style:parent-style-name="Standard">
      <style:text-properties fo:font-size="11pt" officeooo:rsid="00104942" officeooo:paragraph-rsid="00104942" style:font-size-asian="9.60000038146973pt" style:font-size-complex="11pt"/>
    </style:style>
    <style:style style:name="P5" style:family="paragraph" style:parent-style-name="Standard">
      <style:text-properties style:font-name="NimbusRomNo9L" fo:font-size="10pt" fo:font-weight="normal" officeooo:rsid="0011ab22" officeooo:paragraph-rsid="0011ab22" style:font-size-asian="24pt" style:font-weight-asian="normal" style:font-size-complex="24pt" style:font-weight-complex="normal"/>
    </style:style>
    <style:style style:name="P6" style:family="paragraph" style:parent-style-name="Standard">
      <style:text-properties style:font-name="NimbusRomNo9L" fo:font-size="10pt" fo:font-weight="normal" officeooo:rsid="0011ab22" officeooo:paragraph-rsid="00134661" style:font-size-asian="24pt" style:font-weight-asian="normal" style:font-size-complex="24pt" style:font-weight-complex="normal"/>
    </style:style>
    <style:style style:name="P7" style:family="paragraph" style:parent-style-name="Standard">
      <style:text-properties style:font-name="NimbusRomNo9L" fo:font-size="10pt" fo:font-weight="normal" officeooo:rsid="00134661" officeooo:paragraph-rsid="00134661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NimbusRomNo9L" fo:font-size="10pt" officeooo:rsid="00134661" officeooo:paragraph-rsid="0013f178" style:font-size-asian="24pt" style:font-size-complex="24p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style:font-name="NimbusRomNo9L" fo:font-size="10pt" officeooo:rsid="00134661" style:font-size-asian="24pt" style:font-size-complex="24pt"/>
    </style:style>
    <style:style style:name="P10" style:family="paragraph" style:parent-style-name="Text_20_body" style:list-style-name="L1">
      <style:text-properties style:font-name="NimbusRomNo9L" fo:font-size="10pt" officeooo:rsid="00134661" style:font-size-asian="24pt" style:font-size-complex="24pt"/>
    </style:style>
    <style:style style:name="P11" style:family="paragraph" style:parent-style-name="Text_20_body">
      <style:text-properties style:font-name="NimbusRomNo9L" fo:font-size="10pt" officeooo:rsid="00134661" style:font-size-asian="24pt" style:font-size-complex="24pt"/>
    </style:style>
    <style:style style:name="P12" style:family="paragraph" style:parent-style-name="Text_20_body">
      <style:text-properties style:font-name="NimbusRomNo9L" fo:font-size="10pt" officeooo:rsid="00134661" officeooo:paragraph-rsid="0013f178" style:font-size-asian="24pt" style:font-size-complex="24pt"/>
    </style:style>
    <style:style style:name="P13" style:family="paragraph" style:parent-style-name="Text_20_body">
      <style:text-properties style:font-name="NimbusRomNo9L" fo:font-size="10pt" officeooo:rsid="00134661" officeooo:paragraph-rsid="00162aa3" style:font-size-asian="24pt" style:font-size-complex="24pt"/>
    </style:style>
    <style:style style:name="P14" style:family="paragraph" style:parent-style-name="Text_20_body">
      <style:text-properties style:font-name="NimbusRomNo9L" fo:font-size="10pt" officeooo:rsid="00162aa3" officeooo:paragraph-rsid="00162aa3" style:font-size-asian="24pt" style:font-size-complex="24pt"/>
    </style:style>
    <style:style style:name="P15" style:family="paragraph" style:parent-style-name="Standard">
      <style:text-properties style:font-name="NimbusRomNo9L" fo:font-size="10pt" fo:font-weight="normal" officeooo:rsid="00134661" officeooo:paragraph-rsid="0013f178" style:font-size-asian="24pt" style:font-weight-asian="normal" style:font-size-complex="24pt" style:font-weight-complex="normal"/>
    </style:style>
    <style:style style:name="P16" style:family="paragraph" style:parent-style-name="Standard">
      <style:text-properties officeooo:rsid="00104942" officeooo:paragraph-rsid="00104942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9e9ef" style:font-size-asian="24pt" style:font-weight-asian="bold" style:font-size-complex="24pt" style:font-weight-complex="bold"/>
    </style:style>
    <style:style style:name="T3" style:family="text">
      <style:text-properties fo:font-size="11pt" fo:font-weight="normal" officeooo:rsid="0019e9ef" style:font-size-asian="9.60000038146973pt" style:font-weight-asian="normal" style:font-size-complex="11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4pt" style:text-underline-style="solid" style:text-underline-width="auto" style:text-underline-color="font-color" fo:font-weight="normal" style:font-size-asian="4pt" style:font-weight-asian="normal" style:font-size-complex="4pt" style:font-weight-complex="normal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NimbusRomNo9L" fo:font-size="10pt" fo:font-weight="normal" style:font-size-asian="24pt" style:font-weight-asian="normal" style:font-size-complex="24pt" style:font-weight-complex="normal"/>
    </style:style>
    <style:style style:name="T11" style:family="text">
      <style:text-properties style:font-name="NimbusRomNo9L" fo:font-size="10pt" fo:font-weight="normal" officeooo:rsid="0011ab22" style:font-size-asian="24pt" style:font-weight-asian="normal" style:font-size-complex="24pt" style:font-weight-complex="normal"/>
    </style:style>
    <style:style style:name="T12" style:family="text">
      <style:text-properties officeooo:rsid="00134661"/>
    </style:style>
    <style:style style:name="T13" style:family="text">
      <style:text-properties fo:font-weight="normal" officeooo:rsid="0013f178" style:font-weight-asian="normal" style:font-weight-complex="normal"/>
    </style:style>
    <style:style style:name="T14" style:family="text">
      <style:text-properties officeooo:rsid="0013f178"/>
    </style:style>
    <style:style style:name="T15" style:family="text">
      <style:text-properties fo:font-style="italic" officeooo:rsid="0013f178" style:font-style-asian="italic" style:font-style-complex="italic"/>
    </style:style>
    <style:style style:name="T16" style:family="text">
      <style:text-properties fo:font-style="normal" officeooo:rsid="0013f178" style:font-style-asian="normal" style:font-style-complex="normal"/>
    </style:style>
    <style:style style:name="T17" style:family="text">
      <style:text-properties fo:font-style="normal" officeooo:rsid="0014f327" style:font-style-asian="normal" style:font-style-complex="normal"/>
    </style:style>
    <style:style style:name="T18" style:family="text">
      <style:text-properties officeooo:rsid="00162aa3"/>
    </style:style>
    <style:style style:name="T19" style:family="text">
      <style:text-properties fo:font-size="24pt" officeooo:rsid="000f8b19" style:font-size-asian="24pt" style:font-size-complex="24pt"/>
    </style:style>
    <style:style style:name="T20" style:family="text">
      <style:text-properties officeooo:rsid="000f8b1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/text:span><text:span text:style-name="T2">Conhecer SV</text:span></text:p>
      <text:p text:style-name="P2">1) PERCEBER FALHAS NO SV</text:p>
      <text:p text:style-name="P2">2)PIANO PRECISION </text:p>
      <text:p text:style-name="P1"><text:span text:style-name="T3">3)STATE OF THE ARTŒ</text:span><text:span text:style-name="T1"><text:line-break/><text:line-break/><text:line-break/>Resumo bibliografia tese<text:line-break/><text:line-break/></text:span><text:span text:style-name="T4"><text:line-break/></text:span><text:span text:style-name="T5">Reconstruct: How To Improve Tempo, Beat, and Downbeat Estimation. <text:line-break/></text:span><text:a xlink:type="simple" xlink:href="https://program.ismir2020.net/static/final_papers/223.pdf" text:style-name="Internet_20_link" text:visited-style-name="Visited_20_Internet_20_Link"><text:span text:style-name="T6">Böck, S., &amp; Davies, M. E. P. (2020). Deconstruct, Analyse, Reconstruct: How To Improve Tempo, Beat, and Downbeat Estimation. Proceedings of the 21st International Society for Music Information Retrieval Conference (ISMIR), 574–582.</text:span></text:a><text:span text:style-name="T7"><text:line-break/></text:span></text:p>
      <text:p text:style-name="P3"/>
      <text:p text:style-name="P4">Eles pegaram num sistema de análise rítmica AI (deep neural network), desconstruiram e analisaram esse sistema com o objetivo de perceber melhor as suas partes para depois reconstruir o sistema com melhorias. Após isso, eles verificaram uma melhoria de 6%. <text:span text:style-name="T8"><text:line-break/><text:line-break/></text:span><text:span text:style-name="T9">Tatu</text:span><text:span text:style-name="T10">s é </text:span><text:span text:style-name="T11">o ritmo a que uma pessoa inconscientemente “bate o pé”. O tatus em sí não descreve a métrica da música mas descreve o seu tempo.<text:line-break/><text:line-break/>A métrica requer 3 niveis de preceção:</text:span></text:p>
      <text:p text:style-name="P5"><text:tab/>1 - Reconhecimento do compasso (ou agrupamento de batimentos/tatus).</text:p>
      <text:p text:style-name="P5"><text:tab/>2 - <text:s/>O tatus em sí ou o tempo/bpm da música.</text:p>
      <text:p text:style-name="P6"><text:tab/>3 - A subdivisão do tempo. <text:line-break/><text:line-break/><text:span text:style-name="T12">Os algoritmos de analise de beat caem numa de 2 categorias:</text:span></text:p>
      <text:p text:style-name="P7"><text:tab/>1 – <text:span text:style-name="T8">Single-level</text:span> beat Tracking, apenas procuram detetar a posição de beats.</text:p>
      <text:p text:style-name="P7"><text:tab/>2 – <text:span text:style-name="T8">Multi-level</text:span>, algoritmos que deteam downbeats/métricas/compassos. Estes algoritmos requerem sempre uma análise extra em paralelo com o beat tracking. Porque para detatar o downbeat é preciso analisar de alguma forma como os beats relacionam entre sí.</text:p>
      <text:p text:style-name="P7"/>
      <text:p text:style-name="P8"><text:span text:style-name="T13"><text:tab/>T</text:span>he paper mentions different approaches that use multiple levels:</text:p>
      <text:list text:style-name="L1">
        <text:list-item>
          <text:p text:style-name="P9"><text:span text:style-name="Strong_20_Emphasis">Beat + Downbeat</text:span> : Find all the beats first, then determine which ones are downbeats </text:p>
        </text:list-item>
        <text:list-item>
          <text:p text:style-name="P9"><text:span text:style-name="Strong_20_Emphasis">Tatum + Downbeat</text:span>: Use the fastest regular pulse (tatum - like subdivisions) to help find downbeats </text:p>
        </text:list-item>
        <text:list-item>
          <text:p text:style-name="P10"><text:span text:style-name="Strong_20_Emphasis">Contrast between both</text:span> : Compare beat and tatum levels to identify downbeats </text:p>
        </text:list-item>
      </text:list>
      <text:p text:style-name="P11"><text:span text:style-name="Strong_20_Emphasis">Tatum</text:span> = the fastest level of regular subdivision you can perceive.</text:p>
      <text:p text:style-name="P12"><text:s/><text:tab/><text:span text:style-name="T14">O autor ainda denota um metodo especifico “</text:span>Jehan which relies instead on onset- synchronous analysis.”, <text:span text:style-name="T14">ou seja é um método que analisa onde eventos musicais (notas, sons) começam, independentemente da </text:span><text:span text:style-name="T15">beat structure</text:span><text:span text:style-name="T16">.<text:line-break/><text:line-break/><text:tab/></text:span><text:span text:style-name="T17">O autor ainda menciona dois metodos de analise de beat/tempo. Um é analisa a música/ficheiro audio na integra e tenta atribuir a métrica atraves da analise dos beats detetados.</text:span></text:p>
      <text:p text:style-name="P11"><text:soft-page-break/><text:tab/></text:p>
      <text:p text:style-name="P13"><text:tab/><text:span text:style-name="T18">Um defeito comum entre muitos dos sistemas de beat tracking é que apenas funcionam se tiverem drums/ parte rítmica explicita. Aka, musica sem bateria é mais dificil de detetar tempos. Por isso, os autores sublinham a importancia da analise harmónica da musica pois mudanças de acorde/harmonia acontecem muitas vezes em downbeat ou “na grelha”.</text:span></text:p>
      <text:p text:style-name="P14"/>
      <text:p text:style-name="P14"><text:s text:c="2"/></text:p>
      <text:p text:style-name="P15"><text:line-break/></text:p>
      <text:p text:style-name="P5"/>
      <text:p text:style-name="P5"/>
      <text:p text:style-name="P16"><text:span text:style-name="T19"><text:line-break/><text:line-break/></text:span><text:span text:style-name="T20"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4:37:18.837696000</meta:creation-date>
    <dc:date>2025-11-20T12:23:59.434507000</dc:date>
    <meta:editing-duration>PT41M</meta:editing-duration>
    <meta:editing-cycles>3</meta:editing-cycles>
    <meta:generator>LibreOffice/25.2.2.2$MacOSX_X86_64 LibreOffice_project/7370d4be9e3cf6031a51beef54ff3bda878e3fac</meta:generator>
    <meta:document-statistic meta:table-count="0" meta:image-count="0" meta:object-count="0" meta:page-count="2" meta:paragraph-count="21" meta:word-count="397" meta:character-count="2518" meta:non-whitespace-character-count="2103"/>
  </office:meta>
</office:document-meta>
</file>