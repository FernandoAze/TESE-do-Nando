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BB8000006985BFDB5D2.png" manifest:media-type="image/png"/>
  <manifest:file-entry manifest:full-path="Pictures/10000001000005930000032BD4CE59C2.png" manifest:media-type="image/png"/>
  <manifest:file-entry manifest:full-path="Pictures/10000000000006400000029D9FACA875.jpg" manifest:media-type="image/jpeg"/>
  <manifest:file-entry manifest:full-path="Pictures/10000001000005A000000384E6C484E5.png" manifest:media-type="image/png"/>
  <manifest:file-entry manifest:full-path="Pictures/10000001000005A000000384FD62B6E8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fo:min-height="3.075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style:protect="position size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text-properties fo:color="#ff8000" loext:opacity="100%" fo:background-color="#ff8000"/>
    </style:style>
    <style:style style:name="P2" style:family="paragraph">
      <loext:graphic-properties draw:fill-color="#ffffff"/>
      <style:text-properties fo:font-size="22pt"/>
    </style:style>
    <style:style style:name="P3" style:family="paragraph">
      <loext:graphic-properties draw:fill-color="#ffffff"/>
    </style:style>
    <style:style style:name="P4" style:family="paragraph">
      <style:text-properties fo:color="#ffffff" loext:opacity="100%"/>
    </style:style>
    <style:style style:name="P5" style:family="paragraph">
      <style:paragraph-properties fo:margin-left="0cm" fo:margin-right="0cm" fo:margin-top="0cm" fo:margin-bottom="0.373cm" fo:text-align="left" fo:text-indent="0cm" style:text-autospace="ideograph-alpha" style:punctuation-wrap="hanging"/>
    </style:style>
    <style:style style:name="P6" style:family="paragraph">
      <style:text-properties fo:color="#ffffff" loext:opacity="100%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color="#ff8000" loext:opacity="100%"/>
    </style:style>
    <style:style style:name="T2" style:family="text">
      <style:text-properties fo:color="#eeeeee" loext:opacity="100%"/>
    </style:style>
    <style:style style:name="T3" style:family="text">
      <style:text-properties fo:font-size="22pt"/>
    </style:style>
    <style:style style:name="T4" style:family="text">
      <style:text-properties fo:color="#ffffff" loext:opacity="100%"/>
    </style:style>
    <style:style style:name="T5" style:family="text">
      <style:text-properties fo:color="#ffffff" loext:opacity="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color="#ffffff" loext:opacity="100%" fo:font-weight="bold" style:font-weight-asian="bold" style:font-weight-complex="bold"/>
    </style:style>
    <style:style style:name="T7" style:family="text">
      <style:text-properties fo:color="#ffffff" loext:opacity="100%" fo:font-weight="normal" style:font-weight-asian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loext:opacity="100%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075cm" svg:x="1cm" svg:y="4.727cm" presentation:class="title" presentation:user-transformed="true">
          <draw:text-box>
            <text:p><text:span text:style-name="T1">Intermediate Presentation</text:span><text:span text:style-name="T1"><text:line-break/></text:span><text:span text:style-name="T1">- </text:span><text:span text:style-name="T2">Interactive Score Annotation for MIR - </text:span></text:p>
          </draw:text-box>
        </draw:frame>
        <draw:frame presentation:style-name="pr2" draw:text-style-name="P2" draw:layer="layout" svg:width="26cm" svg:height="4.125cm" svg:x="1.27cm" svg:y="10.795cm" presentation:class="subtitle" presentation:user-transformed="true">
          <draw:text-box>
            <text:p><text:span text:style-name="T3">Fernando Perry de Azeredo</text:span></text:p>
            <text:p><text:span text:style-name="T3"><text:a xlink:href="mailto:up202308655@up.pt" xlink:type="simple">up202308655@up.pt</text:a></text:span></text:p>
            <text:p><text:span text:style-name="T3">FEUP 2026 </text:span></text:p>
          </draw:text-box>
        </draw:frame>
        <presentation:notes draw:style-name="dp2">
          <draw:page-thumbnail draw:style-name="gr1" draw:layer="layout" svg:width="17cm" svg:height="9.56cm" svg:x="2cm" svg:y="2.419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.286cm" svg:y="0.627cm" presentation:class="title" presentation:user-transformed="true">
          <draw:text-box>
            <text:p><text:span text:style-name="T4">Thesis &amp; Dissertation Goal</text:span></text:p>
          </draw:text-box>
        </draw:frame>
        <draw:frame presentation:style-name="pr5" draw:text-style-name="P4" draw:layer="layout" svg:width="25.4cm" svg:height="10.5cm" svg:x="0.635cm" svg:y="3.81cm" presentation:class="outline" presentation:user-transformed="true">
          <draw:text-box>
            <text:list text:style-name="L2">
              <text:list-item>
                <text:p><text:span text:style-name="T4">To create a new Beat Annotation GUI tool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list text:style-name="L2">
              <text:list-header>
                <text:p text:style-name="P5"><text:span text:style-name="T4">BeatMapJS </text:span><text:span text:style-name="T5">(09/2025 - 02/2026 )</text:span></text:p>
              </text:list-header>
            </text:list>
          </draw:text-box>
        </draw:frame>
        <draw:frame presentation:style-name="pr8" draw:text-style-name="P6" draw:layer="layout" svg:width="12.687cm" svg:height="10.5cm" svg:x="1cm" svg:y="4.125cm" presentation:class="outline">
          <draw:text-box>
            <text:list text:style-name="L2">
              <text:list-item>
                <text:p><text:span text:style-name="T6">Goal:</text:span><text:span text:style-name="T7"> <text:s/>Make a basic beat annotation GUI tool</text:span></text:p>
              </text:list-item>
              <text:list-item>
                <text:p><text:span text:style-name="T6">Tools used</text:span><text:span text:style-name="T7">: JS/HTML based, BeatThis!, Wavesurfer.JS, </text:span></text:p>
              </text:list-item>
              <text:list-item>
                <text:p><text:span text:style-name="T6">Developed Features</text:span><text:span text:style-name="T7">: </text:span></text:p>
                <text:list>
                  <text:list-item>
                    <text:p><text:span text:style-name="T7">Interactive Spectogram</text:span></text:p>
                  </text:list-item>
                  <text:list-item>
                    <text:p><text:span text:style-name="T7">Web-based interface in JS/HTML</text:span></text:p>
                  </text:list-item>
                  <text:list-item>
                    <text:p><text:span text:style-name="T7">Beat This! Integration</text:span></text:p>
                  </text:list-item>
                  <text:list-item>
                    <text:p><text:span text:style-name="T7">Beat Annotation basic tools</text:span></text:p>
                  </text:list-item>
                  <text:list-item>
                    <text:p><text:span text:style-name="T7">Region Annotation</text:span></text:p>
                  </text:list-item>
                  <text:list-item>
                    <text:p><text:span text:style-name="T7">Table for editing tempo annotations and descriptions</text:span></text:p>
                  </text:list-item>
                  <text:list-item>
                    <text:p><text:span text:style-name="T7">Ability to import/export beat annotations to .txt. <text:s/></text:span></text:p>
                  </text:list-item>
                </text:list>
              </text:list-item>
              <text:list-item>
                <text:p><text:span text:style-name="T6">Conclusion:</text:span><text:span text:style-name="T7"> No significant contribution for MIR. <text:s text:c="2"/></text:span></text:p>
              </text:list-item>
            </text:list>
          </draw:text-box>
        </draw:frame>
        <draw:frame draw:name="Media object 2" draw:style-name="gr2" draw:layer="layout" svg:width="13.314cm" svg:height="8.32cm" svg:x="13.991cm" svg:y="4.445cm" presentation:class="object" presentation:user-transformed="true">
          <draw:plugin xlink:href="../../../../../Desktop/Screen%20Recording%202026-04-07%20at%2013.09.41.mov" xlink:type="simple" xlink:show="embed" xlink:actuate="onLoad" draw:mime-type="video/quicktime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list text:style-name="L2">
              <text:list-header>
                <text:p text:style-name="P5"><text:span text:style-name="T4">MEI-Basic-Edit <text:s/></text:span><text:span text:style-name="T5">(02/2025 - 03/2026 )</text:span></text:p>
              </text:list-header>
            </text:list>
          </draw:text-box>
        </draw:frame>
        <draw:frame presentation:style-name="pr8" draw:text-style-name="P6" draw:layer="layout" svg:width="12.687cm" svg:height="10.5cm" svg:x="1cm" svg:y="4.125cm" presentation:class="outline">
          <draw:text-box>
            <text:list text:style-name="L2">
              <text:list-item>
                <text:p><text:span text:style-name="T6">Goal: </text:span><text:span text:style-name="T7">Understand how MEI scores can be manipulated. </text:span></text:p>
              </text:list-item>
              <text:list-item>
                <text:p><text:span text:style-name="T6">Tools Used: </text:span><text:span text:style-name="T7">JS/HTML, Verovio, SVG, MEI format. </text:span></text:p>
              </text:list-item>
              <text:list-item>
                <text:p><text:span text:style-name="T6">Developed Features:</text:span><text:span text:style-name="T7"> </text:span></text:p>
                <text:list>
                  <text:list-item>
                    <text:p><text:span text:style-name="T7">MEI Score display. </text:span></text:p>
                  </text:list-item>
                  <text:list-item>
                    <text:p><text:span text:style-name="T7">XML text editor. </text:span></text:p>
                  </text:list-item>
                </text:list>
              </text:list-item>
              <text:list-item>
                <text:p><text:span text:style-name="T6">Conclusion:</text:span><text:span text:style-name="T7"> Failed project, however gave me insight on MEI format and Verovio.</text:span></text:p>
              </text:list-item>
            </text:list>
          </draw:text-box>
        </draw:frame>
        <draw:frame draw:style-name="gr3" draw:text-style-name="P7" draw:layer="layout" svg:width="12.687cm" svg:height="7.928cm" svg:x="14.321cm" svg:y="5.411cm" presentation:class="graphic">
          <draw:image xlink:href="Pictures/10000001000005A000000384FD62B6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list text:style-name="L2">
              <text:list-header>
                <text:p text:style-name="P5"><text:span text:style-name="T4">Piano-Precision Fork <text:s/></text:span><text:span text:style-name="T5">(03/2025 - 03/2026 )</text:span></text:p>
              </text:list-header>
            </text:list>
          </draw:text-box>
        </draw:frame>
        <draw:frame presentation:style-name="pr8" draw:text-style-name="P6" draw:layer="layout" svg:width="12.687cm" svg:height="10.5cm" svg:x="1cm" svg:y="4.125cm" presentation:class="outline">
          <draw:text-box>
            <text:list text:style-name="L2">
              <text:list-item>
                <text:p><text:span text:style-name="T6">Goal</text:span><text:span text:style-name="T7">: To make a Beat Annotation fork of Sonic Visualizer</text:span></text:p>
              </text:list-item>
              <text:list-item>
                <text:p><text:span text:style-name="T6">Developed Features</text:span><text:span text:style-name="T7">: Beat This! Integration, Automatic Score follow along.</text:span></text:p>
              </text:list-item>
              <text:list-item>
                <text:p><text:span text:style-name="T6">Conclusion</text:span><text:span text:style-name="T7">: No significant academic contribution.</text:span></text:p>
              </text:list-item>
            </text:list>
          </draw:text-box>
        </draw:frame>
        <draw:frame draw:style-name="gr3" draw:text-style-name="P7" draw:layer="layout" svg:width="12.687cm" svg:height="7.928cm" svg:x="14.321cm" svg:y="5.411cm" presentation:class="graphic">
          <draw:image xlink:href="Pictures/10000001000005A000000384E6C484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3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list text:style-name="L2">
              <text:list-header>
                <text:p text:style-name="P5"><text:span text:style-name="T8">Score-Allignment.py </text:span><text:span text:style-name="T9">(03/2025 - 03/2026 )</text:span></text:p>
              </text:list-header>
            </text:list>
          </draw:text-box>
        </draw:frame>
        <draw:frame presentation:style-name="pr8" draw:text-style-name="P4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><text:span text:style-name="T4">Goal: </text:span><text:span text:style-name="T7"><text:s/>Spectogram and Score Visualizer in python</text:span></text:p>
              </text:list-item>
              <text:list-item>
                <text:p><text:span text:style-name="T4">Tools used: </text:span><text:span text:style-name="T7">Modusa (matplot lib) </text:span></text:p>
              </text:list-item>
              <text:list-item>
                <text:p><text:span text:style-name="T4">Developed Features:</text:span></text:p>
                <text:p><text:span text:style-name="T7">Navigational Spectrogram </text:span></text:p>
              </text:list-item>
              <text:list-item>
                <text:p><text:span text:style-name="T4">Conclusion: </text:span><text:span text:style-name="T7">Spent way to much <text:s/>time trying to make the spectogram better.</text:span></text:p>
              </text:list-item>
            </text:list>
          </draw:text-box>
        </draw:frame>
        <draw:frame draw:name="Media object 1" draw:style-name="gr2" draw:layer="layout" svg:width="12.687cm" svg:height="7.928cm" svg:x="14.322cm" svg:y="5.411cm">
          <draw:plugin xlink:href="../../../../../Desktop/BeatAnnotationGUI_PY.mov" xlink:type="simple" xlink:show="embed" xlink:actuate="onLoad" draw:mime-type="video/quicktime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3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list text:style-name="L2">
              <text:list-header>
                <text:p text:style-name="P5"><text:span text:style-name="T8">Score-Allignment.js </text:span><text:span text:style-name="T9">(03/2025 - 03/2026 )</text:span></text:p>
              </text:list-header>
            </text:list>
          </draw:text-box>
        </draw:frame>
        <draw:frame presentation:style-name="pr8" draw:text-style-name="P4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><text:span text:style-name="T4">Goal: </text:span><text:span text:style-name="T7"><text:s text:c="2"/>Redo in JS</text:span></text:p>
              </text:list-item>
              <text:list-item>
                <text:p><text:span text:style-name="T4">Tools used: </text:span><text:span text:style-name="T7">Wavesuurfer.js and</text:span><text:span text:style-name="T4"> </text:span><text:span text:style-name="T7">Verovio.</text:span></text:p>
              </text:list-item>
              <text:list-item>
                <text:p><text:span text:style-name="T4">Developed Features: </text:span><text:span text:style-name="T7"><text:s/></text:span></text:p>
                <text:p><text:span text:style-name="T7"><text:s/>MEI visualizer</text:span></text:p>
                <text:p><text:span text:style-name="T7">Ability to make time markers within .mei score.</text:span></text:p>
              </text:list-item>
              <text:list-item>
                <text:p><text:span text:style-name="T4">Conclusion: </text:span><text:span text:style-name="T7">No significant academic <text:s/>addition. </text:span></text:p>
              </text:list-item>
            </text:list>
          </draw:text-box>
        </draw:frame>
        <draw:frame draw:style-name="gr4" draw:text-style-name="P7" draw:layer="layout" svg:width="12.7cm" svg:height="7.217cm" svg:x="14.605cm" svg:y="5.483cm">
          <draw:image xlink:href="Pictures/10000001000005930000032BD4CE59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3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list text:style-name="L2">
              <text:list-header>
                <text:p text:style-name="P5"><text:span text:style-name="T8">Score-Allignment.js </text:span><text:span text:style-name="T9">(03/2025 - 03/2026 )</text:span></text:p>
              </text:list-header>
            </text:list>
          </draw:text-box>
        </draw:frame>
        <draw:frame presentation:style-name="pr8" draw:text-style-name="P4" draw:layer="layout" svg:width="12.687cm" svg:height="2.86cm" svg:x="1cm" svg:y="4.125cm" presentation:class="outline" presentation:user-transformed="true">
          <draw:text-box>
            <text:list text:style-name="L2">
              <text:list-item>
                <text:p><text:span text:style-name="T4">Goal: </text:span><text:span text:style-name="T7"><text:s text:c="2"/>Make spectogram and score alignment </text:span></text:p>
                <text:p><text:span text:style-name="T4"/></text:p>
              </text:list-item>
            </text:list>
          </draw:text-box>
        </draw:frame>
        <draw:frame draw:style-name="gr4" draw:text-style-name="P7" draw:layer="layout" svg:width="18.415cm" svg:height="7.698cm" svg:x="3.81cm" svg:y="6.985cm">
          <draw:image xlink:href="Pictures/10000000000006400000029D9FACA875.jpg" xlink:type="simple" xlink:show="embed" xlink:actuate="onLoad" draw:mime-type="image/jpeg">
            <text:p/>
          </draw:image>
        </draw:frame>
        <draw:frame presentation:style-name="pr8" draw:text-style-name="P4" draw:layer="layout" svg:width="12.687cm" svg:height="2.86cm" svg:x="13.983cm" svg:y="4.125cm" presentation:class="outline" presentation:user-transformed="true">
          <draw:text-box>
            <text:list text:style-name="L2">
              <text:list-header>
                <text:p><text:span text:style-name="T7"><text:s/></text:span></text:p>
                <text:p><text:span text:style-name="T4"/></text:p>
              </text:list-header>
            </text:list>
          </draw:text-box>
        </draw:frame>
        <draw:frame presentation:style-name="pr8" draw:text-style-name="P4" draw:layer="layout" svg:width="12.687cm" svg:height="2.86cm" svg:x="1.001cm" svg:y="4.125cm" presentation:class="outline" presentation:user-transformed="true">
          <draw:text-box>
            <text:list text:style-name="L2">
              <text:list-item>
                <text:p><text:span text:style-name="T4">Goal: </text:span><text:span text:style-name="T7"><text:s text:c="2"/>Make spectogram and score alignment </text:span></text:p>
                <text:p><text:span text:style-name="T4"/></text:p>
              </text:list-item>
            </text:list>
          </draw:text-box>
        </draw:frame>
        <draw:frame presentation:style-name="pr8" draw:text-style-name="P4" draw:layer="layout" svg:width="12.687cm" svg:height="2.86cm" svg:x="1.001cm" svg:y="4.125cm" presentation:class="outline" presentation:user-transformed="true">
          <draw:text-box>
            <text:list text:style-name="L2">
              <text:list-item>
                <text:p><text:span text:style-name="T4">Goal: </text:span><text:span text:style-name="T7"><text:s text:c="2"/>Make spectogram and score alignment </text:span></text:p>
                <text:p><text:span text:style-name="T4"/></text:p>
              </text:list-item>
            </text:list>
          </draw:text-box>
        </draw:frame>
        <draw:frame presentation:style-name="pr8" draw:text-style-name="P4" draw:layer="layout" svg:width="12.687cm" svg:height="2.86cm" svg:x="1.001cm" svg:y="4.125cm" presentation:class="outline" presentation:user-transformed="true">
          <draw:text-box>
            <text:list text:style-name="L2">
              <text:list-item>
                <text:p><text:span text:style-name="T4">Goal: </text:span><text:span text:style-name="T7"><text:s text:c="2"/>Make spectogram and score alignment 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.286cm" svg:y="0.627cm" presentation:class="title" presentation:user-transformed="true">
          <draw:text-box>
            <text:p><text:span text:style-name="T4">Sota Timeline and Goals</text:span></text:p>
          </draw:text-box>
        </draw:frame>
        <draw:frame presentation:style-name="pr5" draw:text-style-name="P4" draw:layer="layout" svg:width="25.4cm" svg:height="10.5cm" svg:x="0.635cm" svg:y="3.81cm" presentation:class="outline" presentation:user-transformed="true">
          <draw:text-box>
            <text:list text:style-name="L2">
              <text:list-header>
                <text:p text:style-name="P8"><text:line-break/></text:p>
                <text:p/>
              </text:list-header>
            </text:list>
          </draw:text-box>
        </draw:frame>
        <draw:frame draw:style-name="gr4" draw:text-style-name="P7" draw:layer="layout" svg:width="27.99cm" svg:height="15.749cm" svg:x="0.069cm" svg:y="0.038cm">
          <draw:image xlink:href="Pictures/1000000100000BB8000006985BFDB5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4" draw:text-style-name="P4" draw:layer="layout" svg:width="26cm" svg:height="2cm" svg:x="1.286cm" svg:y="0.627cm" presentation:class="title" presentation:user-transformed="true">
          <draw:text-box>
            <text:p><text:span text:style-name="T4">What is going good</text:span></text:p>
          </draw:text-box>
        </draw:frame>
        <draw:frame presentation:style-name="pr5" draw:text-style-name="P4" draw:layer="layout" svg:width="25.4cm" svg:height="10.5cm" svg:x="0.635cm" svg:y="3.81cm" presentation:class="outline" presentation:user-transformed="true">
          <draw:text-box>
            <text:list text:style-name="L2">
              <text:list-header>
                <text:p text:style-name="P8"><text:span text:style-name="T4"><text:line-break/></text:span><text:span text:style-name="T7">I now have a better understanding of:</text:span></text:p>
                <text:list>
                  <text:list-item>
                    <text:p><text:span text:style-name="T7">Beat Tracking Algorithms</text:span></text:p>
                  </text:list-item>
                  <text:list-item>
                    <text:p><text:span text:style-name="T7">Verovio and the benefits of MEI format in MIR. </text:span></text:p>
                  </text:list-item>
                  <text:list-item>
                    <text:p><text:span text:style-name="T7">General understanding and experience in coding on Python and JS.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4" draw:text-style-name="P4" draw:layer="layout" svg:width="26cm" svg:height="2cm" svg:x="1.286cm" svg:y="0.627cm" presentation:class="title" presentation:user-transformed="true">
          <draw:text-box>
            <text:p><text:span text:style-name="T4">What went bad</text:span></text:p>
          </draw:text-box>
        </draw:frame>
        <draw:frame presentation:style-name="pr5" draw:text-style-name="P4" draw:layer="layout" svg:width="25.4cm" svg:height="10.5cm" svg:x="0.635cm" svg:y="3.81cm" presentation:class="outline" presentation:user-transformed="true">
          <draw:text-box>
            <text:list text:style-name="L2">
              <text:list-header>
                <text:p text:style-name="P8"><text:span text:style-name="T7">Feels like most of the effort I did for the thesis project, was for nothing. </text:span></text:p>
                <text:p><text:span text:style-name="T7">Should have given more updates to my supervisor since day1.</text:span></text:p>
                <text:p><text:span text:style-name="T7">I feel like, my programing knowledge was not enough for the task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4" draw:text-style-name="P4" draw:layer="layout" svg:width="26cm" svg:height="2cm" svg:x="1.286cm" svg:y="0.627cm" presentation:class="title" presentation:user-transformed="true">
          <draw:text-box>
            <text:p><text:span text:style-name="T4">How it is going</text:span></text:p>
          </draw:text-box>
        </draw:frame>
        <draw:frame presentation:style-name="pr5" draw:text-style-name="P4" draw:layer="layout" svg:width="25.4cm" svg:height="10.5cm" svg:x="0.635cm" svg:y="3.81cm" presentation:class="outline" presentation:user-transformed="true">
          <draw:text-box>
            <text:list text:style-name="L2">
              <text:list-header>
                <text:p text:style-name="P8"><text:span text:style-name="T7">Feels like most of the effort I did for the thesis project, was for nothing. </text:span></text:p>
                <text:p><text:span text:style-name="T7">I am tiered.</text:span></text:p>
                <text:p><text:span text:style-name="T7">I am frustrated.</text:span></text:p>
                <text:p><text:span text:style-name="T7">I am sad.</text:span></text:p>
                <text:p><text:span text:style-name="T7">More importantly, I don’t want to post-pone. </text:span></text:p>
                <text:p><text:span text:style-name="T7">Should have given more updates to my supervisor since day1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4" draw:text-style-name="P4" draw:layer="layout" svg:width="26cm" svg:height="2cm" svg:x="1.286cm" svg:y="0.627cm" presentation:class="title" presentation:user-transformed="true">
          <draw:text-box>
            <text:p><text:span text:style-name="T4">Status</text:span></text:p>
          </draw:text-box>
        </draw:frame>
        <draw:frame presentation:style-name="pr5" draw:text-style-name="P4" draw:layer="layout" svg:width="25.4cm" svg:height="10.5cm" svg:x="0.635cm" svg:y="3.81cm" presentation:class="outline" presentation:user-transformed="true">
          <draw:text-box>
            <text:list text:style-name="L2">
              <text:list-header>
                <text:p text:style-name="P8"><text:span text:style-name="T4"/></text:p>
              </text:list-header>
              <text:list-item>
                <text:p><text:span text:style-name="T4">Current work status: </text:span><text:span text:style-name="T7"><text:s/>Late</text:span></text:p>
              </text:list-item>
              <text:list-item>
                <text:p><text:span text:style-name="T6">Conclusion forecast:</text:span><text:span text:style-name="T7"> Alarming 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solid" draw:fill-color="#12bb7b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42b97b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solid" draw:fill-color="#729fc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lef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lef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lef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lef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lef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left" fo:text-indent="0cm"/>
      <style:text-properties fo:font-size="15pt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lef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lef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5cm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5cm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5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5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12bb7b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42b97b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lef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left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right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right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4T18:39:05.997872000</meta:creation-date>
    <dc:description>This work is licensed under a Creative Commons 0 License.
It makes use of the works of Jun NOGATA.</dc:description>
    <meta:generator>LibreOffice/26.2.0.3$MacOSX_X86_64 LibreOffice_project/afbbd0df0edb6d40b450b0337ac646b0913a760c</meta:generator>
    <dc:title>Midnightblue</dc:title>
    <meta:editing-duration>P2DT9H40M16S</meta:editing-duration>
    <meta:editing-cycles>34</meta:editing-cycles>
    <dc:date>2026-04-29T17:23:25.080851000</dc:date>
    <meta:print-date>2026-01-22T18:22:52.351177000</meta:print-date>
    <meta:printed-by>PDF files</meta:printed-by>
    <meta:document-statistic meta:object-count="113"/>
    <meta:template xlink:type="simple" xlink:actuate="onRequest" xlink:title="Midnightblue" xlink:href="../../../../../../Applications/LibreOffice.app/Contents/Resources/template/common/presnt/Midnightblue.otp" meta:date="2026-01-14T18:39:05.109063000"/>
  </office:meta>
</office:document-meta>
</file>